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192cm" table:align="left"/>
    </style:style>
    <style:style style:name="Tabela1.A" style:family="table-column">
      <style:table-column-properties style:column-width="2.859cm"/>
    </style:style>
    <style:style style:name="Tabela1.B" style:family="table-column">
      <style:table-column-properties style:column-width="1.616cm"/>
    </style:style>
    <style:style style:name="Tabela1.C" style:family="table-column">
      <style:table-column-properties style:column-width="5.71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0.986cm" table:align="left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1.616cm"/>
    </style:style>
    <style:style style:name="Tabela2.C" style:family="table-column">
      <style:table-column-properties style:column-width="6.32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5.136cm" table:align="left"/>
    </style:style>
    <style:style style:name="Tabela3.A" style:family="table-column">
      <style:table-column-properties style:column-width="3.785cm"/>
    </style:style>
    <style:style style:name="Tabela3.B" style:family="table-column">
      <style:table-column-properties style:column-width="1.351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2">
      <style:paragraph-properties fo:margin-top="0cm" fo:margin-bottom="0cm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3">
      <style:paragraph-properties fo:margin-top="0cm" fo:margin-bottom="0cm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4">
      <style:paragraph-properties fo:margin-top="0cm" fo:margin-bottom="0cm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5">
      <style:paragraph-properties fo:margin-top="0cm" fo:margin-bottom="0cm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cm" fo:margin-bottom="0cm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7">
      <style:paragraph-properties fo:margin-top="0cm" fo:margin-bottom="0cm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8">
      <style:paragraph-properties fo:margin-top="0cm" fo:margin-bottom="0cm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29">
      <style:paragraph-properties fo:margin-top="0cm" fo:margin-bottom="0cm" style:contextual-spacing="false"/>
    </style:style>
    <style:style style:name="P61" style:family="paragraph" style:parent-style-name="Text_20_body" style:list-style-name="L30"/>
    <style:style style:name="P62" style:family="paragraph" style:parent-style-name="Text_20_body" style:list-style-name="L30">
      <style:paragraph-properties fo:margin-top="0cm" fo:margin-bottom="0cm" style:contextual-spacing="false"/>
    </style:style>
    <style:style style:name="P63" style:family="paragraph" style:parent-style-name="Text_20_body" style:list-style-name="L31"/>
    <style:style style:name="P64" style:family="paragraph" style:parent-style-name="Text_20_body" style:list-style-name="L31">
      <style:paragraph-properties fo:margin-top="0cm" fo:margin-bottom="0cm" style:contextual-spacing="false"/>
    </style:style>
    <style:style style:name="P65" style:family="paragraph" style:parent-style-name="Text_20_body" style:list-style-name="L32"/>
    <style:style style:name="P66" style:family="paragraph" style:parent-style-name="Text_20_body" style:list-style-name="L32">
      <style:paragraph-properties fo:margin-top="0cm" fo:margin-bottom="0cm" style:contextual-spacing="false"/>
    </style:style>
    <style:style style:name="P67" style:family="paragraph" style:parent-style-name="Text_20_body" style:list-style-name="L33"/>
    <style:style style:name="P68" style:family="paragraph" style:parent-style-name="Text_20_body" style:list-style-name="L33">
      <style:paragraph-properties fo:margin-top="0cm" fo:margin-bottom="0cm" style:contextual-spacing="false"/>
    </style:style>
    <style:style style:name="P69" style:family="paragraph" style:parent-style-name="Text_20_body" style:list-style-name="L34"/>
    <style:style style:name="P70" style:family="paragraph" style:parent-style-name="Text_20_body" style:list-style-name="L34">
      <style:paragraph-properties fo:margin-top="0cm" fo:margin-bottom="0cm" style:contextual-spacing="false"/>
    </style:style>
    <style:style style:name="P71" style:family="paragraph" style:parent-style-name="Text_20_body" style:list-style-name="L35"/>
    <style:style style:name="P72" style:family="paragraph" style:parent-style-name="Text_20_body" style:list-style-name="L35">
      <style:paragraph-properties fo:margin-top="0cm" fo:margin-bottom="0cm" style:contextual-spacing="false"/>
    </style:style>
    <style:style style:name="P73" style:family="paragraph" style:parent-style-name="Text_20_body" style:list-style-name="L36"/>
    <style:style style:name="P74" style:family="paragraph" style:parent-style-name="Text_20_body" style:list-style-name="L36">
      <style:paragraph-properties fo:margin-top="0cm" fo:margin-bottom="0cm" style:contextual-spacing="false"/>
    </style:style>
    <style:style style:name="P75" style:family="paragraph" style:parent-style-name="Text_20_body" style:list-style-name="L37"/>
    <style:style style:name="P76" style:family="paragraph" style:parent-style-name="Text_20_body" style:list-style-name="L37">
      <style:paragraph-properties fo:margin-top="0cm" fo:margin-bottom="0cm" style:contextual-spacing="false"/>
    </style:style>
    <style:style style:name="P77" style:family="paragraph" style:parent-style-name="Text_20_body" style:list-style-name="L38"/>
    <style:style style:name="P78" style:family="paragraph" style:parent-style-name="Text_20_body" style:list-style-name="L38">
      <style:paragraph-properties fo:margin-top="0cm" fo:margin-bottom="0cm" style:contextual-spacing="false"/>
    </style:style>
    <style:style style:name="P79" style:family="paragraph" style:parent-style-name="Text_20_body" style:list-style-name="L39"/>
    <style:style style:name="P80" style:family="paragraph" style:parent-style-name="Text_20_body" style:list-style-name="L39">
      <style:paragraph-properties fo:margin-top="0cm" fo:margin-bottom="0cm" style:contextual-spacing="false"/>
    </style:style>
    <style:style style:name="P81" style:family="paragraph" style:parent-style-name="Text_20_body" style:list-style-name="L40"/>
    <style:style style:name="P82" style:family="paragraph" style:parent-style-name="Text_20_body" style:list-style-name="L41"/>
    <style:style style:name="P83" style:family="paragraph" style:parent-style-name="Text_20_body" style:list-style-name="L42"/>
    <style:style style:name="P84" style:family="paragraph" style:parent-style-name="Text_20_body" style:list-style-name="L43"/>
    <style:style style:name="P85" style:family="paragraph" style:parent-style-name="Text_20_body" style:list-style-name="L44"/>
    <style:style style:name="P86" style:family="paragraph" style:parent-style-name="Text_20_body" style:list-style-name="L45"/>
    <style:style style:name="P87" style:family="paragraph" style:parent-style-name="Text_20_body" style:list-style-name="L46"/>
    <style:style style:name="P88" style:family="paragraph" style:parent-style-name="Text_20_body" style:list-style-name="L47"/>
    <style:style style:name="P89" style:family="paragraph" style:parent-style-name="Text_20_body" style:list-style-name="L48"/>
    <style:style style:name="P90" style:family="paragraph" style:parent-style-name="Text_20_body" style:list-style-name="L48">
      <style:paragraph-properties fo:margin-top="0cm" fo:margin-bottom="0cm" style:contextual-spacing="false"/>
    </style:style>
    <style:style style:name="P91" style:family="paragraph" style:parent-style-name="Text_20_body" style:list-style-name="L49"/>
    <style:style style:name="P92" style:family="paragraph" style:parent-style-name="Text_20_body" style:list-style-name="L49">
      <style:paragraph-properties fo:margin-top="0cm" fo:margin-bottom="0cm" style:contextual-spacing="false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📚 Documentação Completa - Sistema de Agendamento AIResolve</text:p>
      <text:h text:style-name="Heading_20_2" text:outline-level="2">📋 Índice</text:h>
      <text:list xml:id="list2194301583" text:style-name="L1">
        <text:list-item>
          <text:p text:style-name="P4"><text:a xlink:type="simple" xlink:href="#visão-geral" text:style-name="Internet_20_link" text:visited-style-name="Visited_20_Internet_20_Link">Visão Geral</text:a> </text:p>
        </text:list-item>
        <text:list-item>
          <text:p text:style-name="P4"><text:a xlink:type="simple" xlink:href="#arquitetura-do-sistema" text:style-name="Internet_20_link" text:visited-style-name="Visited_20_Internet_20_Link">Arquitetura do Sistema</text:a> </text:p>
        </text:list-item>
        <text:list-item>
          <text:p text:style-name="P4"><text:a xlink:type="simple" xlink:href="#tecnologias-utilizadas" text:style-name="Internet_20_link" text:visited-style-name="Visited_20_Internet_20_Link">Tecnologias Utilizadas</text:a> </text:p>
        </text:list-item>
        <text:list-item>
          <text:p text:style-name="P4"><text:a xlink:type="simple" xlink:href="#estrutura-do-projeto" text:style-name="Internet_20_link" text:visited-style-name="Visited_20_Internet_20_Link">Estrutura do Projeto</text:a> </text:p>
        </text:list-item>
        <text:list-item>
          <text:p text:style-name="P4"><text:a xlink:type="simple" xlink:href="#funcionalidades" text:style-name="Internet_20_link" text:visited-style-name="Visited_20_Internet_20_Link">Funcionalidades</text:a> </text:p>
        </text:list-item>
        <text:list-item>
          <text:p text:style-name="P4"><text:a xlink:type="simple" xlink:href="#fluxos-de-trabalho" text:style-name="Internet_20_link" text:visited-style-name="Visited_20_Internet_20_Link">Fluxos de Trabalho</text:a> </text:p>
        </text:list-item>
        <text:list-item>
          <text:p text:style-name="P4"><text:a xlink:type="simple" xlink:href="#api-backend" text:style-name="Internet_20_link" text:visited-style-name="Visited_20_Internet_20_Link">API Backend</text:a> </text:p>
        </text:list-item>
        <text:list-item>
          <text:p text:style-name="P4"><text:a xlink:type="simple" xlink:href="#frontend" text:style-name="Internet_20_link" text:visited-style-name="Visited_20_Internet_20_Link">Frontend</text:a> </text:p>
        </text:list-item>
        <text:list-item>
          <text:p text:style-name="P4"><text:a xlink:type="simple" xlink:href="#banco-de-dados" text:style-name="Internet_20_link" text:visited-style-name="Visited_20_Internet_20_Link">Banco de Dados</text:a> </text:p>
        </text:list-item>
        <text:list-item>
          <text:p text:style-name="P4"><text:a xlink:type="simple" xlink:href="#autenticação-e-segurança" text:style-name="Internet_20_link" text:visited-style-name="Visited_20_Internet_20_Link">Autenticação e Segurança</text:a> </text:p>
        </text:list-item>
        <text:list-item>
          <text:p text:style-name="P4"><text:a xlink:type="simple" xlink:href="#multi-tenancy" text:style-name="Internet_20_link" text:visited-style-name="Visited_20_Internet_20_Link">Multi-Tenancy</text:a> </text:p>
        </text:list-item>
        <text:list-item>
          <text:p text:style-name="P4"><text:a xlink:type="simple" xlink:href="#instalação-e-configuração" text:style-name="Internet_20_link" text:visited-style-name="Visited_20_Internet_20_Link">Instalação e Configuração</text:a> </text:p>
        </text:list-item>
        <text:list-item>
          <text:p text:style-name="P4"><text:a xlink:type="simple" xlink:href="#guia-de-desenvolvimento" text:style-name="Internet_20_link" text:visited-style-name="Visited_20_Internet_20_Link">Guia de Desenvolvimento</text:a> </text:p>
        </text:list-item>
        <text:list-item>
          <text:p text:style-name="P3"><text:a xlink:type="simple" xlink:href="#troubleshooting" text:style-name="Internet_20_link" text:visited-style-name="Visited_20_Internet_20_Link">Troubleshooting</text:a> </text:p>
        </text:list-item>
      </text:list>
      <text:p text:style-name="Horizontal_20_Line"/>
      <text:h text:style-name="Heading_20_2" text:outline-level="2">🎯 Visão Geral</text:h>
      <text:h text:style-name="Heading_20_3" text:outline-level="3">Descrição do Sistema</text:h>
      <text:p text:style-name="Text_20_body">O <text:span text:style-name="Strong_20_Emphasis">Sistema de Agendamento AIResolve</text:span> é uma aplicação web completa para gerenciamento de agendamentos, clientes, profissionais e serviços. O sistema foi desenvolvido com foco em multi-tenancy (múltiplas empresas), integração com WhatsApp via Evolution API e Google Calendar.</text:p>
      <text:h text:style-name="Heading_20_3" text:outline-level="3">Objetivos</text:h>
      <text:list xml:id="list2933701128" text:style-name="L2">
        <text:list-item>
          <text:p text:style-name="P6">✅ Gerenciar agendamentos de múltiplas empresas </text:p>
        </text:list-item>
        <text:list-item>
          <text:p text:style-name="P6">✅ Automatizar comunicação com clientes via WhatsApp </text:p>
        </text:list-item>
        <text:list-item>
          <text:p text:style-name="P6">✅ Sincronizar agendamentos com Google Calendar </text:p>
        </text:list-item>
        <text:list-item>
          <text:p text:style-name="P6">✅ Fornecer dashboard com métricas e gráficos </text:p>
        </text:list-item>
        <text:list-item>
          <text:p text:style-name="P6">✅ Facilitar configuração inicial através de wizard </text:p>
        </text:list-item>
        <text:list-item>
          <text:p text:style-name="P5">✅ Garantir segurança e isolamento de dados entre empresas </text:p>
        </text:list-item>
      </text:list>
      <text:h text:style-name="Heading_20_3" text:outline-level="3">Público-Alvo</text:h>
      <text:list xml:id="list3964929524" text:style-name="L3">
        <text:list-item>
          <text:p text:style-name="P8">🏢 Empresas de serviços (salões de beleza, clínicas, consultórios) </text:p>
        </text:list-item>
        <text:list-item>
          <text:p text:style-name="P8">👥 Profissionais autônomos </text:p>
        </text:list-item>
        <text:list-item>
          <text:p text:style-name="P7">🏪 Estabelecimentos com múltiplos profissionais </text:p>
        </text:list-item>
      </text:list>
      <text:p text:style-name="Horizontal_20_Line"/>
      <text:h text:style-name="Heading_20_2" text:outline-level="2">🏗️ Arquitetura do Sistema</text:h>
      <text:h text:style-name="Heading_20_3" text:outline-level="3">Diagrama de Arquitetura</text:h>
      <text:p text:style-name="Preformatted_20_Text"><text:span text:style-name="Source_20_Text">┌───────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21"/>CLIENTE (Browser) <text:s text:c="21"/>│</text:span></text:p>
      <text:p text:style-name="Preformatted_20_Text"><text:span text:style-name="Source_20_Text">│ <text:s text:c="19"/>React + Vite + Tailwind <text:s text:c="17"/>│</text:span></text:p>
      <text:p text:style-name="Preformatted_20_Text"><text:span text:style-name="Source_20_Text">└─────────────────────┬───────────────────────────────────────┘</text:span></text:p>
      <text:p text:style-name="Preformatted_20_Text"><text:span text:style-name="Source_20_Text"><text:s text:c="22"/>│ HTTP/HTTPS</text:span></text:p>
      <text:p text:style-name="Preformatted_20_Text"><text:span text:style-name="Source_20_Text"><text:s text:c="22"/>│ JSON</text:span></text:p>
      <text:p text:style-name="Preformatted_20_Text"><text:span text:style-name="Source_20_Text">┌─────────────────────▼───────────────────────────────────────┐</text:span></text:p>
      <text:p text:style-name="Preformatted_20_Text"><text:span text:style-name="Source_20_Text">│ <text:s text:c="19"/>API REST (Backend) <text:s text:c="22"/>│</text:span></text:p>
      <text:p text:style-name="Preformatted_20_Text"><text:span text:style-name="Source_20_Text">│ <text:s text:c="17"/>Node.js + Express.js <text:s text:c="22"/>│</text:span></text:p>
      <text:p text:style-name="Preformatted_20_Text"><text:span text:style-name="Source_20_Text">│ <text:s/>┌──────────────┐ <text:s/>┌──────────────┐ <text:s/>┌──────────────┐ <text:s text:c="4"/>│</text:span></text:p>
      <text:p text:style-name="Preformatted_20_Text"><text:span text:style-name="Source_20_Text">│ <text:s/>│ Controllers <text:s/>│ <text:s/>│ <text:s/>Middleware <text:s/>│ <text:s/>│ <text:s text:c="2"/>Services <text:s text:c="2"/>│ <text:s text:c="4"/>│</text:span></text:p>
      <text:p text:style-name="Preformatted_20_Text"><text:span text:style-name="Source_20_Text">│ <text:s/>└──────────────┘ <text:s/>└──────────────┘ <text:s/>└──────────────┘ <text:s text:c="4"/>│</text:span></text:p>
      <text:p text:style-name="Preformatted_20_Text"><text:span text:style-name="Source_20_Text">│ <text:s/>┌──────────────┐ <text:s/>┌──────────────┐ <text:s/>┌──────────────┐ <text:s text:c="4"/>│</text:span></text:p>
      <text:p text:style-name="Preformatted_20_Text"><text:span text:style-name="Source_20_Text">│ <text:s/>│ <text:s text:c="3"/>Models <text:s text:c="3"/>│ <text:s/>│ <text:s text:c="3"/>Routes <text:s text:c="3"/>│ <text:s/>│ <text:s text:c="4"/>Auth <text:s text:c="4"/>│ <text:s text:c="4"/>│</text:span></text:p>
      <text:p text:style-name="Preformatted_20_Text"><text:span text:style-name="Source_20_Text">│ <text:s/>└──────────────┘ <text:s/>└──────────────┘ <text:s/>└──────────────┘ <text:s text:c="4"/>│</text:span></text:p>
      <text:p text:style-name="Preformatted_20_Text"><text:span text:style-name="Source_20_Text">└─────────────────────┬───────────────────────────────────────┘</text:span></text:p>
      <text:p text:style-name="Preformatted_20_Text"><text:span text:style-name="Source_20_Text"><text:s text:c="22"/>│ SQL</text:span></text:p>
      <text:p text:style-name="Preformatted_20_Text"><text:span text:style-name="Source_20_Text"><text:s text:c="22"/>│</text:span></text:p>
      <text:p text:style-name="Preformatted_20_Text"><text:span text:style-name="Source_20_Text">┌─────────────────────▼───────────────────────────────────────┐</text:span></text:p>
      <text:p text:style-name="Preformatted_20_Text"><text:span text:style-name="Source_20_Text">│ <text:s text:c="18"/>PostgreSQL Database <text:s text:c="22"/>│</text:span></text:p>
      <text:p text:style-name="Preformatted_20_Text"><text:span text:style-name="Source_20_Text">│ <text:s/>┌──────────────────────────────────────────────────────┐ <text:s/>│</text:span></text:p>
      <text:p text:style-name="Preformatted_20_Text"><text:span text:style-name="Source_20_Text">│ <text:s/>│ Multi-Tenant Data (empresa_id isolation) <text:s text:c="12"/>│ <text:s/>│</text:span></text:p>
      <text:p text:style-name="Preformatted_20_Text"><text:span text:style-name="Source_20_Text">│ <text:s/>│ • agendamento <text:s/>• clientes <text:s/>• profissional <text:s text:c="11"/>│ <text:s/>│</text:span></text:p>
      <text:p text:style-name="Preformatted_20_Text"><text:span text:style-name="Source_20_Text">│ <text:s/>│ • servicos <text:s text:c="4"/>• empresa <text:s text:c="2"/>• login <text:s text:c="18"/>│ <text:s/>│</text:span></text:p>
      <text:p text:style-name="Preformatted_20_Text"><text:span text:style-name="Source_20_Text">│ <text:s/>└──────────────────────────────────────────────────────┘ <text:s/>│</text:span></text:p>
      <text:p text:style-name="Preformatted_20_Text"><text:span text:style-name="Source_20_Text">└─────────────────────────────────────────────────────────────┘</text:span></text:p>
      <text:p text:style-name="Preformatted_20_Text"><text:span text:style-name="Source_20_Text"><text:s text:c="22"/>│</text:span></text:p>
      <text:p text:style-name="Preformatted_20_Text"><text:span text:style-name="Source_20_Text"><text:s text:c="8"/>┌─────────────┴─────────────┐</text:span></text:p>
      <text:p text:style-name="Preformatted_20_Text"><text:span text:style-name="Source_20_Text"><text:s text:c="8"/>│ <text:s text:c="26"/>│</text:span></text:p>
      <text:p text:style-name="Preformatted_20_Text"><text:span text:style-name="Source_20_Text">┌───────▼──────┐ <text:s text:c="10"/>┌────────▼────────┐</text:span></text:p>
      <text:p text:style-name="Preformatted_20_Text"><text:span text:style-name="Source_20_Text">│ Evolution API│ <text:s text:c="10"/>│ Google Calendar │</text:span></text:p>
      <text:p text:style-name="Preformatted_20_Text"><text:span text:style-name="Source_20_Text">│ <text:s/>(WhatsApp) <text:s/>│ <text:s text:c="10"/>│ <text:s text:c="5"/>API <text:s text:c="7"/>│</text:span></text:p>
      <text:p text:style-name="P2"><text:span text:style-name="Source_20_Text">└──────────────┘ <text:s text:c="10"/>└─────────────────┘</text:span></text:p>
      <text:h text:style-name="Heading_20_3" text:outline-level="3">Padrões Arquiteturais</text:h>
      <text:list xml:id="list112534091" text:style-name="L4">
        <text:list-item>
          <text:p text:style-name="P10"><text:span text:style-name="Strong_20_Emphasis">MVC (Model-View-Controller)</text:span> </text:p>
        </text:list-item>
        <text:list-item>
          <text:p text:style-name="P10">Model: Camada de dados (PostgreSQL) </text:p>
        </text:list-item>
        <text:list-item>
          <text:p text:style-name="P10">View: Interface React </text:p>
        </text:list-item>
        <text:list-item>
          <text:p text:style-name="P9">Controller: API REST</text:p>
        </text:list-item>
        <text:list-item>
          <text:p text:style-name="P9"><text:span text:style-name="Strong_20_Emphasis">RESTful API</text:span></text:p>
        </text:list-item>
        <text:list-item>
          <text:p text:style-name="P10">Endpoints padronizados </text:p>
        </text:list-item>
        <text:list-item>
          <text:p text:style-name="P10">Verbos HTTP semânticos </text:p>
        </text:list-item>
        <text:list-item>
          <text:p text:style-name="P9">Respostas JSON</text:p>
        </text:list-item>
        <text:list-item>
          <text:p text:style-name="P9"><text:span text:style-name="Strong_20_Emphasis">Multi-Tenancy</text:span></text:p>
        </text:list-item>
        <text:list-item>
          <text:p text:style-name="P10">Isolamento por <text:span text:style-name="Source_20_Text">empresa_id</text:span> </text:p>
        </text:list-item>
        <text:list-item>
          <text:p text:style-name="P10">Middleware de segurança </text:p>
        </text:list-item>
        <text:list-item>
          <text:p text:style-name="P9">Queries filtradas automaticamente </text:p>
        </text:list-item>
      </text:list>
      <text:p text:style-name="Horizontal_20_Line"/>
      <text:h text:style-name="Heading_20_2" text:outline-level="2">💻 Tecnologias Utilizadas</text:h>
      <text:h text:style-name="Heading_20_3" text:outline-level="3">Frontend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Tecnologia</text:p>
            </table:table-cell>
            <table:table-cell table:style-name="Tabela1.A1" office:value-type="string">
              <text:p text:style-name="Table_20_Heading">Versão</text:p>
            </table:table-cell>
            <table:table-cell table:style-name="Tabela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React</text:span></text:p>
          </table:table-cell>
          <table:table-cell table:style-name="Tabela1.A1" office:value-type="string">
            <text:p text:style-name="Table_20_Contents">18.x</text:p>
          </table:table-cell>
          <table:table-cell table:style-name="Tabela1.A1" office:value-type="string">
            <text:p text:style-name="Table_20_Contents">Biblioteca JavaScript para UI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Vite</text:span></text:p>
          </table:table-cell>
          <table:table-cell table:style-name="Tabela1.A1" office:value-type="string">
            <text:p text:style-name="Table_20_Contents">5.x</text:p>
          </table:table-cell>
          <table:table-cell table:style-name="Tabela1.A1" office:value-type="string">
            <text:p text:style-name="Table_20_Contents">Build tool e dev serve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act Router</text:span></text:p>
          </table:table-cell>
          <table:table-cell table:style-name="Tabela1.A1" office:value-type="string">
            <text:p text:style-name="Table_20_Contents">6.x</text:p>
          </table:table-cell>
          <table:table-cell table:style-name="Tabela1.A1" office:value-type="string">
            <text:p text:style-name="Table_20_Contents">Roteamento SPA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TailwindCSS</text:span></text:p>
          </table:table-cell>
          <table:table-cell table:style-name="Tabela1.A1" office:value-type="string">
            <text:p text:style-name="Table_20_Contents">3.x</text:p>
          </table:table-cell>
          <table:table-cell table:style-name="Tabela1.A1" office:value-type="string">
            <text:p text:style-name="Table_20_Contents">Framework CSS utility-first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Lucide React</text:span></text:p>
          </table:table-cell>
          <table:table-cell table:style-name="Tabela1.A1" office:value-type="string">
            <text:p text:style-name="Table_20_Contents">Latest</text:p>
          </table:table-cell>
          <table:table-cell table:style-name="Tabela1.A1" office:value-type="string">
            <text:p text:style-name="Table_20_Contents">Ícones SVG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xios</text:span></text:p>
          </table:table-cell>
          <table:table-cell table:style-name="Tabela1.A1" office:value-type="string">
            <text:p text:style-name="Table_20_Contents">Latest</text:p>
          </table:table-cell>
          <table:table-cell table:style-name="Tabela1.A1" office:value-type="string">
            <text:p text:style-name="Table_20_Contents">Cliente HTTP</text:p>
          </table:table-cell>
        </table:table-row>
      </table:table>
      <text:h text:style-name="Heading_20_3" text:outline-level="3">Backend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Tecnologia</text:p>
            </table:table-cell>
            <table:table-cell table:style-name="Tabela2.A1" office:value-type="string">
              <text:p text:style-name="Table_20_Heading">Versão</text:p>
            </table:table-cell>
            <table:table-cell table:style-name="Tabela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trong_20_Emphasis">Node.js</text:span></text:p>
          </table:table-cell>
          <table:table-cell table:style-name="Tabela2.A1" office:value-type="string">
            <text:p text:style-name="Table_20_Contents">20.x</text:p>
          </table:table-cell>
          <table:table-cell table:style-name="Tabela2.A1" office:value-type="string">
            <text:p text:style-name="Table_20_Contents">Runtime JavaScript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Express.js</text:span></text:p>
          </table:table-cell>
          <table:table-cell table:style-name="Tabela2.A1" office:value-type="string">
            <text:p text:style-name="Table_20_Contents">4.x</text:p>
          </table:table-cell>
          <table:table-cell table:style-name="Tabela2.A1" office:value-type="string">
            <text:p text:style-name="Table_20_Contents">Framework web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PostgreSQL</text:span></text:p>
          </table:table-cell>
          <table:table-cell table:style-name="Tabela2.A1" office:value-type="string">
            <text:p text:style-name="Table_20_Contents">Latest</text:p>
          </table:table-cell>
          <table:table-cell table:style-name="Tabela2.A1" office:value-type="string">
            <text:p text:style-name="Table_20_Contents">Banco de dados relacional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pg</text:span></text:p>
          </table:table-cell>
          <table:table-cell table:style-name="Tabela2.A1" office:value-type="string">
            <text:p text:style-name="Table_20_Contents">Latest</text:p>
          </table:table-cell>
          <table:table-cell table:style-name="Tabela2.A1" office:value-type="string">
            <text:p text:style-name="Table_20_Contents">Driver PostgreSQL para Node.js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jsonwebtoken</text:span></text:p>
          </table:table-cell>
          <table:table-cell table:style-name="Tabela2.A1" office:value-type="string">
            <text:p text:style-name="Table_20_Contents">Latest</text:p>
          </table:table-cell>
          <table:table-cell table:style-name="Tabela2.A1" office:value-type="string">
            <text:p text:style-name="Table_20_Contents">Autenticação JWT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bcrypt</text:span></text:p>
          </table:table-cell>
          <table:table-cell table:style-name="Tabela2.A1" office:value-type="string">
            <text:p text:style-name="Table_20_Contents">Latest</text:p>
          </table:table-cell>
          <table:table-cell table:style-name="Tabela2.A1" office:value-type="string">
            <text:p text:style-name="Table_20_Contents">Hash de senhas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dotenv</text:span></text:p>
          </table:table-cell>
          <table:table-cell table:style-name="Tabela2.A1" office:value-type="string">
            <text:p text:style-name="Table_20_Contents">Latest</text:p>
          </table:table-cell>
          <table:table-cell table:style-name="Tabela2.A1" office:value-type="string">
            <text:p text:style-name="Table_20_Contents">Variáveis de ambiente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cors</text:span></text:p>
          </table:table-cell>
          <table:table-cell table:style-name="Tabela2.A1" office:value-type="string">
            <text:p text:style-name="Table_20_Contents">Latest</text:p>
          </table:table-cell>
          <table:table-cell table:style-name="Tabela2.A1" office:value-type="string">
            <text:p text:style-name="Table_20_Contents">Cross-Origin Resource Sharing</text:p>
          </table:table-cell>
        </table:table-row>
      </table:table>
      <text:h text:style-name="Heading_20_3" text:outline-level="3">Ferramentas de Desenvolvimento</text:h>
      <text:list xml:id="list4087724248" text:style-name="L5">
        <text:list-item>
          <text:p text:style-name="P12"><text:span text:style-name="Strong_20_Emphasis">NVM</text:span> - Node Version Manager </text:p>
        </text:list-item>
        <text:list-item>
          <text:p text:style-name="P12"><text:span text:style-name="Strong_20_Emphasis">Git</text:span> - Controle de versão </text:p>
        </text:list-item>
        <text:list-item>
          <text:p text:style-name="P11"><text:span text:style-name="Strong_20_Emphasis">VS Code / Cursor</text:span> - IDE </text:p>
        </text:list-item>
      </text:list>
      <text:p text:style-name="Horizontal_20_Line"/>
      <text:h text:style-name="Heading_20_2" text:outline-level="2">📁 Estrutura do Projeto</text:h>
      <text:p text:style-name="Preformatted_20_Text"><text:span text:style-name="Source_20_Text">agendamento/</text:span></text:p>
      <text:p text:style-name="Preformatted_20_Text"><text:span text:style-name="Source_20_Text">├── api/ <text:s text:c="25"/># Backend (Node.js + Express)</text:span></text:p>
      <text:p text:style-name="Preformatted_20_Text"><text:span text:style-name="Source_20_Text">│ <text:s text:c="2"/>├── src/</text:span></text:p>
      <text:p text:style-name="Preformatted_20_Text"><text:span text:style-name="Source_20_Text">│ <text:s text:c="2"/>│ <text:s text:c="2"/>├── config/ <text:s text:c="13"/># Configurações</text:span></text:p>
      <text:p text:style-name="Preformatted_20_Text"><text:span text:style-name="Source_20_Text">│ <text:s text:c="2"/>│ <text:s text:c="2"/>│ <text:s text:c="2"/>└── database.js <text:s text:c="5"/># Conexão PostgreSQL</text:span></text:p>
      <text:p text:style-name="Preformatted_20_Text"><text:span text:style-name="Source_20_Text">│ <text:s text:c="2"/>│ <text:s text:c="2"/>├── controllers/ <text:s text:c="8"/># Lógica de negócio</text:span></text:p>
      <text:p text:style-name="Preformatted_20_Text"><text:span text:style-name="Source_20_Text">│ <text:s text:c="2"/>│ <text:s text:c="2"/>│ <text:s text:c="2"/>├── auth.controller.js</text:span></text:p>
      <text:p text:style-name="Preformatted_20_Text"><text:span text:style-name="Source_20_Text">│ <text:s text:c="2"/>│ <text:s text:c="2"/>│ <text:s text:c="2"/>├── dashboard.controller.js</text:span></text:p>
      <text:p text:style-name="Preformatted_20_Text"><text:span text:style-name="Source_20_Text">│ <text:s text:c="2"/>│ <text:s text:c="2"/>│ <text:s text:c="2"/>├── empresas.controller.js</text:span></text:p>
      <text:p text:style-name="Preformatted_20_Text"><text:span text:style-name="Source_20_Text">│ <text:s text:c="2"/>│ <text:s text:c="2"/>│ <text:s text:c="2"/>└── wizard.controller.js</text:span></text:p>
      <text:p text:style-name="Preformatted_20_Text"><text:span text:style-name="Source_20_Text">│ <text:s text:c="2"/>│ <text:s text:c="2"/>├── middleware/ <text:s text:c="9"/># Middlewares</text:span></text:p>
      <text:p text:style-name="Preformatted_20_Text"><text:span text:style-name="Source_20_Text">│ <text:s text:c="2"/>│ <text:s text:c="2"/>│ <text:s text:c="2"/>├── auth.middleware.js</text:span></text:p>
      <text:p text:style-name="Preformatted_20_Text"><text:span text:style-name="Source_20_Text">│ <text:s text:c="2"/>│ <text:s text:c="2"/>│ <text:s text:c="2"/>└── multiTenant.middleware.js</text:span></text:p>
      <text:p text:style-name="Preformatted_20_Text"><text:span text:style-name="Source_20_Text">│ <text:s text:c="2"/>│ <text:s text:c="2"/>├── models/ <text:s text:c="13"/># Acesso a dados</text:span></text:p>
      <text:p text:style-name="Preformatted_20_Text"><text:span text:style-name="Source_20_Text">│ <text:s text:c="2"/>│ <text:s text:c="2"/>│ <text:s text:c="2"/>├── empresa.model.js</text:span></text:p>
      <text:p text:style-name="Preformatted_20_Text"><text:span text:style-name="Source_20_Text">│ <text:s text:c="2"/>│ <text:s text:c="2"/>│ <text:s text:c="2"/>├── wizard.model.js</text:span></text:p>
      <text:p text:style-name="Preformatted_20_Text"><text:span text:style-name="Source_20_Text">│ <text:s text:c="2"/>│ <text:s text:c="2"/>│ <text:s text:c="2"/>└── user.model.js</text:span></text:p>
      <text:p text:style-name="Preformatted_20_Text"><text:span text:style-name="Source_20_Text">│ <text:s text:c="2"/>│ <text:s text:c="2"/>├── routes/ <text:s text:c="13"/># Rotas da API</text:span></text:p>
      <text:p text:style-name="Preformatted_20_Text"><text:span text:style-name="Source_20_Text">│ <text:s text:c="2"/>│ <text:s text:c="2"/>│ <text:s text:c="2"/>├── auth.routes.js</text:span></text:p>
      <text:p text:style-name="Preformatted_20_Text"><text:span text:style-name="Source_20_Text">│ <text:s text:c="2"/>│ <text:s text:c="2"/>│ <text:s text:c="2"/>├── dashboard.routes.js</text:span></text:p>
      <text:p text:style-name="Preformatted_20_Text"><text:span text:style-name="Source_20_Text">│ <text:s text:c="2"/>│ <text:s text:c="2"/>│ <text:s text:c="2"/>├── empresas.routes.js</text:span></text:p>
      <text:p text:style-name="Preformatted_20_Text"><text:span text:style-name="Source_20_Text">│ <text:s text:c="2"/>│ <text:s text:c="2"/>│ <text:s text:c="2"/>└── wizard.routes.js</text:span></text:p>
      <text:p text:style-name="Preformatted_20_Text"><text:span text:style-name="Source_20_Text">│ <text:s text:c="2"/>│ <text:s text:c="2"/>├── app.js <text:s text:c="14"/># Configuração Express</text:span></text:p>
      <text:p text:style-name="Preformatted_20_Text"><text:span text:style-name="Source_20_Text">│ <text:s text:c="2"/>│ <text:s text:c="2"/>└── server.js <text:s text:c="11"/># Inicialização do servidor</text:span></text:p>
      <text:p text:style-name="Preformatted_20_Text"><text:span text:style-name="Source_20_Text">│ <text:s text:c="2"/>├── package.json</text:span></text:p>
      <text:p text:style-name="Preformatted_20_Text"><text:span text:style-name="Source_20_Text">│ <text:s text:c="2"/>└── .env <text:s text:c="20"/># Variáveis de ambiente</text:span></text:p>
      <text:p text:style-name="Preformatted_20_Text"><text:span text:style-name="Source_20_Text">│</text:span></text:p>
      <text:p text:style-name="Preformatted_20_Text"><text:span text:style-name="Source_20_Text">├── site/ <text:s text:c="24"/># Frontend (React + Vite)</text:span></text:p>
      <text:p text:style-name="Preformatted_20_Text"><text:span text:style-name="Source_20_Text">│ <text:s text:c="2"/>├── public/ <text:s text:c="17"/># Arquivos estáticos</text:span></text:p>
      <text:p text:style-name="Preformatted_20_Text"><text:span text:style-name="Source_20_Text">│ <text:s text:c="2"/>├── src/</text:span></text:p>
      <text:p text:style-name="Preformatted_20_Text"><text:span text:style-name="Source_20_Text">│ <text:s text:c="2"/>│ <text:s text:c="2"/>├── assets/ <text:s text:c="13"/># Imagens, estilos</text:span></text:p>
      <text:p text:style-name="Preformatted_20_Text"><text:span text:style-name="Source_20_Text">│ <text:s text:c="2"/>│ <text:s text:c="2"/>│ <text:s text:c="2"/>├── images/</text:span></text:p>
      <text:p text:style-name="Preformatted_20_Text"><text:soft-page-break/><text:span text:style-name="Source_20_Text">│ <text:s text:c="2"/>│ <text:s text:c="2"/>│ <text:s text:c="2"/>└── styles/</text:span></text:p>
      <text:p text:style-name="Preformatted_20_Text"><text:span text:style-name="Source_20_Text">│ <text:s text:c="2"/>│ <text:s text:c="2"/>│ <text:s text:c="6"/>└── index.css</text:span></text:p>
      <text:p text:style-name="Preformatted_20_Text"><text:span text:style-name="Source_20_Text">│ <text:s text:c="2"/>│ <text:s text:c="2"/>├── components/ <text:s text:c="9"/># Componentes React</text:span></text:p>
      <text:p text:style-name="Preformatted_20_Text"><text:span text:style-name="Source_20_Text">│ <text:s text:c="2"/>│ <text:s text:c="2"/>│ <text:s text:c="2"/>├── layout/ <text:s text:c="9"/># Layout components</text:span></text:p>
      <text:p text:style-name="Preformatted_20_Text"><text:span text:style-name="Source_20_Text">│ <text:s text:c="2"/>│ <text:s text:c="2"/>│ <text:s text:c="2"/>│ <text:s text:c="2"/>├── AuthLayout.jsx</text:span></text:p>
      <text:p text:style-name="Preformatted_20_Text"><text:span text:style-name="Source_20_Text">│ <text:s text:c="2"/>│ <text:s text:c="2"/>│ <text:s text:c="2"/>│ <text:s text:c="2"/>├── Header.jsx</text:span></text:p>
      <text:p text:style-name="Preformatted_20_Text"><text:span text:style-name="Source_20_Text">│ <text:s text:c="2"/>│ <text:s text:c="2"/>│ <text:s text:c="2"/>│ <text:s text:c="2"/>├── MainLayout.jsx</text:span></text:p>
      <text:p text:style-name="Preformatted_20_Text"><text:span text:style-name="Source_20_Text">│ <text:s text:c="2"/>│ <text:s text:c="2"/>│ <text:s text:c="2"/>│ <text:s text:c="2"/>└── Sidebar.jsx</text:span></text:p>
      <text:p text:style-name="Preformatted_20_Text"><text:span text:style-name="Source_20_Text">│ <text:s text:c="2"/>│ <text:s text:c="2"/>│ <text:s text:c="2"/>├── ui/ <text:s text:c="13"/># UI components</text:span></text:p>
      <text:p text:style-name="Preformatted_20_Text"><text:span text:style-name="Source_20_Text">│ <text:s text:c="2"/>│ <text:s text:c="2"/>│ <text:s text:c="2"/>│ <text:s text:c="2"/>├── Button.jsx</text:span></text:p>
      <text:p text:style-name="Preformatted_20_Text"><text:span text:style-name="Source_20_Text">│ <text:s text:c="2"/>│ <text:s text:c="2"/>│ <text:s text:c="2"/>│ <text:s text:c="2"/>├── Card.jsx</text:span></text:p>
      <text:p text:style-name="Preformatted_20_Text"><text:span text:style-name="Source_20_Text">│ <text:s text:c="2"/>│ <text:s text:c="2"/>│ <text:s text:c="2"/>│ <text:s text:c="2"/>├── Input.jsx</text:span></text:p>
      <text:p text:style-name="Preformatted_20_Text"><text:span text:style-name="Source_20_Text">│ <text:s text:c="2"/>│ <text:s text:c="2"/>│ <text:s text:c="2"/>│ <text:s text:c="2"/>└── Logo.jsx</text:span></text:p>
      <text:p text:style-name="Preformatted_20_Text"><text:span text:style-name="Source_20_Text">│ <text:s text:c="2"/>│ <text:s text:c="2"/>│ <text:s text:c="2"/>└── features/ <text:s text:c="7"/># Feature components</text:span></text:p>
      <text:p text:style-name="Preformatted_20_Text"><text:span text:style-name="Source_20_Text">│ <text:s text:c="2"/>│ <text:s text:c="2"/>├── contexts/ <text:s text:c="11"/># React Context</text:span></text:p>
      <text:p text:style-name="Preformatted_20_Text"><text:span text:style-name="Source_20_Text">│ <text:s text:c="2"/>│ <text:s text:c="2"/>│ <text:s text:c="2"/>└── AuthContext.jsx</text:span></text:p>
      <text:p text:style-name="Preformatted_20_Text"><text:span text:style-name="Source_20_Text">│ <text:s text:c="2"/>│ <text:s text:c="2"/>├── pages/ <text:s text:c="14"/># Páginas</text:span></text:p>
      <text:p text:style-name="Preformatted_20_Text"><text:span text:style-name="Source_20_Text">│ <text:s text:c="2"/>│ <text:s text:c="2"/>│ <text:s text:c="2"/>├── Dashboard.jsx</text:span></text:p>
      <text:p text:style-name="Preformatted_20_Text"><text:span text:style-name="Source_20_Text">│ <text:s text:c="2"/>│ <text:s text:c="2"/>│ <text:s text:c="2"/>├── Login.jsx</text:span></text:p>
      <text:p text:style-name="Preformatted_20_Text"><text:span text:style-name="Source_20_Text">│ <text:s text:c="2"/>│ <text:s text:c="2"/>│ <text:s text:c="2"/>├── Agendamentos/</text:span></text:p>
      <text:p text:style-name="Preformatted_20_Text"><text:span text:style-name="Source_20_Text">│ <text:s text:c="2"/>│ <text:s text:c="2"/>│ <text:s text:c="2"/>├── Clientes/</text:span></text:p>
      <text:p text:style-name="Preformatted_20_Text"><text:span text:style-name="Source_20_Text">│ <text:s text:c="2"/>│ <text:s text:c="2"/>│ <text:s text:c="2"/>├── Configuracoes/</text:span></text:p>
      <text:p text:style-name="Preformatted_20_Text"><text:span text:style-name="Source_20_Text">│ <text:s text:c="2"/>│ <text:s text:c="2"/>│ <text:s text:c="2"/>├── Empresas/</text:span></text:p>
      <text:p text:style-name="Preformatted_20_Text"><text:span text:style-name="Source_20_Text">│ <text:s text:c="2"/>│ <text:s text:c="2"/>│ <text:s text:c="2"/>├── Profissionais/</text:span></text:p>
      <text:p text:style-name="Preformatted_20_Text"><text:span text:style-name="Source_20_Text">│ <text:s text:c="2"/>│ <text:s text:c="2"/>│ <text:s text:c="2"/>├── Servicos/</text:span></text:p>
      <text:p text:style-name="Preformatted_20_Text"><text:span text:style-name="Source_20_Text">│ <text:s text:c="2"/>│ <text:s text:c="2"/>│ <text:s text:c="2"/>└── Wizard/</text:span></text:p>
      <text:p text:style-name="Preformatted_20_Text"><text:span text:style-name="Source_20_Text">│ <text:s text:c="2"/>│ <text:s text:c="2"/>├── services/ <text:s text:c="11"/># Serviços API</text:span></text:p>
      <text:p text:style-name="Preformatted_20_Text"><text:span text:style-name="Source_20_Text">│ <text:s text:c="2"/>│ <text:s text:c="2"/>│ <text:s text:c="2"/>├── api.js</text:span></text:p>
      <text:p text:style-name="Preformatted_20_Text"><text:span text:style-name="Source_20_Text">│ <text:s text:c="2"/>│ <text:s text:c="2"/>│ <text:s text:c="2"/>├── auth.service.js</text:span></text:p>
      <text:p text:style-name="Preformatted_20_Text"><text:span text:style-name="Source_20_Text">│ <text:s text:c="2"/>│ <text:s text:c="2"/>│ <text:s text:c="2"/>├── dashboard.service.js</text:span></text:p>
      <text:p text:style-name="Preformatted_20_Text"><text:span text:style-name="Source_20_Text">│ <text:s text:c="2"/>│ <text:s text:c="2"/>│ <text:s text:c="2"/>├── empresas.service.js</text:span></text:p>
      <text:p text:style-name="Preformatted_20_Text"><text:span text:style-name="Source_20_Text">│ <text:s text:c="2"/>│ <text:s text:c="2"/>│ <text:s text:c="2"/>└── wizard.service.js</text:span></text:p>
      <text:p text:style-name="Preformatted_20_Text"><text:span text:style-name="Source_20_Text">│ <text:s text:c="2"/>│ <text:s text:c="2"/>├── utils/ <text:s text:c="14"/># Utilitários</text:span></text:p>
      <text:p text:style-name="Preformatted_20_Text"><text:span text:style-name="Source_20_Text">│ <text:s text:c="2"/>│ <text:s text:c="2"/>├── App.jsx <text:s text:c="13"/># Componente raiz</text:span></text:p>
      <text:p text:style-name="Preformatted_20_Text"><text:span text:style-name="Source_20_Text">│ <text:s text:c="2"/>│ <text:s text:c="2"/>├── main.jsx <text:s text:c="12"/># Entry point</text:span></text:p>
      <text:p text:style-name="Preformatted_20_Text"><text:span text:style-name="Source_20_Text">│ <text:s text:c="2"/>│ <text:s text:c="2"/>└── router.jsx <text:s text:c="10"/># Configuração de rotas</text:span></text:p>
      <text:p text:style-name="Preformatted_20_Text"><text:span text:style-name="Source_20_Text">│ <text:s text:c="2"/>├── package.json</text:span></text:p>
      <text:p text:style-name="Preformatted_20_Text"><text:span text:style-name="Source_20_Text">│ <text:s text:c="2"/>├── vite.config.js</text:span></text:p>
      <text:p text:style-name="Preformatted_20_Text"><text:span text:style-name="Source_20_Text">│ <text:s text:c="2"/>├── tailwind.config.js</text:span></text:p>
      <text:p text:style-name="Preformatted_20_Text"><text:span text:style-name="Source_20_Text">│ <text:s text:c="2"/>└── postcss.config.js</text:span></text:p>
      <text:p text:style-name="Preformatted_20_Text"><text:span text:style-name="Source_20_Text">│</text:span></text:p>
      <text:p text:style-name="Preformatted_20_Text"><text:span text:style-name="Source_20_Text">├── conecta_db.conf <text:s text:c="14"/># Configuração do banco</text:span></text:p>
      <text:p text:style-name="Preformatted_20_Text"><text:span text:style-name="Source_20_Text">├── estrutura_banco.sql <text:s text:c="10"/># Schema do banco</text:span></text:p>
      <text:p text:style-name="Preformatted_20_Text"><text:span text:style-name="Source_20_Text">├── backup_25_10_25 <text:s text:c="14"/># Backup do banco</text:span></text:p>
      <text:p text:style-name="Preformatted_20_Text"><text:span text:style-name="Source_20_Text">├── DOCUMENTACAO_BANCO_DADOS.md <text:s/># Doc do banco de dados</text:span></text:p>
      <text:p text:style-name="Preformatted_20_Text"><text:span text:style-name="Source_20_Text">├── DOCUMENTACAO_APLICACAO.md <text:s text:c="3"/># Esta documentação</text:span></text:p>
      <text:p text:style-name="P2"><text:span text:style-name="Source_20_Text">└── EXCLUSAO_SEGURA.md <text:s text:c="10"/># Doc sobre soft delete</text:span></text:p>
      <text:p text:style-name="Horizontal_20_Line"/>
      <text:h text:style-name="Heading_20_2" text:outline-level="2">⚙️ Funcionalidades</text:h>
      <text:h text:style-name="Heading_20_3" text:outline-level="3">1. Autenticação e Autorização</text:h>
      <text:h text:style-name="Heading_20_4" text:outline-level="4">Login</text:h>
      <text:list xml:id="list3614721605" text:style-name="L6">
        <text:list-item>
          <text:p text:style-name="P14">✅ Autenticação via email e senha </text:p>
        </text:list-item>
        <text:list-item>
          <text:p text:style-name="P14">✅ Geração de token JWT </text:p>
        </text:list-item>
        <text:list-item>
          <text:p text:style-name="P14">✅ Armazenamento seguro de senhas (bcrypt) </text:p>
        </text:list-item>
        <text:list-item>
          <text:p text:style-name="P13">✅ Sessão persistente (localStorage) </text:p>
        </text:list-item>
      </text:list>
      <text:h text:style-name="Heading_20_4" text:outline-level="4">Níveis de Acesso</text:h>
      <text:list xml:id="list2499652521" text:style-name="L7">
        <text:list-item>
          <text:p text:style-name="P16"><text:span text:style-name="Strong_20_Emphasis">Super Admin</text:span> (<text:span text:style-name="Source_20_Text">nivel_acesso_id = 1</text:span>): Acesso total a todas as empresas </text:p>
        </text:list-item>
        <text:list-item>
          <text:p text:style-name="P16"><text:span text:style-name="Strong_20_Emphasis">Admin Empresa</text:span>: Acesso total à sua empresa </text:p>
        </text:list-item>
        <text:list-item>
          <text:p text:style-name="P15"><text:span text:style-name="Strong_20_Emphasis">Usuário Normal</text:span>: Acesso limitado à sua empresa </text:p>
        </text:list-item>
      </text:list>
      <text:h text:style-name="Heading_20_3" text:outline-level="3">2. Dashboard</text:h>
      <text:h text:style-name="Heading_20_4" text:outline-level="4">Métricas Principais</text:h>
      <text:list xml:id="list4236622254" text:style-name="L8">
        <text:list-item>
          <text:p text:style-name="P18">📊 <text:span text:style-name="Strong_20_Emphasis">Agendamentos Hoje</text:span>: Quantidade de agendamentos do dia </text:p>
        </text:list-item>
        <text:list-item>
          <text:p text:style-name="P18">👥 <text:span text:style-name="Strong_20_Emphasis">Clientes Ativos</text:span>: Últimos 90 dias </text:p>
        </text:list-item>
        <text:list-item>
          <text:p text:style-name="P18">💼 <text:span text:style-name="Strong_20_Emphasis">Serviços Realizados</text:span>: Total do mês (excluindo cancelados) </text:p>
        </text:list-item>
        <text:list-item>
          <text:p text:style-name="P17">💰 <text:span text:style-name="Strong_20_Emphasis">Receita do Mês</text:span>: Soma dos valores dos agendamentos (excluindo cancelados) </text:p>
        </text:list-item>
      </text:list>
      <text:h text:style-name="Heading_20_4" text:outline-level="4">Gráfico de Agendamentos</text:h>
      <text:list xml:id="list354687393" text:style-name="L9">
        <text:list-item>
          <text:p text:style-name="P20">📈 <text:span text:style-name="Strong_20_Emphasis">Gráfico de Linhas</text:span>: Agendamentos vs Cancelamentos por dia do mês </text:p>
        </text:list-item>
        <text:list-item>
          <text:p text:style-name="P20">✨ <text:span text:style-name="Strong_20_Emphasis">Curvas Suaves</text:span>: Curvas Bézier para melhor visualização </text:p>
        </text:list-item>
        <text:list-item>
          <text:p text:style-name="P20">🎨 <text:span text:style-name="Strong_20_Emphasis">Responsivo</text:span>: Adapta-se ao tamanho da tela </text:p>
        </text:list-item>
        <text:list-item>
          <text:p text:style-name="P19">🖱️ <text:span text:style-name="Strong_20_Emphasis">Interativo</text:span>: Tooltips ao passar o mouse </text:p>
        </text:list-item>
      </text:list>
      <text:h text:style-name="Heading_20_4" text:outline-level="4">Listas</text:h>
      <text:list xml:id="list1543618152" text:style-name="L10">
        <text:list-item>
          <text:p text:style-name="P22">📅 <text:span text:style-name="Strong_20_Emphasis">Próximos Agendamentos</text:span>: Lista dos próximos agendamentos </text:p>
        </text:list-item>
        <text:list-item>
          <text:p text:style-name="P21">👨‍💼 <text:span text:style-name="Strong_20_Emphasis">Profissionais Hoje</text:span>: Profissionais com agendamentos hoje </text:p>
        </text:list-item>
      </text:list>
      <text:h text:style-name="Heading_20_4" text:outline-level="4">Dashboard Super Admin</text:h>
      <text:list xml:id="list2118222875" text:style-name="L11">
        <text:list-item>
          <text:p text:style-name="P24">📊 <text:span text:style-name="Strong_20_Emphasis">Estatísticas por Empresa</text:span>: Tabela agregada de todas as empresas </text:p>
        </text:list-item>
        <text:list-item>
          <text:p text:style-name="P23">🌐 <text:span text:style-name="Strong_20_Emphasis">Visão Global</text:span>: Métricas consolidadas de todo o sistema </text:p>
        </text:list-item>
      </text:list>
      <text:h text:style-name="Heading_20_3" text:outline-level="3">3. Gestão de Empresas</text:h>
      <text:h text:style-name="Heading_20_4" text:outline-level="4">Cadastro de Empresas</text:h>
      <text:list xml:id="list1857179986" text:style-name="L12">
        <text:list-item>
          <text:p text:style-name="P26">✅ Criação de nova empresa </text:p>
        </text:list-item>
        <text:list-item>
          <text:p text:style-name="P26">✅ Criação automática de usuário admin </text:p>
        </text:list-item>
        <text:list-item>
          <text:p text:style-name="P26">✅ Geração de senha aleatória </text:p>
        </text:list-item>
        <text:list-item>
          <text:p text:style-name="P25">✅ Transações atômicas (rollback em caso de erro) </text:p>
        </text:list-item>
      </text:list>
      <text:h text:style-name="Heading_20_4" text:outline-level="4">Listagem de Empresas</text:h>
      <text:list xml:id="list3218344408" text:style-name="L13">
        <text:list-item>
          <text:p text:style-name="P28">📋 <text:span text:style-name="Strong_20_Emphasis">Multi-Tenant</text:span>: Usuários normais veem apenas sua empresa </text:p>
        </text:list-item>
        <text:list-item>
          <text:p text:style-name="P28">🌐 <text:span text:style-name="Strong_20_Emphasis">Super Admin</text:span>: Vê todas as empresas </text:p>
        </text:list-item>
        <text:list-item>
          <text:p text:style-name="P27">🔍 <text:span text:style-name="Strong_20_Emphasis">Informações</text:span>: Nome, contato, endereço </text:p>
        </text:list-item>
      </text:list>
      <text:h text:style-name="Heading_20_3" text:outline-level="3">4. Wizard de Configuração Inicial</text:h>
      <text:p text:style-name="Text_20_body">O wizard guia novas empresas através de 7 etapas de configuração:</text:p>
      <text:h text:style-name="Heading_20_4" text:outline-level="4">Etapa 1: Configurações Básicas</text:h>
      <text:list xml:id="list2040663053" text:style-name="L14">
        <text:list-item>
          <text:p text:style-name="P30">📝 Antecedência mínima para agendamento </text:p>
        </text:list-item>
        <text:list-item>
          <text:p text:style-name="P29">⏱️ Intervalo entre agendamentos </text:p>
        </text:list-item>
      </text:list>
      <text:h text:style-name="Heading_20_4" text:outline-level="4">Etapa 2: Horários de Funcionamento</text:h>
      <text:list xml:id="list2666174081" text:style-name="L15">
        <text:list-item>
          <text:p text:style-name="P32">📅 Definição de horários por dia da semana </text:p>
        </text:list-item>
        <text:list-item>
          <text:p text:style-name="P32">⏰ Suporte a múltiplos períodos (ex: manhã e tarde) </text:p>
        </text:list-item>
        <text:list-item>
          <text:p text:style-name="P31">🍽️ Permite configurar horário de almoço </text:p>
        </text:list-item>
      </text:list>
      <text:h text:style-name="Heading_20_4" text:outline-level="4">Etapa 3: Profissionais</text:h>
      <text:list xml:id="list1775096071" text:style-name="L16">
        <text:list-item>
          <text:p text:style-name="P34">👤 Cadastro de profissionais </text:p>
        </text:list-item>
        <text:list-item>
          <text:p text:style-name="P34">📞 Nome, especialidade, contato </text:p>
        </text:list-item>
        <text:list-item>
          <text:p text:style-name="P33">🏠 Endereço (usa endereço da empresa) </text:p>
        </text:list-item>
      </text:list>
      <text:h text:style-name="Heading_20_4" text:outline-level="4">Etapa 4: Serviços</text:h>
      <text:list xml:id="list2427214252" text:style-name="L17">
        <text:list-item>
          <text:p text:style-name="P36">💼 Cadastro de serviços </text:p>
        </text:list-item>
        <text:list-item>
          <text:p text:style-name="P36">⏱️ Duração em minutos </text:p>
        </text:list-item>
        <text:list-item>
          <text:p text:style-name="P35">💰 Valor do serviço </text:p>
        </text:list-item>
      </text:list>
      <text:h text:style-name="Heading_20_4" text:outline-level="4">Etapa 5: Vínculos Profissional-Serviço</text:h>
      <text:list xml:id="list72942118" text:style-name="L18">
        <text:list-item>
          <text:p text:style-name="P38">🔗 Associação de serviços aos profissionais </text:p>
        </text:list-item>
        <text:list-item>
          <text:p text:style-name="P37">✅ Seleção múltipla </text:p>
        </text:list-item>
      </text:list>
      <text:h text:style-name="Heading_20_4" text:outline-level="4">Etapa 6: WhatsApp (Evolution API)</text:h>
      <text:list xml:id="list4007595227" text:style-name="L19">
        <text:list-item>
          <text:p text:style-name="P40">📱 Configuração da instância WhatsApp </text:p>
        </text:list-item>
        <text:list-item>
          <text:p text:style-name="P40">🔑 UUID da instância Evolution API </text:p>
        </text:list-item>
        <text:list-item>
          <text:p text:style-name="P39">📝 Nome amigável da instância </text:p>
        </text:list-item>
      </text:list>
      <text:h text:style-name="Heading_20_4" text:outline-level="4">Etapa 7: Revisão</text:h>
      <text:list xml:id="list3419160652" text:style-name="L20">
        <text:list-item>
          <text:p text:style-name="P42">👁️ Visualização de todas as configurações </text:p>
        </text:list-item>
        <text:list-item>
          <text:p text:style-name="P41">✅ Confirmação e salvamento </text:p>
        </text:list-item>
      </text:list>
      <text:h text:style-name="Heading_20_3" text:outline-level="3">5. Configurações da Empresa</text:h>
      <text:p text:style-name="Text_20_body">Permite editar todas as informações configuradas no wizard:</text:p>
      <text:h text:style-name="Heading_20_4" text:outline-level="4">Aba Empresa</text:h>
      <text:list xml:id="list4144265288" text:style-name="L21">
        <text:list-item>
          <text:p text:style-name="P44">✏️ Nome, contato, observações </text:p>
        </text:list-item>
        <text:list-item>
          <text:p text:style-name="P44">📍 Endereço completo (CEP, logradouro, número, bairro, cidade, UF) </text:p>
        </text:list-item>
        <text:list-item>
          <text:p text:style-name="P43">📞 Contato do agente </text:p>
        </text:list-item>
      </text:list>
      <text:h text:style-name="Heading_20_4" text:outline-level="4">Aba Agendamentos</text:h>
      <text:list xml:id="list1144772435" text:style-name="L22">
        <text:list-item>
          <text:p text:style-name="P46">⏱️ Antecedência mínima </text:p>
        </text:list-item>
        <text:list-item>
          <text:p text:style-name="P46">⏱️ Intervalo entre agendamentos </text:p>
        </text:list-item>
        <text:list-item>
          <text:p text:style-name="P46">📅 Horários de funcionamento (editável) </text:p>
        </text:list-item>
        <text:list-item>
          <text:p text:style-name="P45">➕ Adicionar múltiplos períodos por dia </text:p>
        </text:list-item>
      </text:list>
      <text:h text:style-name="Heading_20_4" text:outline-level="4">Aba WhatsApp</text:h>
      <text:list xml:id="list3789695666" text:style-name="L23">
        <text:list-item>
          <text:p text:style-name="P48">🔑 UUID da instância </text:p>
        </text:list-item>
        <text:list-item>
          <text:p text:style-name="P48">📝 Nome da instância </text:p>
        </text:list-item>
        <text:list-item>
          <text:p text:style-name="P47">⚠️ Alerta ao editar (pode afetar funcionamento) </text:p>
        </text:list-item>
      </text:list>
      <text:h text:style-name="Heading_20_4" text:outline-level="4">Aba Profissionais</text:h>
      <text:list xml:id="list3041956981" text:style-name="L24">
        <text:list-item>
          <text:p text:style-name="P50">📋 Lista de profissionais </text:p>
        </text:list-item>
        <text:list-item>
          <text:p text:style-name="P50">✏️ Editar nome, especialidade, contato </text:p>
        </text:list-item>
        <text:list-item>
          <text:p text:style-name="P49">🗑️ Excluir profissional (com validações) </text:p>
        </text:list-item>
      </text:list>
      <text:h text:style-name="Heading_20_4" text:outline-level="4">Aba Serviços</text:h>
      <text:list xml:id="list523483448" text:style-name="L25">
        <text:list-item>
          <text:p text:style-name="P52">📋 Lista de serviços </text:p>
        </text:list-item>
        <text:list-item>
          <text:p text:style-name="P52">✏️ Editar nome, valor, duração </text:p>
        </text:list-item>
        <text:list-item>
          <text:p text:style-name="P52">🔗 Vincular/desvincular profissionais </text:p>
        </text:list-item>
        <text:list-item>
          <text:p text:style-name="P52">➕ Adicionar novos serviços </text:p>
        </text:list-item>
        <text:list-item>
          <text:p text:style-name="P51">🗑️ Excluir serviço (soft delete) </text:p>
        </text:list-item>
      </text:list>
      <text:h text:style-name="Heading_20_3" text:outline-level="3">6. Exclusão Segura (Soft Delete)</text:h>
      <text:h text:style-name="Heading_20_4" text:outline-level="4"><text:soft-page-break/>Serviços</text:h>
      <text:list xml:id="list164107367" text:style-name="L26">
        <text:list-item>
          <text:p text:style-name="P54">✅ Soft delete: altera <text:span text:style-name="Source_20_Text">status</text:span> para 'inativo' </text:p>
        </text:list-item>
        <text:list-item>
          <text:p text:style-name="P54">✅ Mantém histórico para relatórios </text:p>
        </text:list-item>
        <text:list-item>
          <text:p text:style-name="P53">✅ Não aparece mais nas listagens ativas </text:p>
        </text:list-item>
      </text:list>
      <text:h text:style-name="Heading_20_4" text:outline-level="4">Profissionais</text:h>
      <text:list xml:id="list62126841" text:style-name="L27">
        <text:list-item>
          <text:p text:style-name="P56">✅ Soft delete: altera <text:span text:style-name="Source_20_Text">status</text:span> para 'inativo' </text:p>
        </text:list-item>
        <text:list-item>
          <text:p text:style-name="P56">⚠️ Validação: não permite excluir se houver serviços ativos vinculados </text:p>
        </text:list-item>
        <text:list-item>
          <text:p text:style-name="P56">⚠️ Validação: não permite excluir se houver agendamentos históricos </text:p>
        </text:list-item>
        <text:list-item>
          <text:p text:style-name="P55">✅ Preserva integridade referencial </text:p>
        </text:list-item>
      </text:list>
      <text:h text:style-name="Heading_20_3" text:outline-level="3">7. Integrações</text:h>
      <text:h text:style-name="Heading_20_4" text:outline-level="4">WhatsApp (Evolution API)</text:h>
      <text:list xml:id="list2861369297" text:style-name="L28">
        <text:list-item>
          <text:p text:style-name="P58">📱 Comunicação automatizada com clientes </text:p>
        </text:list-item>
        <text:list-item>
          <text:p text:style-name="P58">🤖 IA para processamento de mensagens </text:p>
        </text:list-item>
        <text:list-item>
          <text:p text:style-name="P57">🔑 Identificação de empresa por <text:span text:style-name="Source_20_Text">instancia_id</text:span> </text:p>
        </text:list-item>
      </text:list>
      <text:h text:style-name="Heading_20_4" text:outline-level="4">Google Calendar</text:h>
      <text:list xml:id="list2138606693" text:style-name="L29">
        <text:list-item>
          <text:p text:style-name="P60">📅 Sincronização de agendamentos </text:p>
        </text:list-item>
        <text:list-item>
          <text:p text:style-name="P60">🔄 Atualização automática </text:p>
        </text:list-item>
        <text:list-item>
          <text:p text:style-name="P59">🔗 Link para evento no calendário </text:p>
        </text:list-item>
      </text:list>
      <text:p text:style-name="Horizontal_20_Line"/>
      <text:h text:style-name="Heading_20_2" text:outline-level="2">🔄 Fluxos de Trabalho</text:h>
      <text:h text:style-name="Heading_20_3" text:outline-level="3">Fluxo de Login</text:h>
      <text:p text:style-name="Preformatted_20_Text"><text:span text:style-name="Source_20_Text">1. Usuário acessa /login</text:span></text:p>
      <text:p text:style-name="Preformatted_20_Text"><text:span text:style-name="Source_20_Text">2. Insere email e senha</text:span></text:p>
      <text:p text:style-name="Preformatted_20_Text"><text:span text:style-name="Source_20_Text">3. Frontend envia POST /api/auth/login</text:span></text:p>
      <text:p text:style-name="Preformatted_20_Text"><text:span text:style-name="Source_20_Text">4. Backend valida credenciais</text:span></text:p>
      <text:p text:style-name="Preformatted_20_Text"><text:span text:style-name="Source_20_Text">5. Backend gera token JWT</text:span></text:p>
      <text:p text:style-name="Preformatted_20_Text"><text:span text:style-name="Source_20_Text">6. Backend retorna: { token, user: { id, nome, email, empresa_id, nivel_acesso_id } }</text:span></text:p>
      <text:p text:style-name="Preformatted_20_Text"><text:span text:style-name="Source_20_Text">7. Frontend armazena token e user no localStorage</text:span></text:p>
      <text:p text:style-name="P2"><text:span text:style-name="Source_20_Text">8. Frontend redireciona para /dashboard</text:span></text:p>
      <text:h text:style-name="Heading_20_3" text:outline-level="3">Fluxo de Cadastro de Nova Empresa</text:h>
      <text:p text:style-name="Preformatted_20_Text"><text:span text:style-name="Source_20_Text">1. Super Admin acessa /empresas</text:span></text:p>
      <text:p text:style-name="Preformatted_20_Text"><text:span text:style-name="Source_20_Text">2. Clica em "Nova Empresa"</text:span></text:p>
      <text:p text:style-name="Preformatted_20_Text"><text:span text:style-name="Source_20_Text">3. Preenche formulário (nome, email admin, etc.)</text:span></text:p>
      <text:p text:style-name="Preformatted_20_Text"><text:span text:style-name="Source_20_Text">4. Frontend envia POST /api/empresas</text:span></text:p>
      <text:p text:style-name="Preformatted_20_Text"><text:span text:style-name="Source_20_Text">5. Backend inicia transação</text:span></text:p>
      <text:p text:style-name="Preformatted_20_Text"><text:span text:style-name="Source_20_Text">6. Backend cria registro em 'empresa'</text:span></text:p>
      <text:p text:style-name="Preformatted_20_Text"><text:span text:style-name="Source_20_Text">7. Backend cria registro em 'endereco'</text:span></text:p>
      <text:p text:style-name="Preformatted_20_Text"><text:span text:style-name="Source_20_Text">8. Backend cria usuário admin em 'login'</text:span></text:p>
      <text:p text:style-name="Preformatted_20_Text"><text:span text:style-name="Source_20_Text">9. Backend gera senha aleatória</text:span></text:p>
      <text:p text:style-name="Preformatted_20_Text"><text:span text:style-name="Source_20_Text">10. Backend faz commit da transação</text:span></text:p>
      <text:p text:style-name="Preformatted_20_Text"><text:span text:style-name="Source_20_Text">11. Backend retorna empresa e senha gerada</text:span></text:p>
      <text:p text:style-name="P2"><text:span text:style-name="Source_20_Text">12. Frontend exibe senha para o admin copiar</text:span></text:p>
      <text:h text:style-name="Heading_20_3" text:outline-level="3">Fluxo do Wizard de Configuração</text:h>
      <text:p text:style-name="Preformatted_20_Text"><text:span text:style-name="Source_20_Text">1. Novo admin faz login pela primeira vez</text:span></text:p>
      <text:p text:style-name="Preformatted_20_Text"><text:span text:style-name="Source_20_Text">2. Sistema detecta wizard não completado</text:span></text:p>
      <text:p text:style-name="Preformatted_20_Text"><text:span text:style-name="Source_20_Text">3. Redireciona para /wizard</text:span></text:p>
      <text:p text:style-name="Preformatted_20_Text"><text:span text:style-name="Source_20_Text">4. Admin passa pelas 7 etapas:</text:span></text:p>
      <text:p text:style-name="Preformatted_20_Text"><text:span text:style-name="Source_20_Text"><text:s text:c="3"/>- Etapa 1: Configurações básicas</text:span></text:p>
      <text:p text:style-name="Preformatted_20_Text"><text:span text:style-name="Source_20_Text"><text:s text:c="3"/>- Etapa 2: Horários de funcionamento</text:span></text:p>
      <text:p text:style-name="Preformatted_20_Text"><text:span text:style-name="Source_20_Text"><text:s text:c="3"/>- Etapa 3: Cadastro de profissionais</text:span></text:p>
      <text:p text:style-name="Preformatted_20_Text"><text:span text:style-name="Source_20_Text"><text:s text:c="3"/>- Etapa 4: Cadastro de serviços</text:span></text:p>
      <text:p text:style-name="Preformatted_20_Text"><text:span text:style-name="Source_20_Text"><text:s text:c="3"/>- Etapa 5: Vínculos profissional-serviço</text:span></text:p>
      <text:p text:style-name="Preformatted_20_Text"><text:span text:style-name="Source_20_Text"><text:s text:c="3"/>- Etapa 6: Instância WhatsApp</text:span></text:p>
      <text:p text:style-name="Preformatted_20_Text"><text:span text:style-name="Source_20_Text"><text:s text:c="3"/>- Etapa 7: Revisão</text:span></text:p>
      <text:p text:style-name="Preformatted_20_Text"><text:span text:style-name="Source_20_Text">5. Ao finalizar, envia POST /api/wizard/completar</text:span></text:p>
      <text:p text:style-name="Preformatted_20_Text"><text:span text:style-name="Source_20_Text">6. Backend salva todas as configurações em transação</text:span></text:p>
      <text:p text:style-name="Preformatted_20_Text"><text:span text:style-name="Source_20_Text">7. Backend marca wizard como completo</text:span></text:p>
      <text:p text:style-name="P2"><text:span text:style-name="Source_20_Text">8. Frontend redireciona para /dashboard</text:span></text:p>
      <text:h text:style-name="Heading_20_3" text:outline-level="3">Fluxo de Agendamento via WhatsApp</text:h>
      <text:p text:style-name="Preformatted_20_Text"><text:span text:style-name="Source_20_Text">1. Cliente envia mensagem WhatsApp</text:span></text:p>
      <text:p text:style-name="Preformatted_20_Text"><text:span text:style-name="Source_20_Text">2. Evolution API recebe mensagem</text:span></text:p>
      <text:p text:style-name="Preformatted_20_Text"><text:span text:style-name="Source_20_Text">3. Evolution API envia para o backend</text:span></text:p>
      <text:p text:style-name="Preformatted_20_Text"><text:span text:style-name="Source_20_Text">4. Backend identifica empresa por instancia_id</text:span></text:p>
      <text:p text:style-name="Preformatted_20_Text"><text:span text:style-name="Source_20_Text">5. Backend busca contexto da sessão</text:span></text:p>
      <text:p text:style-name="Preformatted_20_Text"><text:span text:style-name="Source_20_Text">6. Backend envia para IA processar</text:span></text:p>
      <text:p text:style-name="Preformatted_20_Text"><text:span text:style-name="Source_20_Text">7. IA interpreta intenção (agendar, cancelar, etc.)</text:span></text:p>
      <text:p text:style-name="Preformatted_20_Text"><text:span text:style-name="Source_20_Text">8. Backend valida disponibilidade</text:span></text:p>
      <text:p text:style-name="Preformatted_20_Text"><text:span text:style-name="Source_20_Text">9. Backend cria agendamento</text:span></text:p>
      <text:p text:style-name="Preformatted_20_Text"><text:span text:style-name="Source_20_Text">10. Backend cria evento no Google Calendar</text:span></text:p>
      <text:p text:style-name="Preformatted_20_Text"><text:span text:style-name="Source_20_Text">11. Backend gera protocolo único</text:span></text:p>
      <text:p text:style-name="P2"><text:span text:style-name="Source_20_Text">12. Backend envia confirmação via WhatsApp</text:span></text:p>
      <text:p text:style-name="Horizontal_20_Line"/>
      <text:h text:style-name="Heading_20_2" text:outline-level="2">🔌 API Backend</text:h>
      <text:h text:style-name="Heading_20_3" text:outline-level="3">Estrutura Base</text:h>
      <text:p text:style-name="Text_20_body"><text:span text:style-name="Strong_20_Emphasis">Base URL</text:span>: <text:span text:style-name="Source_20_Text">http://localhost:3001/api</text:span></text:p>
      <text:p text:style-name="Text_20_body"><text:span text:style-name="Strong_20_Emphasis">Headers Padrão</text:span>:</text:p>
      <text:p text:style-name="Preformatted_20_Text"><text:span text:style-name="Source_20_Text">{</text:span></text:p>
      <text:p text:style-name="Preformatted_20_Text"><text:span text:style-name="Source_20_Text"><text:s text:c="2"/>"Content-Type": "application/json",</text:span></text:p>
      <text:p text:style-name="Preformatted_20_Text"><text:span text:style-name="Source_20_Text"><text:s text:c="2"/>"Authorization": "Bearer &lt;token_jwt&gt;"</text:span></text:p>
      <text:p text:style-name="P2"><text:span text:style-name="Source_20_Text">}</text:span></text:p>
      <text:h text:style-name="Heading_20_3" text:outline-level="3">Endpoints de Autenticação</text:h>
      <text:h text:style-name="Heading_20_4" text:outline-level="4">POST /api/auth/login</text:h>
      <text:p text:style-name="Text_20_body">Realiza login do usuário.</text:p>
      <text:p text:style-name="Text_20_body"><text:span text:style-name="Strong_20_Emphasis">Request</text:span>:</text:p>
      <text:p text:style-name="Preformatted_20_Text"><text:span text:style-name="Source_20_Text">{</text:span></text:p>
      <text:p text:style-name="Preformatted_20_Text"><text:span text:style-name="Source_20_Text"><text:s text:c="2"/>"email": "admin@empresa.com",</text:span></text:p>
      <text:p text:style-name="Preformatted_20_Text"><text:span text:style-name="Source_20_Text"><text:s text:c="2"/>"senha": "senha123"</text:span></text:p>
      <text:p text:style-name="P2"><text:span text:style-name="Source_20_Text">}</text:span>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token": "eyJhbGciOiJIUzI1NiIsInR5cCI6IkpXVCJ9...",</text:span></text:p>
      <text:p text:style-name="Preformatted_20_Text"><text:span text:style-name="Source_20_Text"><text:s text:c="2"/>"user": {</text:span></text:p>
      <text:p text:style-name="Preformatted_20_Text"><text:span text:style-name="Source_20_Text"><text:s text:c="4"/>"id": "uuid",</text:span></text:p>
      <text:p text:style-name="Preformatted_20_Text"><text:span text:style-name="Source_20_Text"><text:s text:c="4"/>"nome": "Administrador",</text:span></text:p>
      <text:p text:style-name="Preformatted_20_Text"><text:span text:style-name="Source_20_Text"><text:s text:c="4"/>"email": "admin@empresa.com",</text:span></text:p>
      <text:p text:style-name="Preformatted_20_Text"><text:span text:style-name="Source_20_Text"><text:s text:c="4"/>"empresa_id": "uuid",</text:span></text:p>
      <text:p text:style-name="Preformatted_20_Text"><text:span text:style-name="Source_20_Text"><text:s text:c="4"/>"nivel_acesso_id": 1</text:span></text:p>
      <text:p text:style-name="Preformatted_20_Text"><text:span text:style-name="Source_20_Text"><text:s text:c="2"/>}</text:span></text:p>
      <text:p text:style-name="P2"><text:span text:style-name="Source_20_Text">}</text:span></text:p>
      <text:p text:style-name="Text_20_body"><text:span text:style-name="Strong_20_Emphasis">Response Error (401)</text:span>:</text:p>
      <text:p text:style-name="Preformatted_20_Text"><text:span text:style-name="Source_20_Text">{</text:span></text:p>
      <text:p text:style-name="Preformatted_20_Text"><text:span text:style-name="Source_20_Text"><text:s text:c="2"/>"success": false,</text:span></text:p>
      <text:p text:style-name="Preformatted_20_Text"><text:span text:style-name="Source_20_Text"><text:s text:c="2"/>"message": "Email ou senha inválidos"</text:span></text:p>
      <text:p text:style-name="P2"><text:span text:style-name="Source_20_Text">}</text:span></text:p>
      <text:h text:style-name="Heading_20_4" text:outline-level="4">GET /api/auth/me</text:h>
      <text:p text:style-name="Text_20_body">Retorna dados do usuário autenticado.</text:p>
      <text:p text:style-name="Text_20_body"><text:span text:style-name="Strong_20_Emphasis">Headers</text:span>: <text:span text:style-name="Source_20_Text">Authorization: Bearer &lt;token&gt;</text:span>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user": {</text:span></text:p>
      <text:p text:style-name="Preformatted_20_Text"><text:span text:style-name="Source_20_Text"><text:s text:c="4"/>"id": "uuid",</text:span></text:p>
      <text:p text:style-name="Preformatted_20_Text"><text:span text:style-name="Source_20_Text"><text:s text:c="4"/>"nome": "Administrador",</text:span></text:p>
      <text:p text:style-name="Preformatted_20_Text"><text:span text:style-name="Source_20_Text"><text:s text:c="4"/>"email": "admin@empresa.com",</text:span></text:p>
      <text:p text:style-name="Preformatted_20_Text"><text:span text:style-name="Source_20_Text"><text:s text:c="4"/>"empresa_id": "uuid",</text:span></text:p>
      <text:p text:style-name="Preformatted_20_Text"><text:span text:style-name="Source_20_Text"><text:s text:c="4"/>"nivel_acesso_id": 1</text:span></text:p>
      <text:p text:style-name="Preformatted_20_Text"><text:span text:style-name="Source_20_Text"><text:s text:c="2"/>}</text:span></text:p>
      <text:p text:style-name="P2"><text:span text:style-name="Source_20_Text">}</text:span></text:p>
      <text:h text:style-name="Heading_20_3" text:outline-level="3">Endpoints de Dashboard</text:h>
      <text:h text:style-name="Heading_20_4" text:outline-level="4">GET /api/dashboard/stats</text:h>
      <text:p text:style-name="Text_20_body">Retorna estatísticas do dashboard.</text:p>
      <text:p text:style-name="Text_20_body"><text:span text:style-name="Strong_20_Emphasis">Query Params</text:span>: Nenhum (usa empresa_id do token JWT)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data": {</text:span></text:p>
      <text:p text:style-name="Preformatted_20_Text"><text:span text:style-name="Source_20_Text"><text:s text:c="4"/>"agendamentosHoje": 5,</text:span></text:p>
      <text:p text:style-name="Preformatted_20_Text"><text:span text:style-name="Source_20_Text"><text:s text:c="4"/>"clientesAtivos": 23,</text:span></text:p>
      <text:p text:style-name="Preformatted_20_Text"><text:span text:style-name="Source_20_Text"><text:s text:c="4"/>"servicosRealizados": 25,</text:span></text:p>
      <text:p text:style-name="Preformatted_20_Text"><text:span text:style-name="Source_20_Text"><text:s text:c="4"/>"receitaMes": 1455.00</text:span></text:p>
      <text:p text:style-name="Preformatted_20_Text"><text:span text:style-name="Source_20_Text"><text:s text:c="2"/>}</text:span></text:p>
      <text:p text:style-name="P2"><text:span text:style-name="Source_20_Text">}</text:span></text:p>
      <text:h text:style-name="Heading_20_4" text:outline-level="4">GET /api/dashboard/proximos-agendamentos</text:h>
      <text:p text:style-name="Text_20_body">Retorna próximos agendamentos.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data": [</text:span></text:p>
      <text:p text:style-name="Preformatted_20_Text"><text:soft-page-break/><text:span text:style-name="Source_20_Text"><text:s text:c="4"/>{</text:span></text:p>
      <text:p text:style-name="Preformatted_20_Text"><text:span text:style-name="Source_20_Text"><text:s text:c="6"/>"agend_id": "uuid",</text:span></text:p>
      <text:p text:style-name="Preformatted_20_Text"><text:span text:style-name="Source_20_Text"><text:s text:c="6"/>"agend_data": "2025-10-26",</text:span></text:p>
      <text:p text:style-name="Preformatted_20_Text"><text:span text:style-name="Source_20_Text"><text:s text:c="6"/>"agend_hora": "09:00:00",</text:span></text:p>
      <text:p text:style-name="Preformatted_20_Text"><text:span text:style-name="Source_20_Text"><text:s text:c="6"/>"cliente_nome": "Pamela Moraes",</text:span></text:p>
      <text:p text:style-name="Preformatted_20_Text"><text:span text:style-name="Source_20_Text"><text:s text:c="6"/>"servicos_nome": "Pedicure",</text:span></text:p>
      <text:p text:style-name="Preformatted_20_Text"><text:span text:style-name="Source_20_Text"><text:s text:c="6"/>"status_agend_nome": "Confirmado",</text:span></text:p>
      <text:p text:style-name="Preformatted_20_Text"><text:span text:style-name="Source_20_Text"><text:s text:c="6"/>"empresa_nome": "Espaço Pamela Moraes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2"><text:span text:style-name="Source_20_Text">}</text:span></text:p>
      <text:h text:style-name="Heading_20_4" text:outline-level="4">GET /api/dashboard/profissionais-hoje</text:h>
      <text:p text:style-name="Text_20_body">Retorna profissionais com agendamentos hoje.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data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profissional_id": "uuid",</text:span></text:p>
      <text:p text:style-name="Preformatted_20_Text"><text:span text:style-name="Source_20_Text"><text:s text:c="6"/>"profissional_nome": "Julia Fane",</text:span></text:p>
      <text:p text:style-name="Preformatted_20_Text"><text:span text:style-name="Source_20_Text"><text:s text:c="6"/>"profissional_especialidade": "Cabeleireira e maquiadora",</text:span></text:p>
      <text:p text:style-name="Preformatted_20_Text"><text:span text:style-name="Source_20_Text"><text:s text:c="6"/>"total_agendamentos": 1,</text:span></text:p>
      <text:p text:style-name="Preformatted_20_Text"><text:span text:style-name="Source_20_Text"><text:s text:c="6"/>"empresa_nome": "Espaço Pamela Moraes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2"><text:span text:style-name="Source_20_Text">}</text:span></text:p>
      <text:h text:style-name="Heading_20_4" text:outline-level="4">GET /api/dashboard/grafico-agendamentos</text:h>
      <text:p text:style-name="Text_20_body">Retorna dados para o gráfico de agendamentos do mês.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data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data": "2025-10-01",</text:span></text:p>
      <text:p text:style-name="Preformatted_20_Text"><text:span text:style-name="Source_20_Text"><text:s text:c="6"/>"dia": 1,</text:span></text:p>
      <text:p text:style-name="Preformatted_20_Text"><text:span text:style-name="Source_20_Text"><text:s text:c="6"/>"agendamentos": 1,</text:span></text:p>
      <text:p text:style-name="Preformatted_20_Text"><text:span text:style-name="Source_20_Text"><text:s text:c="6"/>"cancelamentos": 1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data": "2025-10-02",</text:span></text:p>
      <text:p text:style-name="Preformatted_20_Text"><text:span text:style-name="Source_20_Text"><text:s text:c="6"/>"dia": 2,</text:span></text:p>
      <text:p text:style-name="Preformatted_20_Text"><text:span text:style-name="Source_20_Text"><text:s text:c="6"/>"agendamentos": 1,</text:span></text:p>
      <text:p text:style-name="Preformatted_20_Text"><text:span text:style-name="Source_20_Text"><text:s text:c="6"/>"cancelamentos": 2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2"><text:span text:style-name="Source_20_Text">}</text:span></text:p>
      <text:h text:style-name="Heading_20_4" text:outline-level="4">GET /api/dashboard/estatisticas-por-empresa</text:h>
      <text:p text:style-name="Text_20_body">Retorna estatísticas agregadas por empresa (Super Admin apenas).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data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empresa_nome": "Espaço Pamela Moraes",</text:span></text:p>
      <text:p text:style-name="Preformatted_20_Text"><text:span text:style-name="Source_20_Text"><text:s text:c="6"/>"agendamentos_hoje": 1,</text:span></text:p>
      <text:p text:style-name="Preformatted_20_Text"><text:span text:style-name="Source_20_Text"><text:s text:c="6"/>"clientes_ativos": 23,</text:span></text:p>
      <text:p text:style-name="Preformatted_20_Text"><text:span text:style-name="Source_20_Text"><text:s text:c="6"/>"servicos_realizados": 25,</text:span></text:p>
      <text:p text:style-name="Preformatted_20_Text"><text:span text:style-name="Source_20_Text"><text:s text:c="6"/>"receita_mes": 1455.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2"><text:span text:style-name="Source_20_Text">}</text:span></text:p>
      <text:h text:style-name="Heading_20_3" text:outline-level="3">Endpoints de Empresas</text:h>
      <text:h text:style-name="Heading_20_4" text:outline-level="4">GET /api/empresas</text:h>
      <text:p text:style-name="Text_20_body">Lista empresas (filtrado por permissão).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data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empresa_id": "uuid",</text:span></text:p>
      <text:p text:style-name="Preformatted_20_Text"><text:span text:style-name="Source_20_Text"><text:s text:c="6"/>"empresa_nome": "Espaço Pamela Moraes",</text:span></text:p>
      <text:p text:style-name="Preformatted_20_Text"><text:span text:style-name="Source_20_Text"><text:s text:c="6"/>"empresa_contato": "35999999999",</text:span></text:p>
      <text:p text:style-name="Preformatted_20_Text"><text:span text:style-name="Source_20_Text"><text:s text:c="6"/>"cep": "35573356",</text:span></text:p>
      <text:p text:style-name="Preformatted_20_Text"><text:span text:style-name="Source_20_Text"><text:s text:c="6"/>"logradouro": "Rua Exemplo",</text:span></text:p>
      <text:p text:style-name="Preformatted_20_Text"><text:span text:style-name="Source_20_Text"><text:s text:c="6"/>"numero": "123",</text:span></text:p>
      <text:p text:style-name="Preformatted_20_Text"><text:span text:style-name="Source_20_Text"><text:s text:c="6"/>"bairro": "Centro",</text:span></text:p>
      <text:p text:style-name="Preformatted_20_Text"><text:span text:style-name="Source_20_Text"><text:s text:c="6"/>"cidade": "Formiga",</text:span></text:p>
      <text:p text:style-name="Preformatted_20_Text"><text:span text:style-name="Source_20_Text"><text:s text:c="6"/>"uf": "MG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2"><text:span text:style-name="Source_20_Text">}</text:span></text:p>
      <text:h text:style-name="Heading_20_4" text:outline-level="4">POST /api/empresas</text:h>
      <text:p text:style-name="Text_20_body">Cria nova empresa (Super Admin apenas).</text:p>
      <text:p text:style-name="Text_20_body"><text:span text:style-name="Strong_20_Emphasis">Request</text:span>:</text:p>
      <text:p text:style-name="Preformatted_20_Text"><text:span text:style-name="Source_20_Text">{</text:span></text:p>
      <text:p text:style-name="Preformatted_20_Text"><text:span text:style-name="Source_20_Text"><text:s text:c="2"/>"empresa_nome": "Nova Empresa",</text:span></text:p>
      <text:p text:style-name="Preformatted_20_Text"><text:span text:style-name="Source_20_Text"><text:s text:c="2"/>"empresa_contato": "35999999999",</text:span></text:p>
      <text:p text:style-name="Preformatted_20_Text"><text:span text:style-name="Source_20_Text"><text:s text:c="2"/>"cep": "35573356",</text:span></text:p>
      <text:p text:style-name="Preformatted_20_Text"><text:span text:style-name="Source_20_Text"><text:s text:c="2"/>"logradouro": "Rua Exemplo",</text:span></text:p>
      <text:p text:style-name="Preformatted_20_Text"><text:span text:style-name="Source_20_Text"><text:s text:c="2"/>"numero": "123",</text:span></text:p>
      <text:p text:style-name="Preformatted_20_Text"><text:span text:style-name="Source_20_Text"><text:s text:c="2"/>"bairro": "Centro",</text:span></text:p>
      <text:p text:style-name="Preformatted_20_Text"><text:span text:style-name="Source_20_Text"><text:s text:c="2"/>"cidade": "Formiga",</text:span></text:p>
      <text:p text:style-name="Preformatted_20_Text"><text:span text:style-name="Source_20_Text"><text:s text:c="2"/>"uf": "MG",</text:span></text:p>
      <text:p text:style-name="Preformatted_20_Text"><text:span text:style-name="Source_20_Text"><text:s text:c="2"/>"admin_nome": "Admin Nome",</text:span></text:p>
      <text:p text:style-name="Preformatted_20_Text"><text:span text:style-name="Source_20_Text"><text:s text:c="2"/>"admin_email": "admin@novaempresa.com"</text:span></text:p>
      <text:p text:style-name="P2"><text:span text:style-name="Source_20_Text">}</text:span></text:p>
      <text:p text:style-name="Text_20_body"><text:span text:style-name="Strong_20_Emphasis">Response Success (201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message": "Empresa criada com sucesso",</text:span></text:p>
      <text:p text:style-name="Preformatted_20_Text"><text:span text:style-name="Source_20_Text"><text:s text:c="2"/>"data": {</text:span></text:p>
      <text:p text:style-name="Preformatted_20_Text"><text:span text:style-name="Source_20_Text"><text:s text:c="4"/>"empresa_id": "uuid",</text:span></text:p>
      <text:p text:style-name="Preformatted_20_Text"><text:span text:style-name="Source_20_Text"><text:s text:c="4"/>"senha_admin": "SenhaGerada123"</text:span></text:p>
      <text:p text:style-name="Preformatted_20_Text"><text:span text:style-name="Source_20_Text"><text:s text:c="2"/>}</text:span></text:p>
      <text:p text:style-name="P2"><text:span text:style-name="Source_20_Text">}</text:span></text:p>
      <text:h text:style-name="Heading_20_3" text:outline-level="3">Endpoints do Wizard</text:h>
      <text:h text:style-name="Heading_20_4" text:outline-level="4">GET /api/wizard/status</text:h>
      <text:p text:style-name="Text_20_body">Verifica se o wizard foi completado.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completed": false</text:span></text:p>
      <text:p text:style-name="P2"><text:span text:style-name="Source_20_Text">}</text:span></text:p>
      <text:h text:style-name="Heading_20_4" text:outline-level="4">GET /api/wizard/empresa</text:h>
      <text:p text:style-name="Text_20_body">Retorna dados completos da empresa para o wizard.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data": {</text:span></text:p>
      <text:p text:style-name="Preformatted_20_Text"><text:span text:style-name="Source_20_Text"><text:s text:c="4"/>"empresa": {</text:span></text:p>
      <text:p text:style-name="Preformatted_20_Text"><text:span text:style-name="Source_20_Text"><text:s text:c="6"/>"empresa_id": "uuid",</text:span></text:p>
      <text:p text:style-name="Preformatted_20_Text"><text:span text:style-name="Source_20_Text"><text:s text:c="6"/>"empresa_nome": "Espaço Pamela Moraes",</text:span></text:p>
      <text:p text:style-name="Preformatted_20_Text"><text:span text:style-name="Source_20_Text"><text:s text:c="6"/>"antecedencia_minima": 60,</text:span></text:p>
      <text:p text:style-name="Preformatted_20_Text"><text:span text:style-name="Source_20_Text"><text:s text:c="6"/>"intervalo_agendamentos": 15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horario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dia_semana": 1,</text:span></text:p>
      <text:p text:style-name="Preformatted_20_Text"><text:span text:style-name="Source_20_Text"><text:s text:c="8"/>"hora_inicio": "08:00:00",</text:span></text:p>
      <text:p text:style-name="Preformatted_20_Text"><text:span text:style-name="Source_20_Text"><text:s text:c="8"/>"hora_fim": "12:00:00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profissionai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profissional_id": "uuid",</text:span></text:p>
      <text:p text:style-name="Preformatted_20_Text"><text:span text:style-name="Source_20_Text"><text:s text:c="8"/>"profissional_nome": "Julia Fane",</text:span></text:p>
      <text:p text:style-name="Preformatted_20_Text"><text:span text:style-name="Source_20_Text"><text:s text:c="8"/>"especialidade": "Cabeleireira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,</text:span></text:p>
      <text:p text:style-name="Preformatted_20_Text"><text:soft-page-break/><text:span text:style-name="Source_20_Text"><text:s text:c="4"/>"servico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servicos_id": "uuid",</text:span></text:p>
      <text:p text:style-name="Preformatted_20_Text"><text:span text:style-name="Source_20_Text"><text:s text:c="8"/>"servicos_nome": "Corte de Cabelo",</text:span></text:p>
      <text:p text:style-name="Preformatted_20_Text"><text:span text:style-name="Source_20_Text"><text:s text:c="8"/>"servicos_valor": 50.00,</text:span></text:p>
      <text:p text:style-name="Preformatted_20_Text"><text:span text:style-name="Source_20_Text"><text:s text:c="8"/>"servicos_duracao_minutos": 60,</text:span></text:p>
      <text:p text:style-name="Preformatted_20_Text"><text:span text:style-name="Source_20_Text"><text:s text:c="8"/>"profissionais_ids": ["uuid1", "uuid2"]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instancia": {</text:span></text:p>
      <text:p text:style-name="Preformatted_20_Text"><text:span text:style-name="Source_20_Text"><text:s text:c="6"/>"instancia_id": "uuid-evolution",</text:span></text:p>
      <text:p text:style-name="Preformatted_20_Text"><text:span text:style-name="Source_20_Text"><text:s text:c="6"/>"instancia_nome": "WhatsApp Principal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2"><text:span text:style-name="Source_20_Text">}</text:span></text:p>
      <text:h text:style-name="Heading_20_4" text:outline-level="4">POST /api/wizard/completar</text:h>
      <text:p text:style-name="Text_20_body">Salva todas as configurações do wizard.</text:p>
      <text:p text:style-name="Text_20_body"><text:span text:style-name="Strong_20_Emphasis">Request</text:span>:</text:p>
      <text:p text:style-name="Preformatted_20_Text"><text:span text:style-name="Source_20_Text">{</text:span></text:p>
      <text:p text:style-name="Preformatted_20_Text"><text:span text:style-name="Source_20_Text"><text:s text:c="2"/>"configuracoes": {</text:span></text:p>
      <text:p text:style-name="Preformatted_20_Text"><text:span text:style-name="Source_20_Text"><text:s text:c="4"/>"antecedencia_minima": 60,</text:span></text:p>
      <text:p text:style-name="Preformatted_20_Text"><text:span text:style-name="Source_20_Text"><text:s text:c="4"/>"intervalo_agendamentos": 15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horari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dia_semana": 1,</text:span></text:p>
      <text:p text:style-name="Preformatted_20_Text"><text:span text:style-name="Source_20_Text"><text:s text:c="6"/>"hora_inicio": "08:00",</text:span></text:p>
      <text:p text:style-name="Preformatted_20_Text"><text:span text:style-name="Source_20_Text"><text:s text:c="6"/>"hora_fim": "18:00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profissionai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ome": "Julia Fane",</text:span></text:p>
      <text:p text:style-name="Preformatted_20_Text"><text:span text:style-name="Source_20_Text"><text:s text:c="6"/>"especialidade": "Cabeleireira",</text:span></text:p>
      <text:p text:style-name="Preformatted_20_Text"><text:span text:style-name="Source_20_Text"><text:s text:c="6"/>"contato": "35999999999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servic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ome": "Corte de Cabelo",</text:span></text:p>
      <text:p text:style-name="Preformatted_20_Text"><text:span text:style-name="Source_20_Text"><text:s text:c="6"/>"valor": 50.00,</text:span></text:p>
      <text:p text:style-name="Preformatted_20_Text"><text:span text:style-name="Source_20_Text"><text:s text:c="6"/>"duracao_minutos": 6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vincul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profissional_index": 0,</text:span></text:p>
      <text:p text:style-name="Preformatted_20_Text"><text:span text:style-name="Source_20_Text"><text:s text:c="6"/>"servico_index": 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instancia": {</text:span></text:p>
      <text:p text:style-name="Preformatted_20_Text"><text:span text:style-name="Source_20_Text"><text:s text:c="4"/>"instancia_id": "uuid-evolution",</text:span></text:p>
      <text:p text:style-name="Preformatted_20_Text"><text:span text:style-name="Source_20_Text"><text:s text:c="4"/>"instancia_nome": "WhatsApp Principal"</text:span></text:p>
      <text:p text:style-name="Preformatted_20_Text"><text:span text:style-name="Source_20_Text"><text:s text:c="2"/>}</text:span></text:p>
      <text:p text:style-name="P2"><text:span text:style-name="Source_20_Text">}</text:span>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message": "Configuração inicial concluída com sucesso"</text:span></text:p>
      <text:p text:style-name="P2"><text:span text:style-name="Source_20_Text">}</text:span></text:p>
      <text:h text:style-name="Heading_20_4" text:outline-level="4">PUT /api/wizard/empresa</text:h>
      <text:p text:style-name="Text_20_body">Atualiza dados da empresa.</text:p>
      <text:p text:style-name="Text_20_body"><text:span text:style-name="Strong_20_Emphasis">Request</text:span>:</text:p>
      <text:p text:style-name="Preformatted_20_Text"><text:span text:style-name="Source_20_Text">{</text:span></text:p>
      <text:p text:style-name="Preformatted_20_Text"><text:span text:style-name="Source_20_Text"><text:s text:c="2"/>"empresa_nome": "Novo Nome",</text:span></text:p>
      <text:p text:style-name="Preformatted_20_Text"><text:span text:style-name="Source_20_Text"><text:s text:c="2"/>"empresa_contato": "35999999999",</text:span></text:p>
      <text:p text:style-name="Preformatted_20_Text"><text:span text:style-name="Source_20_Text"><text:s text:c="2"/>"cep": "35573356",</text:span></text:p>
      <text:p text:style-name="Preformatted_20_Text"><text:span text:style-name="Source_20_Text"><text:s text:c="2"/>"observacoes": "Observações",</text:span></text:p>
      <text:p text:style-name="Preformatted_20_Text"><text:span text:style-name="Source_20_Text"><text:s text:c="2"/>"empresa_contato_agente": "35988888888"</text:span></text:p>
      <text:p text:style-name="P2"><text:span text:style-name="Source_20_Text">}</text:span></text:p>
      <text:h text:style-name="Heading_20_4" text:outline-level="4">PUT /api/wizard/horarios</text:h>
      <text:p text:style-name="Text_20_body">Atualiza horários de funcionamento.</text:p>
      <text:p text:style-name="Text_20_body"><text:span text:style-name="Strong_20_Emphasis">Request</text:span>:</text:p>
      <text:p text:style-name="Preformatted_20_Text"><text:span text:style-name="Source_20_Text">{</text:span></text:p>
      <text:p text:style-name="Preformatted_20_Text"><text:span text:style-name="Source_20_Text"><text:s text:c="2"/>"horari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dia_semana": 1,</text:span></text:p>
      <text:p text:style-name="Preformatted_20_Text"><text:span text:style-name="Source_20_Text"><text:s text:c="6"/>"hora_inicio": "08:00",</text:span></text:p>
      <text:p text:style-name="Preformatted_20_Text"><text:span text:style-name="Source_20_Text"><text:s text:c="6"/>"hora_fim": "12:00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dia_semana": 1,</text:span></text:p>
      <text:p text:style-name="Preformatted_20_Text"><text:span text:style-name="Source_20_Text"><text:s text:c="6"/>"hora_inicio": "14:00",</text:span></text:p>
      <text:p text:style-name="Preformatted_20_Text"><text:span text:style-name="Source_20_Text"><text:s text:c="6"/>"hora_fim": "18:00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2"><text:span text:style-name="Source_20_Text">}</text:span></text:p>
      <text:h text:style-name="Heading_20_4" text:outline-level="4">PUT /api/wizard/servicos/:servicoId</text:h>
      <text:p text:style-name="Text_20_body">Atualiza um serviço.</text:p>
      <text:p text:style-name="Text_20_body"><text:span text:style-name="Strong_20_Emphasis">Request</text:span>:</text:p>
      <text:p text:style-name="Preformatted_20_Text"><text:span text:style-name="Source_20_Text">{</text:span></text:p>
      <text:p text:style-name="Preformatted_20_Text"><text:span text:style-name="Source_20_Text"><text:s text:c="2"/>"servicos_valor": 60.00,</text:span></text:p>
      <text:p text:style-name="Preformatted_20_Text"><text:span text:style-name="Source_20_Text"><text:s text:c="2"/>"servicos_duracao_minutos": 90,</text:span></text:p>
      <text:p text:style-name="Preformatted_20_Text"><text:span text:style-name="Source_20_Text"><text:s text:c="2"/>"profissionais_ids": ["uuid1", "uuid2"]</text:span></text:p>
      <text:p text:style-name="P2"><text:span text:style-name="Source_20_Text">}</text:span></text:p>
      <text:h text:style-name="Heading_20_4" text:outline-level="4">POST /api/wizard/servicos</text:h>
      <text:p text:style-name="Text_20_body">Cria novo serviço.</text:p>
      <text:p text:style-name="Text_20_body"><text:span text:style-name="Strong_20_Emphasis">Request</text:span>:</text:p>
      <text:p text:style-name="Preformatted_20_Text"><text:span text:style-name="Source_20_Text">{</text:span></text:p>
      <text:p text:style-name="Preformatted_20_Text"><text:span text:style-name="Source_20_Text"><text:s text:c="2"/>"servicos_nome": "Novo Serviço",</text:span></text:p>
      <text:p text:style-name="Preformatted_20_Text"><text:span text:style-name="Source_20_Text"><text:s text:c="2"/>"servicos_valor": 100.00,</text:span></text:p>
      <text:p text:style-name="Preformatted_20_Text"><text:span text:style-name="Source_20_Text"><text:s text:c="2"/>"servicos_duracao_minutos": 120,</text:span></text:p>
      <text:p text:style-name="Preformatted_20_Text"><text:span text:style-name="Source_20_Text"><text:s text:c="2"/>"profissionais_ids": ["uuid1"]</text:span></text:p>
      <text:p text:style-name="P2"><text:span text:style-name="Source_20_Text">}</text:span></text:p>
      <text:h text:style-name="Heading_20_4" text:outline-level="4">DELETE /api/wizard/servicos/:servicoId</text:h>
      <text:p text:style-name="Text_20_body">Exclui (soft delete) um serviço.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message": "Serviço excluído com sucesso"</text:span></text:p>
      <text:p text:style-name="P2"><text:span text:style-name="Source_20_Text">}</text:span></text:p>
      <text:h text:style-name="Heading_20_4" text:outline-level="4">PUT /api/wizard/profissionais/:profissionalId</text:h>
      <text:p text:style-name="Text_20_body">Atualiza um profissional.</text:p>
      <text:p text:style-name="Text_20_body"><text:span text:style-name="Strong_20_Emphasis">Request</text:span>:</text:p>
      <text:p text:style-name="Preformatted_20_Text"><text:span text:style-name="Source_20_Text">{</text:span></text:p>
      <text:p text:style-name="Preformatted_20_Text"><text:span text:style-name="Source_20_Text"><text:s text:c="2"/>"profissional_nome": "Novo Nome",</text:span></text:p>
      <text:p text:style-name="Preformatted_20_Text"><text:span text:style-name="Source_20_Text"><text:s text:c="2"/>"especialidade": "Nova Especialidade",</text:span></text:p>
      <text:p text:style-name="Preformatted_20_Text"><text:span text:style-name="Source_20_Text"><text:s text:c="2"/>"profissional_contato": "35999999999"</text:span></text:p>
      <text:p text:style-name="P2"><text:span text:style-name="Source_20_Text">}</text:span></text:p>
      <text:h text:style-name="Heading_20_4" text:outline-level="4">DELETE /api/wizard/profissionais/:profissionalId</text:h>
      <text:p text:style-name="Text_20_body">Exclui (soft delete) um profissional.</text:p>
      <text:p text:style-name="Text_20_body"><text:span text:style-name="Strong_20_Emphasis">Response Success (200)</text:span>:</text:p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message": "Profissional excluído com sucesso"</text:span></text:p>
      <text:p text:style-name="P2"><text:span text:style-name="Source_20_Text">}</text:span></text:p>
      <text:p text:style-name="Text_20_body"><text:span text:style-name="Strong_20_Emphasis">Response Error (400)</text:span>:</text:p>
      <text:p text:style-name="Preformatted_20_Text"><text:span text:style-name="Source_20_Text">{</text:span></text:p>
      <text:p text:style-name="Preformatted_20_Text"><text:span text:style-name="Source_20_Text"><text:s text:c="2"/>"success": false,</text:span></text:p>
      <text:p text:style-name="Preformatted_20_Text"><text:span text:style-name="Source_20_Text"><text:s text:c="2"/>"message": "Não é possível excluir este profissional pois existem serviços ativos vinculados a ele"</text:span></text:p>
      <text:p text:style-name="P2"><text:span text:style-name="Source_20_Text">}</text:span></text:p>
      <text:p text:style-name="Horizontal_20_Line"/>
      <text:h text:style-name="Heading_20_2" text:outline-level="2">🎨 Frontend</text:h>
      <text:h text:style-name="Heading_20_3" text:outline-level="3">Estrutura de Componentes</text:h>
      <text:h text:style-name="Heading_20_4" text:outline-level="4">Componentes de Layout</text:h>
      <text:p text:style-name="Text_20_body"><text:span text:style-name="Strong_20_Emphasis">MainLayout.jsx</text:span> - Container principal da aplicação - Inclui Sidebar e Header - Renderiza conteúdo das páginas</text:p>
      <text:p text:style-name="Text_20_body"><text:span text:style-name="Strong_20_Emphasis">Sidebar.jsx</text:span> - Menu lateral de navegação - Logo da empresa no topo - Links para todas as páginas - Destaque visual para página ativa</text:p>
      <text:p text:style-name="Text_20_body"><text:span text:style-name="Strong_20_Emphasis">Header.jsx</text:span> - Barra superior - Saudação ao usuário - Notificações - Botão de logout</text:p>
      <text:p text:style-name="Text_20_body"><text:span text:style-name="Strong_20_Emphasis">AuthLayout.jsx</text:span> - Layout para páginas de autenticação - Centraliza conteúdo - Fundo gradiente</text:p>
      <text:h text:style-name="Heading_20_4" text:outline-level="4"><text:soft-page-break/>Componentes UI</text:h>
      <text:p text:style-name="Text_20_body"><text:span text:style-name="Strong_20_Emphasis">Button.jsx</text:span></text:p>
      <text:p text:style-name="Preformatted_20_Text"><text:span text:style-name="Source_20_Text">&lt;Button </text:span></text:p>
      <text:p text:style-name="Preformatted_20_Text"><text:span text:style-name="Source_20_Text"><text:s text:c="2"/>variant="primary|secondary|ghost|danger" </text:span></text:p>
      <text:p text:style-name="Preformatted_20_Text"><text:span text:style-name="Source_20_Text"><text:s text:c="2"/>size="sm|md|lg"</text:span></text:p>
      <text:p text:style-name="Preformatted_20_Text"><text:span text:style-name="Source_20_Text"><text:s text:c="2"/>loading={boolean}</text:span></text:p>
      <text:p text:style-name="Preformatted_20_Text"><text:span text:style-name="Source_20_Text"><text:s text:c="2"/>onClick={function}</text:span></text:p>
      <text:p text:style-name="Preformatted_20_Text"><text:span text:style-name="Source_20_Text">&gt;</text:span></text:p>
      <text:p text:style-name="Preformatted_20_Text"><text:span text:style-name="Source_20_Text"><text:s text:c="2"/>Texto do Botão</text:span></text:p>
      <text:p text:style-name="P2"><text:span text:style-name="Source_20_Text">&lt;/Button&gt;</text:span></text:p>
      <text:p text:style-name="Text_20_body"><text:span text:style-name="Strong_20_Emphasis">Input.jsx</text:span></text:p>
      <text:p text:style-name="Preformatted_20_Text"><text:span text:style-name="Source_20_Text">&lt;Input</text:span></text:p>
      <text:p text:style-name="Preformatted_20_Text"><text:span text:style-name="Source_20_Text"><text:s text:c="2"/>label="Label"</text:span></text:p>
      <text:p text:style-name="Preformatted_20_Text"><text:span text:style-name="Source_20_Text"><text:s text:c="2"/>type="text|email|password|number"</text:span></text:p>
      <text:p text:style-name="Preformatted_20_Text"><text:span text:style-name="Source_20_Text"><text:s text:c="2"/>value={value}</text:span></text:p>
      <text:p text:style-name="Preformatted_20_Text"><text:span text:style-name="Source_20_Text"><text:s text:c="2"/>onChange={handleChange}</text:span></text:p>
      <text:p text:style-name="Preformatted_20_Text"><text:span text:style-name="Source_20_Text"><text:s text:c="2"/>placeholder="Placeholder"</text:span></text:p>
      <text:p text:style-name="Preformatted_20_Text"><text:span text:style-name="Source_20_Text"><text:s text:c="2"/>required={boolean}</text:span></text:p>
      <text:p text:style-name="Preformatted_20_Text"><text:span text:style-name="Source_20_Text"><text:s text:c="2"/>disabled={boolean}</text:span></text:p>
      <text:p text:style-name="P2"><text:span text:style-name="Source_20_Text">/&gt;</text:span></text:p>
      <text:p text:style-name="Text_20_body"><text:span text:style-name="Strong_20_Emphasis">Card.jsx</text:span></text:p>
      <text:p text:style-name="Preformatted_20_Text"><text:span text:style-name="Source_20_Text">&lt;Card&gt;</text:span></text:p>
      <text:p text:style-name="Preformatted_20_Text"><text:span text:style-name="Source_20_Text"><text:s text:c="2"/>&lt;CardHeader&gt;</text:span></text:p>
      <text:p text:style-name="Preformatted_20_Text"><text:span text:style-name="Source_20_Text"><text:s text:c="4"/>&lt;h3&gt;Título&lt;/h3&gt;</text:span></text:p>
      <text:p text:style-name="Preformatted_20_Text"><text:span text:style-name="Source_20_Text"><text:s text:c="2"/>&lt;/CardHeader&gt;</text:span></text:p>
      <text:p text:style-name="Preformatted_20_Text"><text:span text:style-name="Source_20_Text"><text:s text:c="2"/>&lt;CardBody&gt;</text:span></text:p>
      <text:p text:style-name="Preformatted_20_Text"><text:span text:style-name="Source_20_Text"><text:s text:c="4"/>Conteúdo</text:span></text:p>
      <text:p text:style-name="Preformatted_20_Text"><text:span text:style-name="Source_20_Text"><text:s text:c="2"/>&lt;/CardBody&gt;</text:span></text:p>
      <text:p text:style-name="P2"><text:span text:style-name="Source_20_Text">&lt;/Card&gt;</text:span></text:p>
      <text:p text:style-name="Text_20_body"><text:span text:style-name="Strong_20_Emphasis">Logo.jsx</text:span></text:p>
      <text:p text:style-name="Preformatted_20_Text"><text:span text:style-name="Source_20_Text">&lt;Logo </text:span></text:p>
      <text:p text:style-name="Preformatted_20_Text"><text:span text:style-name="Source_20_Text"><text:s text:c="2"/>size="sm|md|lg|xl" </text:span></text:p>
      <text:p text:style-name="Preformatted_20_Text"><text:span text:style-name="Source_20_Text"><text:s text:c="2"/>variant="full|icon" </text:span></text:p>
      <text:p text:style-name="P2"><text:span text:style-name="Source_20_Text">/&gt;</text:span></text:p>
      <text:h text:style-name="Heading_20_3" text:outline-level="3">Páginas Principais</text:h>
      <text:h text:style-name="Heading_20_4" text:outline-level="4">Dashboard.jsx</text:h>
      <text:list xml:id="list2674335972" text:style-name="L30">
        <text:list-item>
          <text:p text:style-name="P62">Métricas em cards </text:p>
        </text:list-item>
        <text:list-item>
          <text:p text:style-name="P62">Gráfico de linhas (agendamentos vs cancelamentos) </text:p>
        </text:list-item>
        <text:list-item>
          <text:p text:style-name="P62">Lista de próximos agendamentos </text:p>
        </text:list-item>
        <text:list-item>
          <text:p text:style-name="P62">Lista de profissionais hoje </text:p>
        </text:list-item>
        <text:list-item>
          <text:p text:style-name="P61">Estatísticas por empresa (Super Admin) </text:p>
        </text:list-item>
      </text:list>
      <text:h text:style-name="Heading_20_4" text:outline-level="4">Login.jsx</text:h>
      <text:list xml:id="list1014277283" text:style-name="L31">
        <text:list-item>
          <text:p text:style-name="P64">Logo centralizado </text:p>
        </text:list-item>
        <text:list-item>
          <text:p text:style-name="P64">Formulário de login </text:p>
        </text:list-item>
        <text:list-item>
          <text:p text:style-name="P64">Validação de campos </text:p>
        </text:list-item>
        <text:list-item>
          <text:p text:style-name="P63">Feedback de erros </text:p>
        </text:list-item>
      </text:list>
      <text:h text:style-name="Heading_20_4" text:outline-level="4">Configuracoes/index.jsx</text:h>
      <text:list xml:id="list3878354411" text:style-name="L32">
        <text:list-item>
          <text:p text:style-name="P66">Abas: Empresa, Agendamentos, WhatsApp, Profissionais, Serviços </text:p>
        </text:list-item>
        <text:list-item>
          <text:p text:style-name="P66">Edição inline </text:p>
        </text:list-item>
        <text:list-item>
          <text:p text:style-name="P66">Validações </text:p>
        </text:list-item>
        <text:list-item>
          <text:p text:style-name="P65">Modais para adicionar novos itens </text:p>
        </text:list-item>
      </text:list>
      <text:h text:style-name="Heading_20_4" text:outline-level="4">Empresas/index.jsx</text:h>
      <text:list xml:id="list3142097480" text:style-name="L33">
        <text:list-item>
          <text:p text:style-name="P68">Lista de empresas </text:p>
        </text:list-item>
        <text:list-item>
          <text:p text:style-name="P68">Modal para nova empresa </text:p>
        </text:list-item>
        <text:list-item>
          <text:p text:style-name="P67">Exibição de senha gerada </text:p>
        </text:list-item>
      </text:list>
      <text:h text:style-name="Heading_20_4" text:outline-level="4">Wizard/index.jsx</text:h>
      <text:list xml:id="list3417123980" text:style-name="L34">
        <text:list-item>
          <text:p text:style-name="P70">7 etapas de configuração </text:p>
        </text:list-item>
        <text:list-item>
          <text:p text:style-name="P70">Navegação entre etapas </text:p>
        </text:list-item>
        <text:list-item>
          <text:p text:style-name="P70">Validação por etapa </text:p>
        </text:list-item>
        <text:list-item>
          <text:p text:style-name="P69">Resumo final </text:p>
        </text:list-item>
      </text:list>
      <text:h text:style-name="Heading_20_3" text:outline-level="3">Roteamento</text:h>
      <text:p text:style-name="Preformatted_20_Text"><text:span text:style-name="Source_20_Text">// router.jsx</text:span></text:p>
      <text:p text:style-name="Preformatted_20_Text"><text:span text:style-name="Source_20_Text">&lt;Routes&gt;</text:span></text:p>
      <text:p text:style-name="Preformatted_20_Text"><text:span text:style-name="Source_20_Text"><text:s text:c="2"/>&lt;Route path="/login" element={&lt;Login /&gt;} /&gt;</text:span></text:p>
      <text:p text:style-name="Preformatted_20_Text"/>
      <text:p text:style-name="Preformatted_20_Text"><text:span text:style-name="Source_20_Text"><text:s text:c="2"/>&lt;Route element={&lt;ProtectedRoute /&gt;}&gt;</text:span></text:p>
      <text:p text:style-name="Preformatted_20_Text"><text:span text:style-name="Source_20_Text"><text:s text:c="4"/>&lt;Route path="/" element={&lt;Dashboard /&gt;} /&gt;</text:span></text:p>
      <text:p text:style-name="Preformatted_20_Text"><text:span text:style-name="Source_20_Text"><text:s text:c="4"/>&lt;Route path="/agendamentos" element={&lt;Agendamentos /&gt;} /&gt;</text:span></text:p>
      <text:p text:style-name="Preformatted_20_Text"><text:span text:style-name="Source_20_Text"><text:s text:c="4"/>&lt;Route path="/clientes" element={&lt;Clientes /&gt;} /&gt;</text:span></text:p>
      <text:p text:style-name="Preformatted_20_Text"><text:span text:style-name="Source_20_Text"><text:s text:c="4"/>&lt;Route path="/profissionais" element={&lt;Profissionais /&gt;} /&gt;</text:span></text:p>
      <text:p text:style-name="Preformatted_20_Text"><text:span text:style-name="Source_20_Text"><text:s text:c="4"/>&lt;Route path="/servicos" element={&lt;Servicos /&gt;} /&gt;</text:span></text:p>
      <text:p text:style-name="Preformatted_20_Text"><text:span text:style-name="Source_20_Text"><text:s text:c="4"/>&lt;Route path="/empresas" element={&lt;Empresas /&gt;} /&gt;</text:span></text:p>
      <text:p text:style-name="Preformatted_20_Text"><text:span text:style-name="Source_20_Text"><text:s text:c="4"/>&lt;Route path="/configuracoes" element={&lt;Configuracoes /&gt;} /&gt;</text:span></text:p>
      <text:p text:style-name="Preformatted_20_Text"><text:span text:style-name="Source_20_Text"><text:s text:c="4"/>&lt;Route path="/wizard" element={&lt;Wizard /&gt;} /&gt;</text:span></text:p>
      <text:p text:style-name="Preformatted_20_Text"><text:span text:style-name="Source_20_Text"><text:s text:c="2"/>&lt;/Route&gt;</text:span></text:p>
      <text:p text:style-name="P2"><text:span text:style-name="Source_20_Text">&lt;/Routes&gt;</text:span></text:p>
      <text:h text:style-name="Heading_20_3" text:outline-level="3">Context API</text:h>
      <text:h text:style-name="Heading_20_4" text:outline-level="4">AuthContext</text:h>
      <text:p text:style-name="Text_20_body">Gerencia estado de autenticação global.</text:p>
      <text:p text:style-name="Preformatted_20_Text"><text:span text:style-name="Source_20_Text">const { user, login, logout, loading } = useAuth()</text:span></text:p>
      <text:p text:style-name="Preformatted_20_Text"/>
      <text:p text:style-name="Preformatted_20_Text"><text:span text:style-name="Source_20_Text">// user: { id, nome, email, empresa_id, nivel_acesso_id }</text:span></text:p>
      <text:p text:style-name="Preformatted_20_Text"><text:span text:style-name="Source_20_Text">// login(email, senha): Promise&lt;{ success, message }&gt;</text:span></text:p>
      <text:p text:style-name="Preformatted_20_Text"><text:span text:style-name="Source_20_Text">// logout(): void</text:span></text:p>
      <text:p text:style-name="P2"><text:span text:style-name="Source_20_Text">// loading: boolean</text:span></text:p>
      <text:h text:style-name="Heading_20_3" text:outline-level="3">Services</text:h>
      <text:h text:style-name="Heading_20_4" text:outline-level="4">api.js</text:h>
      <text:p text:style-name="Text_20_body">Cliente Axios configurado com: - Base URL - Interceptors para adicionar token JWT - Tratamento de erros 401 (logout automático)</text:p>
      <text:p text:style-name="Preformatted_20_Text"><text:span text:style-name="Source_20_Text">import api from './api'</text:span></text:p>
      <text:p text:style-name="Preformatted_20_Text"/>
      <text:p text:style-name="Preformatted_20_Text"><text:span text:style-name="Source_20_Text">// Exemplo de uso</text:span></text:p>
      <text:p text:style-name="Preformatted_20_Text"><text:span text:style-name="Source_20_Text">const response = await api.get('/endpoint')</text:span></text:p>
      <text:p text:style-name="P2"><text:span text:style-name="Source_20_Text">const data = await api.post('/endpoint', body)</text:span></text:p>
      <text:h text:style-name="Heading_20_4" text:outline-level="4">auth.service.js</text:h>
      <text:p text:style-name="Preformatted_20_Text"><text:span text:style-name="Source_20_Text">import authService from './auth.service'</text:span></text:p>
      <text:p text:style-name="Preformatted_20_Text"/>
      <text:p text:style-name="Preformatted_20_Text"><text:span text:style-name="Source_20_Text">await authService.login(email, senha)</text:span></text:p>
      <text:p text:style-name="Preformatted_20_Text"><text:span text:style-name="Source_20_Text">await authService.me()</text:span></text:p>
      <text:p text:style-name="P2"><text:span text:style-name="Source_20_Text">authService.logout()</text:span></text:p>
      <text:h text:style-name="Heading_20_4" text:outline-level="4">dashboard.service.js</text:h>
      <text:p text:style-name="Preformatted_20_Text"><text:span text:style-name="Source_20_Text">import dashboardService from './dashboard.service'</text:span></text:p>
      <text:p text:style-name="Preformatted_20_Text"/>
      <text:p text:style-name="Preformatted_20_Text"><text:span text:style-name="Source_20_Text">await dashboardService.getStats()</text:span></text:p>
      <text:p text:style-name="Preformatted_20_Text"><text:span text:style-name="Source_20_Text">await dashboardService.getProximosAgendamentos()</text:span></text:p>
      <text:p text:style-name="Preformatted_20_Text"><text:span text:style-name="Source_20_Text">await dashboardService.getProfissionaisHoje()</text:span></text:p>
      <text:p text:style-name="Preformatted_20_Text"><text:span text:style-name="Source_20_Text">await dashboardService.getGraficoAgendamentos()</text:span></text:p>
      <text:p text:style-name="P2"><text:span text:style-name="Source_20_Text">await dashboardService.getEstatisticasPorEmpresa()</text:span></text:p>
      <text:h text:style-name="Heading_20_4" text:outline-level="4">empresas.service.js</text:h>
      <text:p text:style-name="Preformatted_20_Text"><text:span text:style-name="Source_20_Text">import empresasService from './empresas.service'</text:span></text:p>
      <text:p text:style-name="Preformatted_20_Text"/>
      <text:p text:style-name="Preformatted_20_Text"><text:span text:style-name="Source_20_Text">await empresasService.listar()</text:span></text:p>
      <text:p text:style-name="P2"><text:span text:style-name="Source_20_Text">await empresasService.criar(data)</text:span></text:p>
      <text:h text:style-name="Heading_20_4" text:outline-level="4">wizard.service.js</text:h>
      <text:p text:style-name="Preformatted_20_Text"><text:span text:style-name="Source_20_Text">import wizardService from './wizard.service'</text:span></text:p>
      <text:p text:style-name="Preformatted_20_Text"/>
      <text:p text:style-name="Preformatted_20_Text"><text:span text:style-name="Source_20_Text">await wizardService.checkStatus()</text:span></text:p>
      <text:p text:style-name="Preformatted_20_Text"><text:span text:style-name="Source_20_Text">await wizardService.getEmpresaCompleta()</text:span></text:p>
      <text:p text:style-name="Preformatted_20_Text"><text:span text:style-name="Source_20_Text">await wizardService.completar(data)</text:span></text:p>
      <text:p text:style-name="Preformatted_20_Text"><text:span text:style-name="Source_20_Text">await wizardService.updateEmpresa(data)</text:span></text:p>
      <text:p text:style-name="Preformatted_20_Text"><text:span text:style-name="Source_20_Text">await wizardService.updateHorarios(horarios)</text:span></text:p>
      <text:p text:style-name="Preformatted_20_Text"><text:span text:style-name="Source_20_Text">await wizardService.updateServico(servicoId, data)</text:span></text:p>
      <text:p text:style-name="Preformatted_20_Text"><text:span text:style-name="Source_20_Text">await wizardService.createServico(data)</text:span></text:p>
      <text:p text:style-name="Preformatted_20_Text"><text:span text:style-name="Source_20_Text">await wizardService.deleteServico(servicoId)</text:span></text:p>
      <text:p text:style-name="Preformatted_20_Text"><text:span text:style-name="Source_20_Text">await wizardService.updateProfissional(profissionalId, data)</text:span></text:p>
      <text:p text:style-name="P2"><text:span text:style-name="Source_20_Text">await wizardService.deleteProfissional(profissionalId)</text:span></text:p>
      <text:h text:style-name="Heading_20_3" text:outline-level="3">Estilização</text:h>
      <text:h text:style-name="Heading_20_4" text:outline-level="4">TailwindCSS</text:h>
      <text:p text:style-name="Text_20_body">Classes utilitárias para estilização rápida.</text:p>
      <text:p text:style-name="Text_20_body"><text:span text:style-name="Strong_20_Emphasis">Cores Principais</text:span>: - <text:span text:style-name="Source_20_Text">primary</text:span>: Verde (#10b981) - <text:span text:style-name="Source_20_Text">danger</text:span>: Vermelho (#ef4444) - <text:span text:style-name="Source_20_Text">success</text:span>: Verde (#10b981) - <text:span text:style-name="Source_20_Text">warning</text:span>: Amarelo (#f59e0b)</text:p>
      <text:p text:style-name="Text_20_body"><text:span text:style-name="Strong_20_Emphasis">Exemplo</text:span>:</text:p>
      <text:p text:style-name="Preformatted_20_Text"><text:span text:style-name="Source_20_Text">&lt;div className="bg-white rounded-lg shadow-md p-6"&gt;</text:span></text:p>
      <text:p text:style-name="Preformatted_20_Text"><text:span text:style-name="Source_20_Text"><text:s text:c="2"/>&lt;h2 className="text-2xl font-bold text-gray-800 mb-4"&gt;</text:span></text:p>
      <text:p text:style-name="Preformatted_20_Text"><text:span text:style-name="Source_20_Text"><text:s text:c="4"/>Título</text:span></text:p>
      <text:p text:style-name="Preformatted_20_Text"><text:span text:style-name="Source_20_Text"><text:s text:c="2"/>&lt;/h2&gt;</text:span></text:p>
      <text:p text:style-name="Preformatted_20_Text"><text:span text:style-name="Source_20_Text"><text:s text:c="2"/>&lt;p className="text-gray-600"&gt;</text:span></text:p>
      <text:p text:style-name="Preformatted_20_Text"><text:span text:style-name="Source_20_Text"><text:s text:c="4"/>Conteúdo</text:span></text:p>
      <text:p text:style-name="Preformatted_20_Text"><text:span text:style-name="Source_20_Text"><text:s text:c="2"/>&lt;/p&gt;</text:span></text:p>
      <text:p text:style-name="P2"><text:span text:style-name="Source_20_Text">&lt;/div&gt;</text:span></text:p>
      <text:p text:style-name="Horizontal_20_Line"/>
      <text:h text:style-name="Heading_20_2" text:outline-level="2"><text:soft-page-break/>🗄️ Banco de Dados</text:h>
      <text:h text:style-name="Heading_20_3" text:outline-level="3">Tabelas Principais</text:h>
      <text:p text:style-name="Text_20_body">Para documentação completa do banco de dados, consulte: <text:span text:style-name="Source_20_Text">DOCUMENTACAO_BANCO_DADOS.md</text:span></text:p>
      <text:h text:style-name="Heading_20_4" text:outline-level="4">empresa</text:h>
      <text:p text:style-name="Text_20_body">Armazena dados das empresas.</text:p>
      <text:p text:style-name="Text_20_body"><text:span text:style-name="Strong_20_Emphasis">Colunas principais</text:span>: - <text:span text:style-name="Source_20_Text">empresa_id</text:span> (PK) - <text:span text:style-name="Source_20_Text">empresa_nome</text:span> - <text:span text:style-name="Source_20_Text">empresa_contato</text:span> - <text:span text:style-name="Source_20_Text">cep</text:span> - <text:span text:style-name="Source_20_Text">observacoes</text:span> - <text:span text:style-name="Source_20_Text">empresa_contato_agente</text:span></text:p>
      <text:h text:style-name="Heading_20_4" text:outline-level="4">login</text:h>
      <text:p text:style-name="Text_20_body">Usuários do sistema.</text:p>
      <text:p text:style-name="Text_20_body"><text:span text:style-name="Strong_20_Emphasis">Colunas principais</text:span>: - <text:span text:style-name="Source_20_Text">login_id</text:span> (PK) - <text:span text:style-name="Source_20_Text">email</text:span> - <text:span text:style-name="Source_20_Text">senha</text:span> (hash bcrypt) - <text:span text:style-name="Source_20_Text">nome</text:span> - <text:span text:style-name="Source_20_Text">empresa_id</text:span> (FK) - <text:span text:style-name="Source_20_Text">nivel_acesso_id</text:span> (FK)</text:p>
      <text:h text:style-name="Heading_20_4" text:outline-level="4">agendamento</text:h>
      <text:p text:style-name="Text_20_body">Agendamentos realizados.</text:p>
      <text:p text:style-name="Text_20_body"><text:span text:style-name="Strong_20_Emphasis">Colunas principais</text:span>: - <text:span text:style-name="Source_20_Text">agend_id</text:span> (PK) - <text:span text:style-name="Source_20_Text">empresa_id</text:span> (FK) - <text:span text:style-name="Source_20_Text">cliente_id</text:span> (FK) - <text:span text:style-name="Source_20_Text">profissional_id</text:span> (FK) - <text:span text:style-name="Source_20_Text">agend_data</text:span> - <text:span text:style-name="Source_20_Text">agend_hora</text:span> - <text:span text:style-name="Source_20_Text">agend_valor</text:span> - <text:span text:style-name="Source_20_Text">status_agend_id</text:span> (FK) - <text:span text:style-name="Source_20_Text">periodo</text:span> (tstzrange - calculado)</text:p>
      <text:h text:style-name="Heading_20_4" text:outline-level="4">clientes</text:h>
      <text:p text:style-name="Text_20_body">Clientes das empresas.</text:p>
      <text:p text:style-name="Text_20_body"><text:span text:style-name="Strong_20_Emphasis">Colunas principais</text:span>: - <text:span text:style-name="Source_20_Text">cliente_id</text:span> (PK) - <text:span text:style-name="Source_20_Text">empresa_id</text:span> (FK) - <text:span text:style-name="Source_20_Text">cliente_nome</text:span> - <text:span text:style-name="Source_20_Text">cliente_fone</text:span></text:p>
      <text:h text:style-name="Heading_20_4" text:outline-level="4">profissional</text:h>
      <text:p text:style-name="Text_20_body">Profissionais das empresas.</text:p>
      <text:p text:style-name="Text_20_body"><text:span text:style-name="Strong_20_Emphasis">Colunas principais</text:span>: - <text:span text:style-name="Source_20_Text">profissional_id</text:span> (PK) - <text:span text:style-name="Source_20_Text">empresa_id</text:span> (FK) - <text:span text:style-name="Source_20_Text">profissional_nome</text:span> - <text:span text:style-name="Source_20_Text">especialidade</text:span> - <text:span text:style-name="Source_20_Text">profissional_contato</text:span> - <text:span text:style-name="Source_20_Text">status</text:span> ('ativo'/'inativo')</text:p>
      <text:h text:style-name="Heading_20_4" text:outline-level="4">servicos</text:h>
      <text:p text:style-name="Text_20_body">Serviços oferecidos (global, sem empresa_id).</text:p>
      <text:p text:style-name="Text_20_body"><text:span text:style-name="Strong_20_Emphasis">Colunas principais</text:span>: - <text:span text:style-name="Source_20_Text">servicos_id</text:span> (PK) - <text:span text:style-name="Source_20_Text">servicos_nome</text:span> - <text:span text:style-name="Source_20_Text">servicos_valor</text:span> - <text:span text:style-name="Source_20_Text">servicos_duracao</text:span> (INTERVAL) - <text:span text:style-name="Source_20_Text">status</text:span> ('ativo'/'inativo')</text:p>
      <text:h text:style-name="Heading_20_4" text:outline-level="4">profissional_servico</text:h>
      <text:p text:style-name="Text_20_body">Vínculo entre profissionais e serviços.</text:p>
      <text:p text:style-name="Text_20_body"><text:span text:style-name="Strong_20_Emphasis">Colunas principais</text:span>: - <text:span text:style-name="Source_20_Text">profissional_id</text:span> (FK) - <text:span text:style-name="Source_20_Text">servicos_id</text:span> (FK)</text:p>
      <text:h text:style-name="Heading_20_4" text:outline-level="4">horario_f</text:h>
      <text:p text:style-name="Text_20_body">Horários de funcionamento (cabeçalho).</text:p>
      <text:p text:style-name="Text_20_body"><text:span text:style-name="Strong_20_Emphasis">Colunas principais</text:span>: - <text:span text:style-name="Source_20_Text">horario_f_id</text:span> (PK)</text:p>
      <text:h text:style-name="Heading_20_4" text:outline-level="4">horario_det</text:h>
      <text:p text:style-name="Text_20_body">Detalhes dos horários.</text:p>
      <text:p text:style-name="Text_20_body"><text:span text:style-name="Strong_20_Emphasis">Colunas principais</text:span>: - <text:span text:style-name="Source_20_Text">horario_det_id</text:span> (PK) - <text:span text:style-name="Source_20_Text">horario_f_id</text:span> (FK) - <text:span text:style-name="Source_20_Text">dia_semana</text:span> (0-6) - <text:span text:style-name="Source_20_Text">hora_inicio</text:span> - <text:span text:style-name="Source_20_Text">hora_fim</text:span></text:p>
      <text:h text:style-name="Heading_20_4" text:outline-level="4">profissional_horario</text:h>
      <text:p text:style-name="Text_20_body">Vínculo entre profissionais e horários.</text:p>
      <text:p text:style-name="Text_20_body"><text:span text:style-name="Strong_20_Emphasis">Colunas principais</text:span>: - <text:span text:style-name="Source_20_Text">profissional_id</text:span> (FK) - <text:span text:style-name="Source_20_Text">horario_f_id</text:span> (FK)</text:p>
      <text:h text:style-name="Heading_20_4" text:outline-level="4">instancia</text:h>
      <text:p text:style-name="Text_20_body">Instâncias WhatsApp (Evolution API).</text:p>
      <text:p text:style-name="Text_20_body"><text:span text:style-name="Strong_20_Emphasis">Colunas principais</text:span>: - <text:span text:style-name="Source_20_Text">instancia_id</text:span> (PK - UUID da Evolution) - <text:span text:style-name="Source_20_Text">empresa_id</text:span> (FK) - <text:span text:style-name="Source_20_Text">instancia_nome</text:span></text:p>
      <text:h text:style-name="Heading_20_3" text:outline-level="3">Relacionamentos Importantes</text:h>
      <text:p text:style-name="Preformatted_20_Text"><text:span text:style-name="Source_20_Text">empresa (1) ─────── (N) login</text:span></text:p>
      <text:p text:style-name="Preformatted_20_Text"><text:span text:style-name="Source_20_Text">empresa (1) ─────── (N) clientes</text:span></text:p>
      <text:p text:style-name="Preformatted_20_Text"><text:span text:style-name="Source_20_Text">empresa (1) ─────── (N) profissional</text:span></text:p>
      <text:p text:style-name="Preformatted_20_Text"><text:span text:style-name="Source_20_Text">empresa (1) ─────── (N) agendamento</text:span></text:p>
      <text:p text:style-name="Preformatted_20_Text"><text:span text:style-name="Source_20_Text">empresa (1) ─────── (1) instancia</text:span></text:p>
      <text:p text:style-name="Preformatted_20_Text"/>
      <text:p text:style-name="Preformatted_20_Text"><text:span text:style-name="Source_20_Text">profissional (N) ─────── (N) servicos</text:span></text:p>
      <text:p text:style-name="Preformatted_20_Text"><text:span text:style-name="Source_20_Text"><text:s text:c="2"/>(via profissional_servico)</text:span></text:p>
      <text:p text:style-name="Preformatted_20_Text"/>
      <text:p text:style-name="Preformatted_20_Text"><text:span text:style-name="Source_20_Text">profissional (N) ─────── (N) horario_f</text:span></text:p>
      <text:p text:style-name="Preformatted_20_Text"><text:span text:style-name="Source_20_Text"><text:s text:c="2"/>(via profissional_horario)</text:span></text:p>
      <text:p text:style-name="Preformatted_20_Text"/>
      <text:p text:style-name="Preformatted_20_Text"><text:span text:style-name="Source_20_Text">agendamento (N) ─────── (1) clientes</text:span></text:p>
      <text:p text:style-name="Preformatted_20_Text"><text:span text:style-name="Source_20_Text">agendamento (N) ─────── (1) profissional</text:span></text:p>
      <text:p text:style-name="P2"><text:span text:style-name="Source_20_Text">agendamento (N) ─────── (1) status_agend</text:span></text:p>
      <text:p text:style-name="Horizontal_20_Line"/>
      <text:h text:style-name="Heading_20_2" text:outline-level="2">🔐 Autenticação e Segurança</text:h>
      <text:h text:style-name="Heading_20_3" text:outline-level="3">JWT (JSON Web Tokens)</text:h>
      <text:h text:style-name="Heading_20_4" text:outline-level="4">Geração do Token</text:h>
      <text:p text:style-name="Preformatted_20_Text"><text:span text:style-name="Source_20_Text">const token = jwt.sign(</text:span></text:p>
      <text:p text:style-name="Preformatted_20_Text"><text:span text:style-name="Source_20_Text"><text:s text:c="2"/>{</text:span></text:p>
      <text:p text:style-name="Preformatted_20_Text"><text:span text:style-name="Source_20_Text"><text:s text:c="4"/>id: user.login_id,</text:span></text:p>
      <text:p text:style-name="Preformatted_20_Text"><text:span text:style-name="Source_20_Text"><text:s text:c="4"/>email: user.email,</text:span></text:p>
      <text:p text:style-name="Preformatted_20_Text"><text:span text:style-name="Source_20_Text"><text:s text:c="4"/>empresa_id: user.empresa_id,</text:span></text:p>
      <text:p text:style-name="Preformatted_20_Text"><text:span text:style-name="Source_20_Text"><text:s text:c="4"/>nivel_acesso_id: user.nivel_acesso_id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process.env.JWT_SECRET,</text:span></text:p>
      <text:p text:style-name="Preformatted_20_Text"><text:span text:style-name="Source_20_Text"><text:s text:c="2"/>{ expiresIn: '24h' }</text:span></text:p>
      <text:p text:style-name="P2"><text:span text:style-name="Source_20_Text">)</text:span></text:p>
      <text:h text:style-name="Heading_20_4" text:outline-level="4">Verificação do Token</text:h>
      <text:p text:style-name="Preformatted_20_Text"><text:span text:style-name="Source_20_Text">// Middleware: auth.middleware.js</text:span></text:p>
      <text:p text:style-name="Preformatted_20_Text"><text:span text:style-name="Source_20_Text">const token = req.headers.authorization?.split(' ')[1]</text:span></text:p>
      <text:p text:style-name="Preformatted_20_Text"><text:span text:style-name="Source_20_Text">const decoded = jwt.verify(token, process.env.JWT_SECRET)</text:span></text:p>
      <text:p text:style-name="P2"><text:span text:style-name="Source_20_Text">req.user = decoded</text:span></text:p>
      <text:h text:style-name="Heading_20_3" text:outline-level="3">Hash de Senhas</text:h>
      <text:p text:style-name="Preformatted_20_Text"><text:span text:style-name="Source_20_Text">// Ao criar usuário</text:span></text:p>
      <text:p text:style-name="Preformatted_20_Text"><text:span text:style-name="Source_20_Text">const hashedPassword = await bcrypt.hash(senha, 10)</text:span></text:p>
      <text:p text:style-name="Preformatted_20_Text"/>
      <text:p text:style-name="Preformatted_20_Text"><text:span text:style-name="Source_20_Text">// Ao fazer login</text:span></text:p>
      <text:p text:style-name="P2"><text:span text:style-name="Source_20_Text">const isValid = await bcrypt.compare(senhaDigitada, senhaHashBanco)</text:span></text:p>
      <text:h text:style-name="Heading_20_3" text:outline-level="3">Multi-Tenant Security</text:h>
      <text:h text:style-name="Heading_20_4" text:outline-level="4">Middleware de Isolamento</text:h>
      <text:p text:style-name="Preformatted_20_Text"><text:span text:style-name="Source_20_Text">// multiTenant.middleware.js</text:span></text:p>
      <text:p text:style-name="Preformatted_20_Text"><text:span text:style-name="Source_20_Text">export function multiTenantFilter(req, res, next) {</text:span></text:p>
      <text:p text:style-name="Preformatted_20_Text"><text:span text:style-name="Source_20_Text"><text:s text:c="2"/>const empresaId = req.user.empresa_id</text:span></text:p>
      <text:p text:style-name="Preformatted_20_Text"><text:span text:style-name="Source_20_Text"><text:s text:c="2"/>const nivelAcessoId = req.user.nivel_acesso_id</text:span></text:p>
      <text:p text:style-name="Preformatted_20_Text"/>
      <text:p text:style-name="Preformatted_20_Text"><text:span text:style-name="Source_20_Text"><text:s text:c="2"/>// Super Admin vê tudo</text:span></text:p>
      <text:p text:style-name="Preformatted_20_Text"><text:span text:style-name="Source_20_Text"><text:s text:c="2"/>if (nivelAcessoId === SUPER_ADMIN_ID) {</text:span></text:p>
      <text:p text:style-name="Preformatted_20_Text"><text:span text:style-name="Source_20_Text"><text:s text:c="4"/>req.canAccessAllCompanies = true</text:span></text:p>
      <text:p text:style-name="Preformatted_20_Text"><text:span text:style-name="Source_20_Text"><text:s text:c="4"/>return next()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// Usuários normais veem apenas sua empresa</text:span></text:p>
      <text:p text:style-name="Preformatted_20_Text"><text:span text:style-name="Source_20_Text"><text:s text:c="2"/>req.empresaFilter = empresaId</text:span></text:p>
      <text:p text:style-name="Preformatted_20_Text"><text:span text:style-name="Source_20_Text"><text:s text:c="2"/>next()</text:span></text:p>
      <text:p text:style-name="P2"><text:span text:style-name="Source_20_Text">}</text:span></text:p>
      <text:h text:style-name="Heading_20_4" text:outline-level="4">Queries Filtradas</text:h>
      <text:p text:style-name="Preformatted_20_Text"><text:span text:style-name="Source_20_Text">// Exemplo de query com filtro multi-tenant</text:span></text:p>
      <text:p text:style-name="Preformatted_20_Text"><text:span text:style-name="Source_20_Text">const query = isSuperAdmin</text:span></text:p>
      <text:p text:style-name="Preformatted_20_Text"><text:span text:style-name="Source_20_Text"><text:s text:c="2"/>? 'SELECT * FROM agendamento'</text:span></text:p>
      <text:p text:style-name="Preformatted_20_Text"><text:span text:style-name="Source_20_Text"><text:s text:c="2"/>: 'SELECT * FROM agendamento WHERE empresa_id = $1'</text:span></text:p>
      <text:p text:style-name="Preformatted_20_Text"/>
      <text:p text:style-name="Preformatted_20_Text"><text:span text:style-name="Source_20_Text">const params = isSuperAdmin ? [] : [empresaId]</text:span></text:p>
      <text:p text:style-name="P2"><text:span text:style-name="Source_20_Text">const result = await pool.query(query, params)</text:span></text:p>
      <text:h text:style-name="Heading_20_3" text:outline-level="3">Proteção de Rotas</text:h>
      <text:h text:style-name="Heading_20_4" text:outline-level="4">Frontend</text:h>
      <text:p text:style-name="Preformatted_20_Text"><text:span text:style-name="Source_20_Text">// ProtectedRoute component</text:span></text:p>
      <text:p text:style-name="Preformatted_20_Text"><text:span text:style-name="Source_20_Text">function ProtectedRoute() {</text:span></text:p>
      <text:p text:style-name="Preformatted_20_Text"><text:span text:style-name="Source_20_Text"><text:s text:c="2"/>const { user, loading } = useAuth()</text:span></text:p>
      <text:p text:style-name="Preformatted_20_Text"/>
      <text:p text:style-name="Preformatted_20_Text"><text:span text:style-name="Source_20_Text"><text:s text:c="2"/>if (loading) return &lt;div&gt;Carregando...&lt;/div&gt;</text:span></text:p>
      <text:p text:style-name="Preformatted_20_Text"/>
      <text:p text:style-name="Preformatted_20_Text"><text:span text:style-name="Source_20_Text"><text:s text:c="2"/>if (!user) return &lt;Navigate to="/login" /&gt;</text:span></text:p>
      <text:p text:style-name="Preformatted_20_Text"/>
      <text:p text:style-name="Preformatted_20_Text"><text:span text:style-name="Source_20_Text"><text:s text:c="2"/>return &lt;Outlet /&gt;</text:span></text:p>
      <text:p text:style-name="P2"><text:span text:style-name="Source_20_Text">}</text:span></text:p>
      <text:h text:style-name="Heading_20_4" text:outline-level="4">Backend</text:h>
      <text:p text:style-name="Preformatted_20_Text"><text:span text:style-name="Source_20_Text">// Todas as rotas protegidas usam o middleware</text:span></text:p>
      <text:p text:style-name="P2"><text:span text:style-name="Source_20_Text">router.use(authenticateToken)</text:span></text:p>
      <text:h text:style-name="Heading_20_3" text:outline-level="3">Variáveis de Ambiente</text:h>
      <text:p text:style-name="Preformatted_20_Text"><text:span text:style-name="Source_20_Text"># .env (Backend)</text:span></text:p>
      <text:p text:style-name="Preformatted_20_Text"><text:span text:style-name="Source_20_Text">PORT=3001</text:span></text:p>
      <text:p text:style-name="Preformatted_20_Text"><text:span text:style-name="Source_20_Text">DATABASE_HOST=localhost</text:span></text:p>
      <text:p text:style-name="Preformatted_20_Text"><text:span text:style-name="Source_20_Text">DATABASE_PORT=5432</text:span></text:p>
      <text:p text:style-name="Preformatted_20_Text"><text:span text:style-name="Source_20_Text">DATABASE_NAME=agendamento</text:span></text:p>
      <text:p text:style-name="Preformatted_20_Text"><text:span text:style-name="Source_20_Text">DATABASE_USER=postgres</text:span></text:p>
      <text:p text:style-name="Preformatted_20_Text"><text:span text:style-name="Source_20_Text">DATABASE_PASSWORD=senha</text:span></text:p>
      <text:p text:style-name="Preformatted_20_Text"><text:span text:style-name="Source_20_Text">JWT_SECRET=chave_secreta_muito_segura</text:span></text:p>
      <text:p text:style-name="P2"><text:span text:style-name="Source_20_Text">NODE_ENV=development</text:span></text:p>
      <text:p text:style-name="Horizontal_20_Line"/>
      <text:h text:style-name="Heading_20_2" text:outline-level="2">🏢 Multi-Tenancy</text:h>
      <text:h text:style-name="Heading_20_3" text:outline-level="3">Conceito</text:h>
      <text:p text:style-name="Text_20_body">Multi-tenancy permite que múltiplas empresas (tenants) usem a mesma aplicação, com dados completamente isolados entre si.</text:p>
      <text:h text:style-name="Heading_20_3" text:outline-level="3">Implementação</text:h>
      <text:h text:style-name="Heading_20_4" text:outline-level="4">1. Isolamento por empresa_id</text:h>
      <text:p text:style-name="Text_20_body">Todas as tabelas principais têm a coluna <text:span text:style-name="Source_20_Text">empresa_id</text:span>: - <text:span text:style-name="Source_20_Text">agendamento</text:span> - <text:span text:style-name="Source_20_Text">clientes</text:span> - <text:span text:style-name="Source_20_Text">profissional</text:span> - <text:span text:style-name="Source_20_Text">login</text:span></text:p>
      <text:h text:style-name="Heading_20_4" text:outline-level="4">2. Identificação da Empresa</text:h>
      <text:p text:style-name="Text_20_body"><text:span text:style-name="Strong_20_Emphasis">No Login</text:span>:</text:p>
      <text:p text:style-name="Preformatted_20_Text"><text:span text:style-name="Source_20_Text">// O token JWT inclui empresa_id</text:span></text:p>
      <text:p text:style-name="Preformatted_20_Text"><text:span text:style-name="Source_20_Text">const token = jwt.sign({ </text:span></text:p>
      <text:p text:style-name="Preformatted_20_Text"><text:span text:style-name="Source_20_Text"><text:s text:c="2"/>id, </text:span></text:p>
      <text:p text:style-name="Preformatted_20_Text"><text:soft-page-break/><text:span text:style-name="Source_20_Text"><text:s text:c="2"/>email, </text:span></text:p>
      <text:p text:style-name="Preformatted_20_Text"><text:span text:style-name="Source_20_Text"><text:s text:c="2"/>empresa_id, </text:span></text:p>
      <text:p text:style-name="Preformatted_20_Text"><text:span text:style-name="Source_20_Text"><text:s text:c="2"/>nivel_acesso_id </text:span></text:p>
      <text:p text:style-name="P2"><text:span text:style-name="Source_20_Text">}, JWT_SECRET)</text:span></text:p>
      <text:p text:style-name="Text_20_body"><text:span text:style-name="Strong_20_Emphasis">Nas Requisições</text:span>:</text:p>
      <text:p text:style-name="Preformatted_20_Text"><text:span text:style-name="Source_20_Text">// Middleware extrai empresa_id do token</text:span></text:p>
      <text:p text:style-name="P2"><text:span text:style-name="Source_20_Text">req.user.empresa_id</text:span></text:p>
      <text:h text:style-name="Heading_20_4" text:outline-level="4">3. Queries Filtradas</text:h>
      <text:p text:style-name="Text_20_body"><text:span text:style-name="Strong_20_Emphasis">Exemplo - Listar Agendamentos</text:span>:</text:p>
      <text:p text:style-name="Preformatted_20_Text"><text:span text:style-name="Source_20_Text">// Usuário normal</text:span></text:p>
      <text:p text:style-name="Preformatted_20_Text"><text:span text:style-name="Source_20_Text">SELECT * FROM agendamento </text:span></text:p>
      <text:p text:style-name="Preformatted_20_Text"><text:span text:style-name="Source_20_Text">WHERE empresa_id = $1</text:span></text:p>
      <text:p text:style-name="Preformatted_20_Text"/>
      <text:p text:style-name="Preformatted_20_Text"><text:span text:style-name="Source_20_Text">// Super Admin</text:span></text:p>
      <text:p text:style-name="P2"><text:span text:style-name="Source_20_Text">SELECT * FROM agendamento</text:span></text:p>
      <text:h text:style-name="Heading_20_4" text:outline-level="4">4. Instância WhatsApp</text:h>
      <text:p text:style-name="Text_20_body">A identificação da empresa em mensagens WhatsApp é feita por <text:span text:style-name="Source_20_Text">instancia_id</text:span>:</text:p>
      <text:p text:style-name="Preformatted_20_Text"><text:span text:style-name="Source_20_Text">// Mensagem chega com instancia_id</text:span></text:p>
      <text:p text:style-name="Preformatted_20_Text"><text:span text:style-name="Source_20_Text">const instancia_id = message.instance_id</text:span></text:p>
      <text:p text:style-name="Preformatted_20_Text"/>
      <text:p text:style-name="Preformatted_20_Text"><text:span text:style-name="Source_20_Text">// Backend busca empresa</text:span></text:p>
      <text:p text:style-name="Preformatted_20_Text"><text:span text:style-name="Source_20_Text">SELECT empresa_id FROM instancia </text:span></text:p>
      <text:p text:style-name="P2"><text:span text:style-name="Source_20_Text">WHERE instancia_id = $1</text:span></text:p>
      <text:h text:style-name="Heading_20_3" text:outline-level="3">Níveis de Acesso</text:h>
      <text:h text:style-name="Heading_20_4" text:outline-level="4">Super Admin (nivel_acesso_id = 1)</text:h>
      <text:list xml:id="list150105475" text:style-name="L35">
        <text:list-item>
          <text:p text:style-name="P72">✅ Acesso a todas as empresas </text:p>
        </text:list-item>
        <text:list-item>
          <text:p text:style-name="P72">✅ Criar novas empresas </text:p>
        </text:list-item>
        <text:list-item>
          <text:p text:style-name="P72">✅ Ver dashboard consolidado </text:p>
        </text:list-item>
        <text:list-item>
          <text:p text:style-name="P71">✅ Ver estatísticas por empresa </text:p>
        </text:list-item>
      </text:list>
      <text:h text:style-name="Heading_20_4" text:outline-level="4">Admin Empresa (nivel_acesso_id = 2)</text:h>
      <text:list xml:id="list2936960516" text:style-name="L36">
        <text:list-item>
          <text:p text:style-name="P74">✅ Acesso total à sua empresa </text:p>
        </text:list-item>
        <text:list-item>
          <text:p text:style-name="P74">✅ Gerenciar configurações </text:p>
        </text:list-item>
        <text:list-item>
          <text:p text:style-name="P74">✅ Gerenciar profissionais e serviços </text:p>
        </text:list-item>
        <text:list-item>
          <text:p text:style-name="P73">❌ Não vê outras empresas </text:p>
        </text:list-item>
      </text:list>
      <text:h text:style-name="Heading_20_4" text:outline-level="4">Usuário Normal (nivel_acesso_id &gt;= 3)</text:h>
      <text:list xml:id="list1819975561" text:style-name="L37">
        <text:list-item>
          <text:p text:style-name="P76">✅ Acesso limitado à sua empresa </text:p>
        </text:list-item>
        <text:list-item>
          <text:p text:style-name="P76">❌ Não pode alterar configurações </text:p>
        </text:list-item>
        <text:list-item>
          <text:p text:style-name="P75">❌ Não vê outras empresas </text:p>
        </text:list-item>
      </text:list>
      <text:p text:style-name="Horizontal_20_Line"/>
      <text:h text:style-name="Heading_20_2" text:outline-level="2">🚀 Instalação e Configuração</text:h>
      <text:h text:style-name="Heading_20_3" text:outline-level="3">Pré-requisitos</text:h>
      <text:list xml:id="list189362487" text:style-name="L38">
        <text:list-item>
          <text:p text:style-name="P78"><text:span text:style-name="Strong_20_Emphasis">Node.js</text:span>: v20.x ou superior </text:p>
        </text:list-item>
        <text:list-item>
          <text:p text:style-name="P78"><text:span text:style-name="Strong_20_Emphasis">PostgreSQL</text:span>: v12 ou superior </text:p>
        </text:list-item>
        <text:list-item>
          <text:p text:style-name="P78"><text:span text:style-name="Strong_20_Emphasis">NVM</text:span>: Node Version Manager (recomendado) </text:p>
        </text:list-item>
        <text:list-item>
          <text:p text:style-name="P77"><text:span text:style-name="Strong_20_Emphasis">Git</text:span>: Para controle de versão </text:p>
        </text:list-item>
      </text:list>
      <text:h text:style-name="Heading_20_3" text:outline-level="3">Passo 1: Clonar o Repositório</text:h>
      <text:p text:style-name="P2"><text:span text:style-name="Source_20_Text">cd /home/alex/Software/script/agendamento</text:span></text:p>
      <text:h text:style-name="Heading_20_3" text:outline-level="3">Passo 2: Configurar Node.js</text:h>
      <text:p text:style-name="Preformatted_20_Text"><text:span text:style-name="Source_20_Text"># Instalar NVM (se não tiver)</text:span></text:p>
      <text:p text:style-name="Preformatted_20_Text"><text:span text:style-name="Source_20_Text">curl -o- https://raw.githubusercontent.com/nvm-sh/nvm/v0.39.0/install.sh | bash</text:span></text:p>
      <text:p text:style-name="Preformatted_20_Text"/>
      <text:p text:style-name="Preformatted_20_Text"><text:span text:style-name="Source_20_Text"># Carregar NVM</text:span></text:p>
      <text:p text:style-name="Preformatted_20_Text"><text:span text:style-name="Source_20_Text">source ~/.bashrc</text:span></text:p>
      <text:p text:style-name="Preformatted_20_Text"/>
      <text:p text:style-name="Preformatted_20_Text"><text:span text:style-name="Source_20_Text"># Instalar Node.js v20</text:span></text:p>
      <text:p text:style-name="Preformatted_20_Text"><text:span text:style-name="Source_20_Text">nvm install 20</text:span></text:p>
      <text:p text:style-name="Preformatted_20_Text"><text:span text:style-name="Source_20_Text">nvm use 20</text:span></text:p>
      <text:p text:style-name="Preformatted_20_Text"/>
      <text:p text:style-name="Preformatted_20_Text"><text:span text:style-name="Source_20_Text"># Verificar versão</text:span></text:p>
      <text:p text:style-name="P2"><text:span text:style-name="Source_20_Text">node --version <text:s/># deve mostrar v20.x.x</text:span></text:p>
      <text:h text:style-name="Heading_20_3" text:outline-level="3">Passo 3: Configurar Backend</text:h>
      <text:p text:style-name="Preformatted_20_Text"><text:span text:style-name="Source_20_Text">cd api</text:span></text:p>
      <text:p text:style-name="Preformatted_20_Text"/>
      <text:p text:style-name="Preformatted_20_Text"><text:span text:style-name="Source_20_Text"># Instalar dependências</text:span></text:p>
      <text:p text:style-name="Preformatted_20_Text"><text:span text:style-name="Source_20_Text">npm install</text:span></text:p>
      <text:p text:style-name="Preformatted_20_Text"/>
      <text:p text:style-name="Preformatted_20_Text"><text:span text:style-name="Source_20_Text"># Criar arquivo .env</text:span></text:p>
      <text:p text:style-name="Preformatted_20_Text"><text:span text:style-name="Source_20_Text">cat &gt; .env &lt;&lt; EOF</text:span></text:p>
      <text:p text:style-name="Preformatted_20_Text"><text:span text:style-name="Source_20_Text">PORT=3001</text:span></text:p>
      <text:p text:style-name="Preformatted_20_Text"><text:span text:style-name="Source_20_Text">DATABASE_HOST=localhost</text:span></text:p>
      <text:p text:style-name="Preformatted_20_Text"><text:span text:style-name="Source_20_Text">DATABASE_PORT=5432</text:span></text:p>
      <text:p text:style-name="Preformatted_20_Text"><text:span text:style-name="Source_20_Text">DATABASE_NAME=agendamento</text:span></text:p>
      <text:p text:style-name="Preformatted_20_Text"><text:span text:style-name="Source_20_Text">DATABASE_USER=postgres</text:span></text:p>
      <text:p text:style-name="Preformatted_20_Text"><text:span text:style-name="Source_20_Text">DATABASE_PASSWORD=SUA_SENHA</text:span></text:p>
      <text:p text:style-name="Preformatted_20_Text"><text:span text:style-name="Source_20_Text">JWT_SECRET=$(openssl rand -base64 32)</text:span></text:p>
      <text:p text:style-name="Preformatted_20_Text"><text:span text:style-name="Source_20_Text">NODE_ENV=development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# Iniciar servidor</text:span></text:p>
      <text:p text:style-name="P2"><text:span text:style-name="Source_20_Text">npm run dev</text:span></text:p>
      <text:h text:style-name="Heading_20_3" text:outline-level="3">Passo 4: Configurar Frontend</text:h>
      <text:p text:style-name="Preformatted_20_Text"><text:span text:style-name="Source_20_Text">cd ../site</text:span></text:p>
      <text:p text:style-name="Preformatted_20_Text"/>
      <text:p text:style-name="Preformatted_20_Text"><text:span text:style-name="Source_20_Text"># Instalar dependências</text:span></text:p>
      <text:p text:style-name="Preformatted_20_Text"><text:span text:style-name="Source_20_Text">npm install</text:span></text:p>
      <text:p text:style-name="Preformatted_20_Text"/>
      <text:p text:style-name="Preformatted_20_Text"><text:span text:style-name="Source_20_Text"># Iniciar servidor de desenvolvimento</text:span></text:p>
      <text:p text:style-name="P2"><text:span text:style-name="Source_20_Text">npm run dev</text:span></text:p>
      <text:h text:style-name="Heading_20_3" text:outline-level="3">Passo 5: Configurar Banco de Dados</text:h>
      <text:p text:style-name="Preformatted_20_Text"><text:span text:style-name="Source_20_Text"># Conectar ao PostgreSQL</text:span></text:p>
      <text:p text:style-name="Preformatted_20_Text"><text:span text:style-name="Source_20_Text">psql -U postgres</text:span></text:p>
      <text:p text:style-name="Preformatted_20_Text"/>
      <text:p text:style-name="Preformatted_20_Text"><text:span text:style-name="Source_20_Text"># Criar banco de dados</text:span></text:p>
      <text:p text:style-name="Preformatted_20_Text"><text:span text:style-name="Source_20_Text">CREATE DATABASE agendamento;</text:span></text:p>
      <text:p text:style-name="Preformatted_20_Text"/>
      <text:p text:style-name="Preformatted_20_Text"><text:span text:style-name="Source_20_Text"># Sair do psql</text:span></text:p>
      <text:p text:style-name="Preformatted_20_Text"><text:span text:style-name="Source_20_Text">\q</text:span></text:p>
      <text:p text:style-name="Preformatted_20_Text"/>
      <text:p text:style-name="Preformatted_20_Text"><text:span text:style-name="Source_20_Text"># Restaurar estrutura</text:span></text:p>
      <text:p text:style-name="Preformatted_20_Text"><text:span text:style-name="Source_20_Text">psql -U postgres -d agendamento -f estrutura_banco.sql</text:span></text:p>
      <text:p text:style-name="Preformatted_20_Text"/>
      <text:p text:style-name="Preformatted_20_Text"><text:span text:style-name="Source_20_Text"># (Opcional) Restaurar backup</text:span></text:p>
      <text:p text:style-name="P2"><text:span text:style-name="Source_20_Text">psql -U postgres -d agendamento -f backup_25_10_25</text:span></text:p>
      <text:h text:style-name="Heading_20_3" text:outline-level="3">Passo 6: Acessar Aplicação</text:h>
      <text:list xml:id="list299662194" text:style-name="L39">
        <text:list-item>
          <text:p text:style-name="P80"><text:span text:style-name="Strong_20_Emphasis">Frontend</text:span>: http://localhost:5173 </text:p>
        </text:list-item>
        <text:list-item>
          <text:p text:style-name="P80"><text:span text:style-name="Strong_20_Emphasis">Backend</text:span>: http://localhost:3001 </text:p>
        </text:list-item>
        <text:list-item>
          <text:p text:style-name="P79"><text:span text:style-name="Strong_20_Emphasis">Login</text:span>: Use as credenciais do banco de dados </text:p>
        </text:list-item>
      </text:list>
      <text:h text:style-name="Heading_20_3" text:outline-level="3">Portas Utilizadas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Serviço</text:p>
            </table:table-cell>
            <table:table-cell table:style-name="Tabela3.A1" office:value-type="string">
              <text:p text:style-name="Table_20_Heading">Porta</text:p>
            </table:table-cell>
          </table:table-row>
        </table:table-header-rows>
        <table:table-row>
          <table:table-cell table:style-name="Tabela3.A1" office:value-type="string">
            <text:p text:style-name="Table_20_Contents">Frontend (Vite)</text:p>
          </table:table-cell>
          <table:table-cell table:style-name="Tabela3.A1" office:value-type="string">
            <text:p text:style-name="Table_20_Contents">5173</text:p>
          </table:table-cell>
        </table:table-row>
        <table:table-row>
          <table:table-cell table:style-name="Tabela3.A1" office:value-type="string">
            <text:p text:style-name="Table_20_Contents">Backend (Express)</text:p>
          </table:table-cell>
          <table:table-cell table:style-name="Tabela3.A1" office:value-type="string">
            <text:p text:style-name="Table_20_Contents">3001</text:p>
          </table:table-cell>
        </table:table-row>
        <table:table-row>
          <table:table-cell table:style-name="Tabela3.A1" office:value-type="string">
            <text:p text:style-name="Table_20_Contents">PostgreSQL</text:p>
          </table:table-cell>
          <table:table-cell table:style-name="Tabela3.A1" office:value-type="string">
            <text:p text:style-name="Table_20_Contents">5432</text:p>
          </table:table-cell>
        </table:table-row>
      </table:table>
      <text:p text:style-name="Horizontal_20_Line"/>
      <text:h text:style-name="Heading_20_2" text:outline-level="2">👨‍💻 Guia de Desenvolvimento</text:h>
      <text:h text:style-name="Heading_20_3" text:outline-level="3">Estrutura de Commits</text:h>
      <text:p text:style-name="Preformatted_20_Text"><text:span text:style-name="Source_20_Text"># Formato recomendado</text:span></text:p>
      <text:p text:style-name="Preformatted_20_Text"><text:span text:style-name="Source_20_Text">git commit -m "tipo: descrição curta"</text:span></text:p>
      <text:p text:style-name="Preformatted_20_Text"/>
      <text:p text:style-name="Preformatted_20_Text"><text:span text:style-name="Source_20_Text"># Tipos:</text:span></text:p>
      <text:p text:style-name="Preformatted_20_Text"><text:span text:style-name="Source_20_Text"># feat: Nova funcionalidade</text:span></text:p>
      <text:p text:style-name="Preformatted_20_Text"><text:span text:style-name="Source_20_Text"># fix: Correção de bug</text:span></text:p>
      <text:p text:style-name="Preformatted_20_Text"><text:span text:style-name="Source_20_Text"># docs: Documentação</text:span></text:p>
      <text:p text:style-name="Preformatted_20_Text"><text:span text:style-name="Source_20_Text"># style: Formatação (não afeta código)</text:span></text:p>
      <text:p text:style-name="Preformatted_20_Text"><text:span text:style-name="Source_20_Text"># refactor: Refatoração</text:span></text:p>
      <text:p text:style-name="Preformatted_20_Text"><text:span text:style-name="Source_20_Text"># test: Testes</text:span></text:p>
      <text:p text:style-name="P2"><text:span text:style-name="Source_20_Text"># chore: Tarefas de manutenção</text:span></text:p>
      <text:p text:style-name="Text_20_body"><text:span text:style-name="Strong_20_Emphasis">Exemplos</text:span>:</text:p>
      <text:p text:style-name="Preformatted_20_Text"><text:span text:style-name="Source_20_Text">git commit -m "feat: adicionar gráfico de linhas no dashboard"</text:span></text:p>
      <text:p text:style-name="Preformatted_20_Text"><text:span text:style-name="Source_20_Text">git commit -m "fix: corrigir filtro multi-tenant em agendamentos"</text:span></text:p>
      <text:p text:style-name="P2"><text:span text:style-name="Source_20_Text">git commit -m "docs: atualizar documentação da API"</text:span></text:p>
      <text:h text:style-name="Heading_20_3" text:outline-level="3">Boas Práticas</text:h>
      <text:h text:style-name="Heading_20_4" text:outline-level="4">Backend</text:h>
      <text:list xml:id="list1662346264" text:style-name="L40">
        <text:list-item>
          <text:p text:style-name="P81"><text:span text:style-name="Strong_20_Emphasis">Sempre usar transações para operações múltiplas</text:span>: </text:p>
        </text:list-item>
      </text:list>
      <text:p text:style-name="Preformatted_20_Text"><text:span text:style-name="Source_20_Text">const client = await pool.connect()</text:span></text:p>
      <text:p text:style-name="Preformatted_20_Text"><text:span text:style-name="Source_20_Text">try {</text:span></text:p>
      <text:p text:style-name="Preformatted_20_Text"><text:span text:style-name="Source_20_Text"><text:s text:c="2"/>await client.query('BEGIN')</text:span></text:p>
      <text:p text:style-name="Preformatted_20_Text"><text:span text:style-name="Source_20_Text"><text:s text:c="2"/>// operações</text:span></text:p>
      <text:p text:style-name="Preformatted_20_Text"><text:span text:style-name="Source_20_Text"><text:s text:c="2"/>await client.query('COMMIT')</text:span></text:p>
      <text:p text:style-name="Preformatted_20_Text"><text:span text:style-name="Source_20_Text">} catch (error) {</text:span></text:p>
      <text:p text:style-name="Preformatted_20_Text"><text:soft-page-break/><text:span text:style-name="Source_20_Text"><text:s text:c="2"/>await client.query('ROLLBACK')</text:span></text:p>
      <text:p text:style-name="Preformatted_20_Text"><text:span text:style-name="Source_20_Text"><text:s text:c="2"/>throw error</text:span></text:p>
      <text:p text:style-name="Preformatted_20_Text"><text:span text:style-name="Source_20_Text">} finally {</text:span></text:p>
      <text:p text:style-name="Preformatted_20_Text"><text:span text:style-name="Source_20_Text"><text:s text:c="2"/>client.release()</text:span></text:p>
      <text:p text:style-name="P2"><text:span text:style-name="Source_20_Text">}</text:span></text:p>
      <text:list xml:id="list1142103987" text:style-name="L41">
        <text:list-item>
          <text:p text:style-name="P82"><text:span text:style-name="Strong_20_Emphasis">Validar entrada de dados</text:span>: </text:p>
        </text:list-item>
      </text:list>
      <text:p text:style-name="Preformatted_20_Text"><text:span text:style-name="Source_20_Text">if (!email || !senha) {</text:span></text:p>
      <text:p text:style-name="Preformatted_20_Text"><text:span text:style-name="Source_20_Text"><text:s text:c="2"/>return res.status(400).json({</text:span></text:p>
      <text:p text:style-name="Preformatted_20_Text"><text:span text:style-name="Source_20_Text"><text:s text:c="4"/>success: false,</text:span></text:p>
      <text:p text:style-name="Preformatted_20_Text"><text:span text:style-name="Source_20_Text"><text:s text:c="4"/>message: 'Email e senha são obrigatórios'</text:span></text:p>
      <text:p text:style-name="Preformatted_20_Text"><text:span text:style-name="Source_20_Text"><text:s text:c="2"/>})</text:span></text:p>
      <text:p text:style-name="P2"><text:span text:style-name="Source_20_Text">}</text:span></text:p>
      <text:list xml:id="list2998331631" text:style-name="L42">
        <text:list-item>
          <text:p text:style-name="P83"><text:span text:style-name="Strong_20_Emphasis">Usar prepared statements (proteção SQL injection)</text:span>: </text:p>
        </text:list-item>
      </text:list>
      <text:p text:style-name="Preformatted_20_Text"><text:span text:style-name="Source_20_Text">// BOM</text:span></text:p>
      <text:p text:style-name="Preformatted_20_Text"><text:span text:style-name="Source_20_Text">const result = await pool.query(</text:span></text:p>
      <text:p text:style-name="Preformatted_20_Text"><text:span text:style-name="Source_20_Text"><text:s text:c="2"/>'SELECT * FROM login WHERE email = $1',</text:span></text:p>
      <text:p text:style-name="Preformatted_20_Text"><text:span text:style-name="Source_20_Text"><text:s text:c="2"/>[email]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// RUIM (vulnerável a SQL injection)</text:span></text:p>
      <text:p text:style-name="Preformatted_20_Text"><text:span text:style-name="Source_20_Text">const result = await pool.query(</text:span></text:p>
      <text:p text:style-name="Preformatted_20_Text"><text:span text:style-name="Source_20_Text"><text:s text:c="2"/>`SELECT * FROM login WHERE email = '${email}'`</text:span></text:p>
      <text:p text:style-name="P2"><text:span text:style-name="Source_20_Text">)</text:span></text:p>
      <text:list xml:id="list3281385655" text:style-name="L43">
        <text:list-item>
          <text:p text:style-name="P84"><text:span text:style-name="Strong_20_Emphasis">Tratar erros adequadamente</text:span>: </text:p>
        </text:list-item>
      </text:list>
      <text:p text:style-name="Preformatted_20_Text"><text:span text:style-name="Source_20_Text">try {</text:span></text:p>
      <text:p text:style-name="Preformatted_20_Text"><text:span text:style-name="Source_20_Text"><text:s text:c="2"/>// código</text:span></text:p>
      <text:p text:style-name="Preformatted_20_Text"><text:span text:style-name="Source_20_Text">} catch (error) {</text:span></text:p>
      <text:p text:style-name="Preformatted_20_Text"><text:span text:style-name="Source_20_Text"><text:s text:c="2"/>console.error('Erro detalhado:', error)</text:span></text:p>
      <text:p text:style-name="Preformatted_20_Text"><text:span text:style-name="Source_20_Text"><text:s text:c="2"/>res.status(500).json({</text:span></text:p>
      <text:p text:style-name="Preformatted_20_Text"><text:span text:style-name="Source_20_Text"><text:s text:c="4"/>success: false,</text:span></text:p>
      <text:p text:style-name="Preformatted_20_Text"><text:span text:style-name="Source_20_Text"><text:s text:c="4"/>message: 'Mensagem amigável para o usuário',</text:span></text:p>
      <text:p text:style-name="Preformatted_20_Text"><text:span text:style-name="Source_20_Text"><text:s text:c="4"/>error: process.env.NODE_ENV === 'development' ? error.message : undefined</text:span></text:p>
      <text:p text:style-name="Preformatted_20_Text"><text:span text:style-name="Source_20_Text"><text:s text:c="2"/>})</text:span></text:p>
      <text:p text:style-name="P2"><text:span text:style-name="Source_20_Text">}</text:span></text:p>
      <text:h text:style-name="Heading_20_4" text:outline-level="4">Frontend</text:h>
      <text:list xml:id="list148471286" text:style-name="L44">
        <text:list-item>
          <text:p text:style-name="P85"><text:span text:style-name="Strong_20_Emphasis">Usar hooks corretamente</text:span>: </text:p>
        </text:list-item>
      </text:list>
      <text:p text:style-name="Preformatted_20_Text"><text:span text:style-name="Source_20_Text">// useEffect para carregar dados</text:span></text:p>
      <text:p text:style-name="Preformatted_20_Text"><text:span text:style-name="Source_20_Text">useEffect(() =&gt; {</text:span></text:p>
      <text:p text:style-name="Preformatted_20_Text"><text:span text:style-name="Source_20_Text"><text:s text:c="2"/>async function carregarDados() {</text:span></text:p>
      <text:p text:style-name="Preformatted_20_Text"><text:span text:style-name="Source_20_Text"><text:s text:c="4"/>const data = await service.getData()</text:span></text:p>
      <text:p text:style-name="Preformatted_20_Text"><text:span text:style-name="Source_20_Text"><text:s text:c="4"/>setData(data)</text:span></text:p>
      <text:p text:style-name="Preformatted_20_Text"><text:span text:style-name="Source_20_Text"><text:s text:c="2"/>}</text:span></text:p>
      <text:p text:style-name="Preformatted_20_Text"><text:span text:style-name="Source_20_Text"><text:s text:c="2"/>carregarDados()</text:span></text:p>
      <text:p text:style-name="P2"><text:span text:style-name="Source_20_Text">}, []) // dependências corretas</text:span></text:p>
      <text:list xml:id="list3296755379" text:style-name="L45">
        <text:list-item>
          <text:p text:style-name="P86"><text:span text:style-name="Strong_20_Emphasis">Validar formulários</text:span>: </text:p>
        </text:list-item>
      </text:list>
      <text:p text:style-name="Preformatted_20_Text"><text:span text:style-name="Source_20_Text">const handleSubmit = (e) =&gt; {</text:span></text:p>
      <text:p text:style-name="Preformatted_20_Text"><text:span text:style-name="Source_20_Text"><text:s text:c="2"/>e.preventDefault()</text:span></text:p>
      <text:p text:style-name="Preformatted_20_Text"/>
      <text:p text:style-name="Preformatted_20_Text"><text:span text:style-name="Source_20_Text"><text:s text:c="2"/>if (!email || !senha) {</text:span></text:p>
      <text:p text:style-name="Preformatted_20_Text"><text:span text:style-name="Source_20_Text"><text:s text:c="4"/>setError('Preencha todos os campos')</text:span></text:p>
      <text:p text:style-name="Preformatted_20_Text"><text:span text:style-name="Source_20_Text"><text:s text:c="4"/>return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// continuar</text:span></text:p>
      <text:p text:style-name="P2"><text:span text:style-name="Source_20_Text">}</text:span></text:p>
      <text:list xml:id="list2374678064" text:style-name="L46">
        <text:list-item>
          <text:p text:style-name="P87"><text:span text:style-name="Strong_20_Emphasis">Feedback visual</text:span>: </text:p>
        </text:list-item>
      </text:list>
      <text:p text:style-name="Preformatted_20_Text"><text:span text:style-name="Source_20_Text">const [loading, setLoading] = useState(false)</text:span></text:p>
      <text:p text:style-name="Preformatted_20_Text"/>
      <text:p text:style-name="Preformatted_20_Text"><text:span text:style-name="Source_20_Text">const handleAction = async () =&gt; {</text:span></text:p>
      <text:p text:style-name="Preformatted_20_Text"><text:span text:style-name="Source_20_Text"><text:s text:c="2"/>setLoading(true)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await service.action()</text:span></text:p>
      <text:p text:style-name="Preformatted_20_Text"><text:span text:style-name="Source_20_Text"><text:s text:c="4"/>// sucesso</text:span></text:p>
      <text:p text:style-name="Preformatted_20_Text"><text:span text:style-name="Source_20_Text"><text:s text:c="2"/>} catch (error) {</text:span></text:p>
      <text:p text:style-name="Preformatted_20_Text"><text:span text:style-name="Source_20_Text"><text:s text:c="4"/>// erro</text:span></text:p>
      <text:p text:style-name="Preformatted_20_Text"><text:span text:style-name="Source_20_Text"><text:s text:c="2"/>} finally {</text:span></text:p>
      <text:p text:style-name="Preformatted_20_Text"><text:span text:style-name="Source_20_Text"><text:s text:c="4"/>setLoading(false)</text:span></text:p>
      <text:p text:style-name="Preformatted_20_Text"><text:span text:style-name="Source_20_Text"><text:s text:c="2"/>}</text:span></text:p>
      <text:p text:style-name="P2"><text:span text:style-name="Source_20_Text">}</text:span></text:p>
      <text:list xml:id="list2583617383" text:style-name="L47">
        <text:list-item>
          <text:p text:style-name="P88"><text:span text:style-name="Strong_20_Emphasis">Componentização</text:span>: </text:p>
        </text:list-item>
      </text:list>
      <text:p text:style-name="Preformatted_20_Text"><text:span text:style-name="Source_20_Text">// Dividir componentes grandes em menores</text:span></text:p>
      <text:p text:style-name="Preformatted_20_Text"><text:span text:style-name="Source_20_Text">// Reutilizar componentes comuns (Button, Input, Card)</text:span></text:p>
      <text:p text:style-name="P2"><text:span text:style-name="Source_20_Text">// Manter componentes focados em uma responsabilidade</text:span></text:p>
      <text:h text:style-name="Heading_20_3" text:outline-level="3">Adicionando Nova Funcionalidade</text:h>
      <text:h text:style-name="Heading_20_4" text:outline-level="4">Exemplo: Adicionar página de Relatórios</text:h>
      <text:p text:style-name="Text_20_body"><text:span text:style-name="Strong_20_Emphasis">1. Backend - Model</text:span>:</text:p>
      <text:p text:style-name="Preformatted_20_Text"><text:span text:style-name="Source_20_Text">// api/src/models/relatorios.model.js</text:span></text:p>
      <text:p text:style-name="Preformatted_20_Text"><text:span text:style-name="Source_20_Text">export async function getRelatorioMensal(empresaId, mes, ano) {</text:span></text:p>
      <text:p text:style-name="Preformatted_20_Text"><text:span text:style-name="Source_20_Text"><text:s text:c="2"/>const query = `</text:span></text:p>
      <text:p text:style-name="Preformatted_20_Text"><text:span text:style-name="Source_20_Text"><text:s text:c="4"/>SELECT </text:span></text:p>
      <text:p text:style-name="Preformatted_20_Text"><text:span text:style-name="Source_20_Text"><text:s text:c="6"/>COUNT(*) as total_agendamentos,</text:span></text:p>
      <text:p text:style-name="Preformatted_20_Text"><text:span text:style-name="Source_20_Text"><text:s text:c="6"/>SUM(agend_valor) as receita_total</text:span></text:p>
      <text:p text:style-name="Preformatted_20_Text"><text:span text:style-name="Source_20_Text"><text:s text:c="4"/>FROM agendamento</text:span></text:p>
      <text:p text:style-name="Preformatted_20_Text"><text:span text:style-name="Source_20_Text"><text:s text:c="4"/>WHERE empresa_id = $1</text:span></text:p>
      <text:p text:style-name="Preformatted_20_Text"><text:span text:style-name="Source_20_Text"><text:s text:c="4"/>AND EXTRACT(MONTH FROM agend_data) = $2</text:span></text:p>
      <text:p text:style-name="Preformatted_20_Text"><text:span text:style-name="Source_20_Text"><text:s text:c="4"/>AND EXTRACT(YEAR FROM agend_data) = $3</text:span></text:p>
      <text:p text:style-name="Preformatted_20_Text"><text:span text:style-name="Source_20_Text"><text:s text:c="2"/>`</text:span></text:p>
      <text:p text:style-name="Preformatted_20_Text"><text:span text:style-name="Source_20_Text"><text:s text:c="2"/>const result = await pool.query(query, [empresaId, mes, ano])</text:span></text:p>
      <text:p text:style-name="Preformatted_20_Text"><text:span text:style-name="Source_20_Text"><text:s text:c="2"/>return result.rows[0]</text:span></text:p>
      <text:p text:style-name="P2"><text:span text:style-name="Source_20_Text">}</text:span></text:p>
      <text:p text:style-name="Text_20_body"><text:span text:style-name="Strong_20_Emphasis">2. Backend - Controller</text:span>:</text:p>
      <text:p text:style-name="Preformatted_20_Text"><text:span text:style-name="Source_20_Text">// api/src/controllers/relatorios.controller.js</text:span></text:p>
      <text:p text:style-name="Preformatted_20_Text"><text:span text:style-name="Source_20_Text">export async function getRelatorioMensal(req, res)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const empresaId = req.user.empresa_id</text:span></text:p>
      <text:p text:style-name="Preformatted_20_Text"><text:span text:style-name="Source_20_Text"><text:s text:c="4"/>const { mes, ano } = req.query</text:span></text:p>
      <text:p text:style-name="Preformatted_20_Text"/>
      <text:p text:style-name="Preformatted_20_Text"><text:span text:style-name="Source_20_Text"><text:s text:c="4"/>const data = await relatoriosModel.getRelatorioMensal(</text:span></text:p>
      <text:p text:style-name="Preformatted_20_Text"><text:span text:style-name="Source_20_Text"><text:s text:c="6"/>empresaId, </text:span></text:p>
      <text:p text:style-name="Preformatted_20_Text"><text:span text:style-name="Source_20_Text"><text:s text:c="6"/>mes, </text:span></text:p>
      <text:p text:style-name="Preformatted_20_Text"><text:span text:style-name="Source_20_Text"><text:s text:c="6"/>ano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res.json({ success: true, data })</text:span></text:p>
      <text:p text:style-name="Preformatted_20_Text"><text:span text:style-name="Source_20_Text"><text:s text:c="2"/>} catch (error) {</text:span></text:p>
      <text:p text:style-name="Preformatted_20_Text"><text:span text:style-name="Source_20_Text"><text:s text:c="4"/>console.error('Erro:', error)</text:span></text:p>
      <text:p text:style-name="Preformatted_20_Text"><text:span text:style-name="Source_20_Text"><text:s text:c="4"/>res.status(500).json({</text:span></text:p>
      <text:p text:style-name="Preformatted_20_Text"><text:span text:style-name="Source_20_Text"><text:s text:c="6"/>success: false,</text:span></text:p>
      <text:p text:style-name="Preformatted_20_Text"><text:span text:style-name="Source_20_Text"><text:s text:c="6"/>message: 'Erro ao gerar relatório'</text:span></text:p>
      <text:p text:style-name="Preformatted_20_Text"><text:span text:style-name="Source_20_Text"><text:s text:c="4"/>})</text:span></text:p>
      <text:p text:style-name="Preformatted_20_Text"><text:span text:style-name="Source_20_Text"><text:s text:c="2"/>}</text:span></text:p>
      <text:p text:style-name="P2"><text:span text:style-name="Source_20_Text">}</text:span></text:p>
      <text:p text:style-name="Text_20_body"><text:span text:style-name="Strong_20_Emphasis">3. Backend - Route</text:span>:</text:p>
      <text:p text:style-name="Preformatted_20_Text"><text:span text:style-name="Source_20_Text">// api/src/routes/relatorios.routes.js</text:span></text:p>
      <text:p text:style-name="Preformatted_20_Text"><text:span text:style-name="Source_20_Text">import express from 'express'</text:span></text:p>
      <text:p text:style-name="Preformatted_20_Text"><text:span text:style-name="Source_20_Text">import * as controller from '../controllers/relatorios.controller.js'</text:span></text:p>
      <text:p text:style-name="Preformatted_20_Text"/>
      <text:p text:style-name="Preformatted_20_Text"><text:span text:style-name="Source_20_Text">const router = express.Router()</text:span></text:p>
      <text:p text:style-name="Preformatted_20_Text"/>
      <text:p text:style-name="Preformatted_20_Text"><text:span text:style-name="Source_20_Text">router.get('/mensal', controller.getRelatorioMensal)</text:span></text:p>
      <text:p text:style-name="Preformatted_20_Text"/>
      <text:p text:style-name="P2"><text:span text:style-name="Source_20_Text">export default router</text:span></text:p>
      <text:p text:style-name="Text_20_body"><text:span text:style-name="Strong_20_Emphasis">4. Backend - Registrar rota</text:span>:</text:p>
      <text:p text:style-name="Preformatted_20_Text"><text:span text:style-name="Source_20_Text">// api/src/app.js</text:span></text:p>
      <text:p text:style-name="Preformatted_20_Text"><text:span text:style-name="Source_20_Text">import relatoriosRoutes from './routes/relatorios.routes.js'</text:span></text:p>
      <text:p text:style-name="Preformatted_20_Text"/>
      <text:p text:style-name="P2"><text:span text:style-name="Source_20_Text">app.use('/api/relatorios', authenticateToken, relatoriosRoutes)</text:span></text:p>
      <text:p text:style-name="Text_20_body"><text:span text:style-name="Strong_20_Emphasis">5. Frontend - Service</text:span>:</text:p>
      <text:p text:style-name="Preformatted_20_Text"><text:span text:style-name="Source_20_Text">// site/src/services/relatorios.service.js</text:span></text:p>
      <text:p text:style-name="Preformatted_20_Text"><text:span text:style-name="Source_20_Text">import api from './api'</text:span></text:p>
      <text:p text:style-name="Preformatted_20_Text"/>
      <text:p text:style-name="Preformatted_20_Text"><text:span text:style-name="Source_20_Text">const relatoriosService = {</text:span></text:p>
      <text:p text:style-name="Preformatted_20_Text"><text:span text:style-name="Source_20_Text"><text:s text:c="2"/>getRelatorioMensal: async (mes, ano) =&gt; {</text:span></text:p>
      <text:p text:style-name="Preformatted_20_Text"><text:span text:style-name="Source_20_Text"><text:s text:c="4"/>const response = await api.get('/relatorios/mensal', {</text:span></text:p>
      <text:p text:style-name="Preformatted_20_Text"><text:span text:style-name="Source_20_Text"><text:s text:c="6"/>params: { mes, ano }</text:span></text:p>
      <text:p text:style-name="Preformatted_20_Text"><text:span text:style-name="Source_20_Text"><text:s text:c="4"/>})</text:span></text:p>
      <text:p text:style-name="Preformatted_20_Text"><text:span text:style-name="Source_20_Text"><text:s text:c="4"/>return response.data.data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><text:soft-page-break/></text:p>
      <text:p text:style-name="P2"><text:span text:style-name="Source_20_Text">export default relatoriosService</text:span></text:p>
      <text:p text:style-name="Text_20_body"><text:span text:style-name="Strong_20_Emphasis">6. Frontend - Página</text:span>:</text:p>
      <text:p text:style-name="Preformatted_20_Text"><text:span text:style-name="Source_20_Text">// site/src/pages/Relatorios/index.jsx</text:span></text:p>
      <text:p text:style-name="Preformatted_20_Text"><text:span text:style-name="Source_20_Text">import { useState, useEffect } from 'react'</text:span></text:p>
      <text:p text:style-name="Preformatted_20_Text"><text:span text:style-name="Source_20_Text">import relatoriosService from '../../services/relatorios.service'</text:span></text:p>
      <text:p text:style-name="Preformatted_20_Text"><text:span text:style-name="Source_20_Text">import Card, { CardHeader, CardBody } from '../../components/ui/Card'</text:span></text:p>
      <text:p text:style-name="Preformatted_20_Text"/>
      <text:p text:style-name="Preformatted_20_Text"><text:span text:style-name="Source_20_Text">export default function Relatorios() {</text:span></text:p>
      <text:p text:style-name="Preformatted_20_Text"><text:span text:style-name="Source_20_Text"><text:s text:c="2"/>const [dados, setDados] = useState(null)</text:span></text:p>
      <text:p text:style-name="Preformatted_20_Text"><text:span text:style-name="Source_20_Text"><text:s text:c="2"/>const [loading, setLoading] = useState(true)</text:span></text:p>
      <text:p text:style-name="Preformatted_20_Text"/>
      <text:p text:style-name="Preformatted_20_Text"><text:span text:style-name="Source_20_Text"><text:s text:c="2"/>useEffect(() =&gt; {</text:span></text:p>
      <text:p text:style-name="Preformatted_20_Text"><text:span text:style-name="Source_20_Text"><text:s text:c="4"/>async function carregarDados() {</text:span></text:p>
      <text:p text:style-name="Preformatted_20_Text"><text:span text:style-name="Source_20_Text"><text:s text:c="6"/>try {</text:span></text:p>
      <text:p text:style-name="Preformatted_20_Text"><text:span text:style-name="Source_20_Text"><text:s text:c="8"/>const mes = new Date().getMonth() + 1</text:span></text:p>
      <text:p text:style-name="Preformatted_20_Text"><text:span text:style-name="Source_20_Text"><text:s text:c="8"/>const ano = new Date().getFullYear()</text:span></text:p>
      <text:p text:style-name="Preformatted_20_Text"><text:span text:style-name="Source_20_Text"><text:s text:c="8"/>const data = await relatoriosService.getRelatorioMensal(mes, ano)</text:span></text:p>
      <text:p text:style-name="Preformatted_20_Text"><text:span text:style-name="Source_20_Text"><text:s text:c="8"/>setDados(data)</text:span></text:p>
      <text:p text:style-name="Preformatted_20_Text"><text:span text:style-name="Source_20_Text"><text:s text:c="6"/>} catch (error) {</text:span></text:p>
      <text:p text:style-name="Preformatted_20_Text"><text:span text:style-name="Source_20_Text"><text:s text:c="8"/>console.error('Erro:', error)</text:span></text:p>
      <text:p text:style-name="Preformatted_20_Text"><text:span text:style-name="Source_20_Text"><text:s text:c="6"/>} finally {</text:span></text:p>
      <text:p text:style-name="Preformatted_20_Text"><text:span text:style-name="Source_20_Text"><text:s text:c="8"/>setLoading(false)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carregarDados()</text:span></text:p>
      <text:p text:style-name="Preformatted_20_Text"><text:span text:style-name="Source_20_Text"><text:s text:c="2"/>}, [])</text:span></text:p>
      <text:p text:style-name="Preformatted_20_Text"/>
      <text:p text:style-name="Preformatted_20_Text"><text:span text:style-name="Source_20_Text"><text:s text:c="2"/>if (loading) return &lt;div&gt;Carregando...&lt;/div&gt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div&gt;</text:span></text:p>
      <text:p text:style-name="Preformatted_20_Text"><text:span text:style-name="Source_20_Text"><text:s text:c="6"/>&lt;h1 className="text-2xl font-bold mb-6"&gt;Relatórios&lt;/h1&gt;</text:span></text:p>
      <text:p text:style-name="Preformatted_20_Text"><text:span text:style-name="Source_20_Text"><text:s text:c="6"/>&lt;Card&gt;</text:span></text:p>
      <text:p text:style-name="Preformatted_20_Text"><text:span text:style-name="Source_20_Text"><text:s text:c="8"/>&lt;CardHeader&gt;</text:span></text:p>
      <text:p text:style-name="Preformatted_20_Text"><text:span text:style-name="Source_20_Text"><text:s text:c="10"/>&lt;h3&gt;Relatório Mensal&lt;/h3&gt;</text:span></text:p>
      <text:p text:style-name="Preformatted_20_Text"><text:span text:style-name="Source_20_Text"><text:s text:c="8"/>&lt;/CardHeader&gt;</text:span></text:p>
      <text:p text:style-name="Preformatted_20_Text"><text:span text:style-name="Source_20_Text"><text:s text:c="8"/>&lt;CardBody&gt;</text:span></text:p>
      <text:p text:style-name="Preformatted_20_Text"><text:span text:style-name="Source_20_Text"><text:s text:c="10"/>&lt;p&gt;Total de Agendamentos: {dados?.total_agendamentos}&lt;/p&gt;</text:span></text:p>
      <text:p text:style-name="Preformatted_20_Text"><text:span text:style-name="Source_20_Text"><text:s text:c="10"/>&lt;p&gt;Receita Total: R$ {dados?.receita_total}&lt;/p&gt;</text:span></text:p>
      <text:p text:style-name="Preformatted_20_Text"><text:span text:style-name="Source_20_Text"><text:s text:c="8"/>&lt;/CardBody&gt;</text:span></text:p>
      <text:p text:style-name="Preformatted_20_Text"><text:span text:style-name="Source_20_Text"><text:s text:c="6"/>&lt;/Card&gt;</text:span></text:p>
      <text:p text:style-name="Preformatted_20_Text"><text:span text:style-name="Source_20_Text"><text:s text:c="4"/>&lt;/div&gt;</text:span></text:p>
      <text:p text:style-name="Preformatted_20_Text"><text:span text:style-name="Source_20_Text"><text:s text:c="2"/>)</text:span></text:p>
      <text:p text:style-name="P2"><text:span text:style-name="Source_20_Text">}</text:span></text:p>
      <text:p text:style-name="Text_20_body"><text:span text:style-name="Strong_20_Emphasis">7. Frontend - Adicionar rota</text:span>:</text:p>
      <text:p text:style-name="Preformatted_20_Text"><text:span text:style-name="Source_20_Text">// site/src/router.jsx</text:span></text:p>
      <text:p text:style-name="Preformatted_20_Text"><text:span text:style-name="Source_20_Text">import Relatorios from './pages/Relatorios'</text:span></text:p>
      <text:p text:style-name="Preformatted_20_Text"/>
      <text:p text:style-name="P2"><text:span text:style-name="Source_20_Text">&lt;Route path="/relatorios" element={&lt;Relatorios /&gt;} /&gt;</text:span></text:p>
      <text:p text:style-name="Text_20_body"><text:span text:style-name="Strong_20_Emphasis">8. Frontend - Adicionar ao menu</text:span>:</text:p>
      <text:p text:style-name="Preformatted_20_Text"><text:span text:style-name="Source_20_Text">// site/src/components/layout/Sidebar.jsx</text:span></text:p>
      <text:p text:style-name="Preformatted_20_Text"><text:span text:style-name="Source_20_Text">import { FileText } from 'lucide-react'</text:span></text:p>
      <text:p text:style-name="Preformatted_20_Text"/>
      <text:p text:style-name="Preformatted_20_Text"><text:span text:style-name="Source_20_Text">const menuItems = [</text:span></text:p>
      <text:p text:style-name="Preformatted_20_Text"><text:span text:style-name="Source_20_Text"><text:s text:c="2"/>// ... outros itens</text:span></text:p>
      <text:p text:style-name="Preformatted_20_Text"><text:span text:style-name="Source_20_Text"><text:s text:c="2"/>{ path: '/relatorios', label: 'Relatórios', icon: FileText },</text:span></text:p>
      <text:p text:style-name="P2"><text:span text:style-name="Source_20_Text">]</text:span></text:p>
      <text:p text:style-name="Horizontal_20_Line"/>
      <text:h text:style-name="Heading_20_2" text:outline-level="2">🐛 Troubleshooting</text:h>
      <text:h text:style-name="Heading_20_3" text:outline-level="3">Problemas Comuns</text:h>
      <text:h text:style-name="Heading_20_4" text:outline-level="4">1. Erro: "Cannot find module"</text:h>
      <text:p text:style-name="Text_20_body"><text:span text:style-name="Strong_20_Emphasis">Causa</text:span>: Dependências não instaladas ou versão errada do Node.js</text:p>
      <text:p text:style-name="Text_20_body"><text:span text:style-name="Strong_20_Emphasis">Solução</text:span>:</text:p>
      <text:p text:style-name="Preformatted_20_Text"><text:span text:style-name="Source_20_Text"># Verificar versão do Node</text:span></text:p>
      <text:p text:style-name="Preformatted_20_Text"><text:span text:style-name="Source_20_Text">node --version <text:s/># deve ser v20.x</text:span></text:p>
      <text:p text:style-name="Preformatted_20_Text"/>
      <text:p text:style-name="Preformatted_20_Text"><text:span text:style-name="Source_20_Text"># Reinstalar dependências</text:span></text:p>
      <text:p text:style-name="Preformatted_20_Text"><text:span text:style-name="Source_20_Text">rm -rf node_modules package-lock.json</text:span></text:p>
      <text:p text:style-name="P2"><text:span text:style-name="Source_20_Text">npm install</text:span></text:p>
      <text:h text:style-name="Heading_20_4" text:outline-level="4">2. Erro: "EADDRINUSE: address already in use"</text:h>
      <text:p text:style-name="Text_20_body"><text:span text:style-name="Strong_20_Emphasis">Causa</text:span>: Porta já está sendo usada</text:p>
      <text:p text:style-name="Text_20_body"><text:span text:style-name="Strong_20_Emphasis">Solução</text:span>:</text:p>
      <text:p text:style-name="Preformatted_20_Text"><text:span text:style-name="Source_20_Text"># Encontrar processo usando a porta</text:span></text:p>
      <text:p text:style-name="Preformatted_20_Text"><text:span text:style-name="Source_20_Text">lsof -i :3001 <text:s/># ou :5173</text:span></text:p>
      <text:p text:style-name="Preformatted_20_Text"/>
      <text:p text:style-name="Preformatted_20_Text"><text:span text:style-name="Source_20_Text"># Matar processo</text:span></text:p>
      <text:p text:style-name="Preformatted_20_Text"><text:span text:style-name="Source_20_Text">kill -9 &lt;PID&gt;</text:span></text:p>
      <text:p text:style-name="Preformatted_20_Text"/>
      <text:p text:style-name="P2"><text:span text:style-name="Source_20_Text"># Ou mudar a porta no .env (backend) ou vite.config.js (frontend)</text:span></text:p>
      <text:h text:style-name="Heading_20_4" text:outline-level="4">3. Erro: "Connection refused" ao conectar no banco</text:h>
      <text:p text:style-name="Text_20_body"><text:span text:style-name="Strong_20_Emphasis">Causa</text:span>: PostgreSQL não está rodando ou credenciais incorretas</text:p>
      <text:p text:style-name="Text_20_body"><text:span text:style-name="Strong_20_Emphasis">Solução</text:span>:</text:p>
      <text:p text:style-name="Preformatted_20_Text"><text:span text:style-name="Source_20_Text"># Verificar se PostgreSQL está rodando</text:span></text:p>
      <text:p text:style-name="Preformatted_20_Text"><text:span text:style-name="Source_20_Text">sudo systemctl status postgresql</text:span></text:p>
      <text:p text:style-name="Preformatted_20_Text"/>
      <text:p text:style-name="Preformatted_20_Text"><text:span text:style-name="Source_20_Text"># Iniciar PostgreSQL</text:span></text:p>
      <text:p text:style-name="Preformatted_20_Text"><text:span text:style-name="Source_20_Text">sudo systemctl start postgresql</text:span></text:p>
      <text:p text:style-name="Preformatted_20_Text"/>
      <text:p text:style-name="Preformatted_20_Text"><text:span text:style-name="Source_20_Text"># Verificar credenciais no .env</text:span></text:p>
      <text:p text:style-name="P2"><text:span text:style-name="Source_20_Text">cat api/.env</text:span></text:p>
      <text:h text:style-name="Heading_20_4" text:outline-level="4">4. Erro: "JWT malformed" ou "Invalid token"</text:h>
      <text:p text:style-name="Text_20_body"><text:span text:style-name="Strong_20_Emphasis">Causa</text:span>: Token JWT inválido ou expirado</text:p>
      <text:p text:style-name="Text_20_body"><text:span text:style-name="Strong_20_Emphasis">Solução</text:span>:</text:p>
      <text:p text:style-name="Preformatted_20_Text"><text:span text:style-name="Source_20_Text"># Frontend: Limpar localStorage</text:span></text:p>
      <text:p text:style-name="Preformatted_20_Text"><text:span text:style-name="Source_20_Text">localStorage.clear()</text:span></text:p>
      <text:p text:style-name="Preformatted_20_Text"/>
      <text:p text:style-name="P2"><text:span text:style-name="Source_20_Text"># Fazer login novamente</text:span></text:p>
      <text:h text:style-name="Heading_20_4" text:outline-level="4">5. Erro: "Cannot read property of undefined"</text:h>
      <text:p text:style-name="Text_20_body"><text:span text:style-name="Strong_20_Emphasis">Causa</text:span>: Dados não carregados ou estrutura incorreta</text:p>
      <text:p text:style-name="Text_20_body"><text:span text:style-name="Strong_20_Emphasis">Solução</text:span>:</text:p>
      <text:p text:style-name="Preformatted_20_Text"><text:span text:style-name="Source_20_Text">// Usar optional chaining</text:span></text:p>
      <text:p text:style-name="Preformatted_20_Text"><text:span text:style-name="Source_20_Text">const valor = dados?.propriedade?.subpropriedade</text:span></text:p>
      <text:p text:style-name="Preformatted_20_Text"/>
      <text:p text:style-name="Preformatted_20_Text"><text:span text:style-name="Source_20_Text">// Verificar se dados existem antes de usar</text:span></text:p>
      <text:p text:style-name="Preformatted_20_Text"><text:span text:style-name="Source_20_Text">if (dados &amp;&amp; dados.propriedade) {</text:span></text:p>
      <text:p text:style-name="Preformatted_20_Text"><text:span text:style-name="Source_20_Text"><text:s text:c="2"/>// usar dados</text:span></text:p>
      <text:p text:style-name="P2"><text:span text:style-name="Source_20_Text">}</text:span></text:p>
      <text:h text:style-name="Heading_20_4" text:outline-level="4">6. Dashboard não mostra dados</text:h>
      <text:p text:style-name="Text_20_body"><text:span text:style-name="Strong_20_Emphasis">Causa</text:span>: Filtro multi-tenant ou dados não existem</text:p>
      <text:p text:style-name="Text_20_body"><text:span text:style-name="Strong_20_Emphasis">Solução</text:span>:</text:p>
      <text:p text:style-name="Preformatted_20_Text"><text:span text:style-name="Source_20_Text"># Verificar no backend se a query está correta</text:span></text:p>
      <text:p text:style-name="Preformatted_20_Text"><text:span text:style-name="Source_20_Text">console.log('empresa_id:', req.user.empresa_id)</text:span></text:p>
      <text:p text:style-name="Preformatted_20_Text"><text:span text:style-name="Source_20_Text">console.log('nivel_acesso_id:', req.user.nivel_acesso_id)</text:span></text:p>
      <text:p text:style-name="Preformatted_20_Text"/>
      <text:p text:style-name="Preformatted_20_Text"><text:span text:style-name="Source_20_Text"># Verificar se há dados no banco</text:span></text:p>
      <text:p text:style-name="Preformatted_20_Text"><text:span text:style-name="Source_20_Text">psql -U postgres -d agendamento</text:span></text:p>
      <text:p text:style-name="P2"><text:span text:style-name="Source_20_Text">SELECT COUNT(*) FROM agendamento WHERE empresa_id = 'uuid';</text:span></text:p>
      <text:h text:style-name="Heading_20_4" text:outline-level="4">7. Gráfico não aparece</text:h>
      <text:p text:style-name="Text_20_body"><text:span text:style-name="Strong_20_Emphasis">Causa</text:span>: Dados vazios ou erro no cálculo</text:p>
      <text:p text:style-name="Text_20_body"><text:span text:style-name="Strong_20_Emphasis">Solução</text:span>:</text:p>
      <text:p text:style-name="Preformatted_20_Text"><text:span text:style-name="Source_20_Text">// Verificar se graficoData tem dados</text:span></text:p>
      <text:p text:style-name="Preformatted_20_Text"><text:span text:style-name="Source_20_Text">console.log('graficoData:', graficoData)</text:span></text:p>
      <text:p text:style-name="Preformatted_20_Text"/>
      <text:p text:style-name="Preformatted_20_Text"><text:span text:style-name="Source_20_Text">// Adicionar fallback</text:span></text:p>
      <text:p text:style-name="Preformatted_20_Text"><text:span text:style-name="Source_20_Text">{graficoData.length === 0 ? (</text:span></text:p>
      <text:p text:style-name="Preformatted_20_Text"><text:span text:style-name="Source_20_Text"><text:s text:c="2"/>&lt;div&gt;Nenhum dado disponível&lt;/div&gt;</text:span></text:p>
      <text:p text:style-name="Preformatted_20_Text"><text:span text:style-name="Source_20_Text">) : (</text:span></text:p>
      <text:p text:style-name="Preformatted_20_Text"><text:span text:style-name="Source_20_Text"><text:s text:c="2"/>// renderizar gráfico</text:span></text:p>
      <text:p text:style-name="P2"><text:span text:style-name="Source_20_Text">)}</text:span></text:p>
      <text:h text:style-name="Heading_20_4" text:outline-level="4">8. Erro ao excluir profissional</text:h>
      <text:p text:style-name="Text_20_body"><text:span text:style-name="Strong_20_Emphasis">Causa</text:span>: Validações de integridade</text:p>
      <text:p text:style-name="Text_20_body"><text:span text:style-name="Strong_20_Emphasis">Solução</text:span>: - Verificar se há serviços ativos vinculados - Verificar se há agendamentos históricos - Desvincular serviços antes de excluir - Usar soft delete (status = 'inativo')</text:p>
      <text:h text:style-name="Heading_20_3" text:outline-level="3">Logs e Debugging</text:h>
      <text:h text:style-name="Heading_20_4" text:outline-level="4">Backend</text:h>
      <text:p text:style-name="Preformatted_20_Text"><text:span text:style-name="Source_20_Text">// Adicionar logs detalhados</text:span></text:p>
      <text:p text:style-name="Preformatted_20_Text"><text:span text:style-name="Source_20_Text">console.log('📊 Dados recebidos:', req.body)</text:span></text:p>
      <text:p text:style-name="Preformatted_20_Text"><text:span text:style-name="Source_20_Text">console.log('👤 Usuário:', req.user)</text:span></text:p>
      <text:p text:style-name="Preformatted_20_Text"><text:span text:style-name="Source_20_Text">console.log('✅ Resultado:', result)</text:span></text:p>
      <text:p text:style-name="P2"><text:soft-page-break/><text:span text:style-name="Source_20_Text">console.error('❌ Erro:', error.message, error.stack)</text:span></text:p>
      <text:h text:style-name="Heading_20_4" text:outline-level="4">Frontend</text:h>
      <text:p text:style-name="Preformatted_20_Text"><text:span text:style-name="Source_20_Text">// React DevTools</text:span></text:p>
      <text:p text:style-name="Preformatted_20_Text"><text:span text:style-name="Source_20_Text">// Instalar extensão no navegador</text:span></text:p>
      <text:p text:style-name="Preformatted_20_Text"/>
      <text:p text:style-name="Preformatted_20_Text"><text:span text:style-name="Source_20_Text">// Console logs</text:span></text:p>
      <text:p text:style-name="Preformatted_20_Text"><text:span text:style-name="Source_20_Text">console.log('Estado atual:', state)</text:span></text:p>
      <text:p text:style-name="Preformatted_20_Text"><text:span text:style-name="Source_20_Text">console.log('Props:', props)</text:span></text:p>
      <text:p text:style-name="Preformatted_20_Text"/>
      <text:p text:style-name="Preformatted_20_Text"><text:span text:style-name="Source_20_Text">// Debugger</text:span></text:p>
      <text:p text:style-name="P2"><text:span text:style-name="Source_20_Text">debugger // pausa execução</text:span></text:p>
      <text:h text:style-name="Heading_20_4" text:outline-level="4">Banco de Dados</text:h>
      <text:p text:style-name="Preformatted_20_Text"><text:span text:style-name="Source_20_Text">-- Verificar dados</text:span></text:p>
      <text:p text:style-name="Preformatted_20_Text"><text:span text:style-name="Source_20_Text">SELECT * FROM empresa WHERE empresa_id = 'uuid';</text:span></text:p>
      <text:p text:style-name="Preformatted_20_Text"/>
      <text:p text:style-name="Preformatted_20_Text"><text:span text:style-name="Source_20_Text">-- Verificar logs do PostgreSQL</text:span></text:p>
      <text:p text:style-name="P2"><text:span text:style-name="Source_20_Text">sudo tail -f /var/log/postgresql/postgresql-*.log</text:span></text:p>
      <text:p text:style-name="Horizontal_20_Line"/>
      <text:h text:style-name="Heading_20_2" text:outline-level="2">📝 Notas Finais</text:h>
      <text:h text:style-name="Heading_20_3" text:outline-level="3">Próximos Passos Sugeridos</text:h>
      <text:list xml:id="list1953817115" text:style-name="L48">
        <text:list-item>
          <text:p text:style-name="P90"><text:span text:style-name="Strong_20_Emphasis">Testes Automatizados</text:span> </text:p>
        </text:list-item>
        <text:list-item>
          <text:p text:style-name="P90">Testes unitários (Jest) </text:p>
        </text:list-item>
        <text:list-item>
          <text:p text:style-name="P90">Testes de integração </text:p>
        </text:list-item>
        <text:list-item>
          <text:p text:style-name="P89">Testes E2E (Cypress)</text:p>
        </text:list-item>
        <text:list-item>
          <text:p text:style-name="P89"><text:span text:style-name="Strong_20_Emphasis">Deploy</text:span></text:p>
        </text:list-item>
        <text:list-item>
          <text:p text:style-name="P90">Configurar CI/CD </text:p>
        </text:list-item>
        <text:list-item>
          <text:p text:style-name="P90">Deploy em servidor (AWS, DigitalOcean, etc.) </text:p>
        </text:list-item>
        <text:list-item>
          <text:p text:style-name="P89">Configurar domínio e SSL</text:p>
        </text:list-item>
        <text:list-item>
          <text:p text:style-name="P89"><text:span text:style-name="Strong_20_Emphasis">Melhorias de Performance</text:span></text:p>
        </text:list-item>
        <text:list-item>
          <text:p text:style-name="P90">Cache (Redis) </text:p>
        </text:list-item>
        <text:list-item>
          <text:p text:style-name="P90">Otimização de queries </text:p>
        </text:list-item>
        <text:list-item>
          <text:p text:style-name="P89">Lazy loading de componentes</text:p>
        </text:list-item>
        <text:list-item>
          <text:p text:style-name="P89"><text:span text:style-name="Strong_20_Emphasis">Funcionalidades Adicionais</text:span></text:p>
        </text:list-item>
        <text:list-item>
          <text:p text:style-name="P90">Notificações push </text:p>
        </text:list-item>
        <text:list-item>
          <text:p text:style-name="P90">Exportação de relatórios (PDF, Excel) </text:p>
        </text:list-item>
        <text:list-item>
          <text:p text:style-name="P90">Integração com pagamentos </text:p>
        </text:list-item>
        <text:list-item>
          <text:p text:style-name="P89">App mobile (React Native) </text:p>
        </text:list-item>
      </text:list>
      <text:h text:style-name="Heading_20_3" text:outline-level="3">Recursos Úteis</text:h>
      <text:list xml:id="list3868866458" text:style-name="L49">
        <text:list-item>
          <text:p text:style-name="P92"><text:span text:style-name="Strong_20_Emphasis">React</text:span>: https://react.dev </text:p>
        </text:list-item>
        <text:list-item>
          <text:p text:style-name="P92"><text:span text:style-name="Strong_20_Emphasis">Express.js</text:span>: https://expressjs.com </text:p>
        </text:list-item>
        <text:list-item>
          <text:p text:style-name="P92"><text:span text:style-name="Strong_20_Emphasis">PostgreSQL</text:span>: https://www.postgresql.org/docs </text:p>
        </text:list-item>
        <text:list-item>
          <text:p text:style-name="P92"><text:span text:style-name="Strong_20_Emphasis">TailwindCSS</text:span>: https://tailwindcss.com </text:p>
        </text:list-item>
        <text:list-item>
          <text:p text:style-name="P91"><text:span text:style-name="Strong_20_Emphasis">JWT</text:span>: https://jwt.io </text:p>
        </text:list-item>
      </text:list>
      <text:h text:style-name="Heading_20_3" text:outline-level="3">Contato e Suporte</text:h>
      <text:p text:style-name="Text_20_body">Para dúvidas ou suporte, consulte: - Documentação do banco: <text:span text:style-name="Source_20_Text">DOCUMENTACAO_BANCO_DADOS.md</text:span> - Documentação de exclusão: <text:span text:style-name="Source_20_Text">EXCLUSAO_SEGURA.md</text:span> - Código fonte: Comentários inline</text:p>
      <text:p text:style-name="Horizontal_20_Line"/>
      <text:p text:style-name="Text_20_body"><text:span text:style-name="Strong_20_Emphasis">Versão</text:span>: 1.0<text:line-break/><text:span text:style-name="Strong_20_Emphasis">Data</text:span>: 26 de Outubro de 2025<text:line-break/><text:span text:style-name="Strong_20_Emphasis">Desenvolvido para</text:span>: AIResolve - Sistema de Agendamento </text:p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pt" fo:country="BR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60%"/>
      <style:text-properties fo:color="#333333" loext:opacity="100%"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794cm" fo:margin-bottom="0.499cm" style:contextual-spacing="false" fo:padding-left="0cm" fo:padding-right="0cm" fo:padding-top="0cm" fo:padding-bottom="0.265cm" fo:border-left="none" fo:border-right="none" fo:border-top="none" fo:border-bottom="2.24pt solid #10b981"/>
      <style:text-properties fo:color="#10b981" loext:opacity="100%"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661cm" fo:margin-bottom="0.212cm" style:contextual-spacing="false" fo:padding-left="0cm" fo:padding-right="0cm" fo:padding-top="0cm" fo:padding-bottom="0.212cm" fo:border-left="none" fo:border-right="none" fo:border-top="none" fo:border-bottom="1.5pt solid #d1fae5"/>
      <style:text-properties fo:color="#059669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29cm" fo:margin-bottom="0.212cm" style:contextual-spacing="false"/>
      <style:text-properties fo:color="#047857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397cm" fo:margin-bottom="0.212cm" style:contextual-spacing="false"/>
      <style:text-properties fo:color="#065f46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40%" fo:padding="0cm" fo:border="none"/>
      <style:text-properties fo:color="#f9fafb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-left="0.397cm" fo:padding-right="0cm" fo:padding-top="0cm" fo:padding-bottom="0cm" fo:border-left="3pt solid #10b981" fo:border-right="none" fo:border-top="none" fo:border-bottom="none"/>
      <style:text-properties fo:color="#6b7280" loext:opacity="100%" fo:font-style="italic" style:font-style-asian="italic" style:font-style-complex="italic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0b981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Source_20_Text" style:display-name="Source Text" style:family="text">
      <style:text-properties style:font-name="Courier New" fo:font-family="'Courier New', monospace" fo:background-color="#f3f4f6" style:font-name-asian="Courier New" style:font-family-asian="'Courier New', monospace" style:font-name-complex="Courier New" style:font-family-complex="'Courier New', monospac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10b981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cumentação Completa - Sistema de Agendamento AIResolve</dc:title>
    <meta:document-statistic meta:table-count="3" meta:image-count="0" meta:object-count="0" meta:page-count="11" meta:paragraph-count="1394" meta:word-count="5093" meta:character-count="39262" meta:non-whitespace-character-count="32825"/>
    <meta:generator>LibreOffice/7.3.7.2$Linux_X86_64 LibreOffice_project/30$Build-2</meta:generator>
    <meta:user-defined meta:name=""/>
    <meta:user-defined meta:name="viewport">width=device-width, initial-scale=1.0</meta:user-defined>
  </office:meta>
</office:document-meta>
</file>