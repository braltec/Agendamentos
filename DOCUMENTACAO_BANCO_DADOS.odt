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, Tahoma, Geneva, Verdana, sans-serif"/>
  </office:font-face-decls>
  <office:automatic-styles>
    <style:style style:name="Tabela1" style:family="table">
      <style:table-properties style:width="18cm" table:align="left"/>
    </style:style>
    <style:style style:name="Tabela1.A" style:family="table-column">
      <style:table-column-properties style:column-width="3.898cm"/>
    </style:style>
    <style:style style:name="Tabela1.B" style:family="table-column">
      <style:table-column-properties style:column-width="8.167cm"/>
    </style:style>
    <style:style style:name="Tabela1.C" style:family="table-column">
      <style:table-column-properties style:column-width="5.935cm"/>
    </style:style>
    <style:style style:name="Tabela1.A1" style:family="table-cell">
      <style:table-cell-properties style:vertical-align="middle" fo:padding="0.132cm" fo:border-left="0.75pt solid #808080" fo:border-right="0.75pt solid #808080" fo:border-top="0.75pt solid #808080" fo:border-bottom="0.05pt solid #808080"/>
    </style:style>
    <style:style style:name="Tabela1.B1" style:family="table-cell">
      <style:table-cell-properties style:vertical-align="middle" fo:padding="0.132cm" fo:border-left="0.05pt solid #808080" fo:border-right="0.75pt solid #808080" fo:border-top="0.75pt solid #808080" fo:border-bottom="0.05pt solid #808080"/>
    </style:style>
    <style:style style:name="Tabela1.A2" style:family="table-cell">
      <style:table-cell-properties style:vertical-align="middle" fo:padding="0.132cm" fo:border-left="0.75pt solid #808080" fo:border-right="0.75pt solid #808080" fo:border-top="none" fo:border-bottom="0.05pt solid #808080"/>
    </style:style>
    <style:style style:name="Tabela1.B2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Tabela1.A10" style:family="table-cell">
      <style:table-cell-properties style:vertical-align="middle" fo:padding="0.132cm" fo:border-left="0.75pt solid #808080" fo:border-right="0.75pt solid #808080" fo:border-top="none" fo:border-bottom="0.75pt solid #808080"/>
    </style:style>
    <style:style style:name="Tabela1.B10" style:family="table-cell">
      <style:table-cell-properties style:vertical-align="middle" fo:padding="0.132cm" fo:border-left="0.05pt solid #808080" fo:border-right="0.75pt solid #808080" fo:border-top="none" fo:border-bottom="0.75pt solid #808080"/>
    </style:style>
    <style:style style:name="Tabela2" style:family="table">
      <style:table-properties style:width="18cm" table:align="left"/>
    </style:style>
    <style:style style:name="Tabela2.A" style:family="table-column">
      <style:table-column-properties style:column-width="5.978cm"/>
    </style:style>
    <style:style style:name="Tabela2.B" style:family="table-column">
      <style:table-column-properties style:column-width="8.243cm"/>
    </style:style>
    <style:style style:name="Tabela2.C" style:family="table-column">
      <style:table-column-properties style:column-width="3.78cm"/>
    </style:style>
    <style:style style:name="Tabela2.A1" style:family="table-cell">
      <style:table-cell-properties style:vertical-align="middle" fo:padding="0.132cm" fo:border-left="0.75pt solid #808080" fo:border-right="0.75pt solid #808080" fo:border-top="0.75pt solid #808080" fo:border-bottom="0.05pt solid #808080"/>
    </style:style>
    <style:style style:name="Tabela2.B1" style:family="table-cell">
      <style:table-cell-properties style:vertical-align="middle" fo:padding="0.132cm" fo:border-left="0.05pt solid #808080" fo:border-right="0.75pt solid #808080" fo:border-top="0.75pt solid #808080" fo:border-bottom="0.05pt solid #808080"/>
    </style:style>
    <style:style style:name="Tabela2.A2" style:family="table-cell">
      <style:table-cell-properties style:vertical-align="middle" fo:padding="0.132cm" fo:border-left="0.75pt solid #808080" fo:border-right="0.75pt solid #808080" fo:border-top="none" fo:border-bottom="0.05pt solid #808080"/>
    </style:style>
    <style:style style:name="Tabela2.B2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Tabela2.A10" style:family="table-cell">
      <style:table-cell-properties style:vertical-align="middle" fo:padding="0.132cm" fo:border-left="0.75pt solid #808080" fo:border-right="0.75pt solid #808080" fo:border-top="none" fo:border-bottom="0.75pt solid #808080"/>
    </style:style>
    <style:style style:name="Tabela2.B10" style:family="table-cell">
      <style:table-cell-properties style:vertical-align="middle" fo:padding="0.132cm" fo:border-left="0.05pt solid #808080" fo:border-right="0.75pt solid #808080" fo:border-top="none" fo:border-bottom="0.75pt solid #808080"/>
    </style:style>
    <style:style style:name="Tabela3" style:family="table">
      <style:table-properties style:width="13.217cm" table:align="left"/>
    </style:style>
    <style:style style:name="Tabela3.A" style:family="table-column">
      <style:table-column-properties style:column-width="3.925cm"/>
    </style:style>
    <style:style style:name="Tabela3.B" style:family="table-column">
      <style:table-column-properties style:column-width="2.101cm"/>
    </style:style>
    <style:style style:name="Tabela3.C" style:family="table-column">
      <style:table-column-properties style:column-width="2.445cm"/>
    </style:style>
    <style:style style:name="Tabela3.D" style:family="table-column">
      <style:table-column-properties style:column-width="4.747cm"/>
    </style:style>
    <style:style style:name="Tabela3.A1" style:family="table-cell">
      <style:table-cell-properties style:vertical-align="middle" fo:padding="0.132cm" fo:border-left="0.75pt solid #808080" fo:border-right="0.75pt solid #808080" fo:border-top="0.75pt solid #808080" fo:border-bottom="0.05pt solid #808080"/>
    </style:style>
    <style:style style:name="Tabela3.B1" style:family="table-cell">
      <style:table-cell-properties style:vertical-align="middle" fo:padding="0.132cm" fo:border-left="0.05pt solid #808080" fo:border-right="0.75pt solid #808080" fo:border-top="0.75pt solid #808080" fo:border-bottom="0.05pt solid #808080"/>
    </style:style>
    <style:style style:name="Tabela3.A2" style:family="table-cell">
      <style:table-cell-properties style:vertical-align="middle" fo:padding="0.132cm" fo:border-left="0.75pt solid #808080" fo:border-right="0.75pt solid #808080" fo:border-top="none" fo:border-bottom="0.05pt solid #808080"/>
    </style:style>
    <style:style style:name="Tabela3.B2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Tabela3.A7" style:family="table-cell">
      <style:table-cell-properties style:vertical-align="middle" fo:padding="0.132cm" fo:border-left="0.75pt solid #808080" fo:border-right="0.75pt solid #808080" fo:border-top="none" fo:border-bottom="0.75pt solid #808080"/>
    </style:style>
    <style:style style:name="Tabela3.B7" style:family="table-cell">
      <style:table-cell-properties style:vertical-align="middle" fo:padding="0.132cm" fo:border-left="0.05pt solid #808080" fo:border-right="0.75pt solid #808080" fo:border-top="none" fo:border-bottom="0.75pt solid #808080"/>
    </style:style>
    <style:style style:name="Tabela4" style:family="table">
      <style:table-properties style:width="18cm" table:align="left"/>
    </style:style>
    <style:style style:name="Tabela4.A" style:family="table-column">
      <style:table-column-properties style:column-width="3.731cm"/>
    </style:style>
    <style:style style:name="Tabela4.B" style:family="table-column">
      <style:table-column-properties style:column-width="6.299cm"/>
    </style:style>
    <style:style style:name="Tabela4.C" style:family="table-column">
      <style:table-column-properties style:column-width="7.971cm"/>
    </style:style>
    <style:style style:name="Tabela4.A1" style:family="table-cell">
      <style:table-cell-properties style:vertical-align="middle" fo:padding="0.132cm" fo:border-left="0.75pt solid #808080" fo:border-right="0.75pt solid #808080" fo:border-top="0.75pt solid #808080" fo:border-bottom="0.05pt solid #808080"/>
    </style:style>
    <style:style style:name="Tabela4.B1" style:family="table-cell">
      <style:table-cell-properties style:vertical-align="middle" fo:padding="0.132cm" fo:border-left="0.05pt solid #808080" fo:border-right="0.75pt solid #808080" fo:border-top="0.75pt solid #808080" fo:border-bottom="0.05pt solid #808080"/>
    </style:style>
    <style:style style:name="Tabela4.A2" style:family="table-cell">
      <style:table-cell-properties style:vertical-align="middle" fo:padding="0.132cm" fo:border-left="0.75pt solid #808080" fo:border-right="0.75pt solid #808080" fo:border-top="none" fo:border-bottom="0.05pt solid #808080"/>
    </style:style>
    <style:style style:name="Tabela4.B2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Tabela4.A11" style:family="table-cell">
      <style:table-cell-properties style:vertical-align="middle" fo:padding="0.132cm" fo:border-left="0.75pt solid #808080" fo:border-right="0.75pt solid #808080" fo:border-top="none" fo:border-bottom="0.75pt solid #808080"/>
    </style:style>
    <style:style style:name="Tabela4.B11" style:family="table-cell">
      <style:table-cell-properties style:vertical-align="middle" fo:padding="0.132cm" fo:border-left="0.05pt solid #808080" fo:border-right="0.75pt solid #808080" fo:border-top="none" fo:border-bottom="0.75pt solid #808080"/>
    </style:style>
    <style:style style:name="Tabela5" style:family="table">
      <style:table-properties style:width="18cm" table:align="left"/>
    </style:style>
    <style:style style:name="Tabela5.A" style:family="table-column">
      <style:table-column-properties style:column-width="4.83cm"/>
    </style:style>
    <style:style style:name="Tabela5.B" style:family="table-column">
      <style:table-column-properties style:column-width="3.9cm"/>
    </style:style>
    <style:style style:name="Tabela5.C" style:family="table-column">
      <style:table-column-properties style:column-width="3.339cm"/>
    </style:style>
    <style:style style:name="Tabela5.D" style:family="table-column">
      <style:table-column-properties style:column-width="5.932cm"/>
    </style:style>
    <style:style style:name="Tabela5.A1" style:family="table-cell">
      <style:table-cell-properties style:vertical-align="middle" fo:padding="0.132cm" fo:border-left="0.75pt solid #808080" fo:border-right="0.75pt solid #808080" fo:border-top="0.75pt solid #808080" fo:border-bottom="0.05pt solid #808080"/>
    </style:style>
    <style:style style:name="Tabela5.B1" style:family="table-cell">
      <style:table-cell-properties style:vertical-align="middle" fo:padding="0.132cm" fo:border-left="0.05pt solid #808080" fo:border-right="0.75pt solid #808080" fo:border-top="0.75pt solid #808080" fo:border-bottom="0.05pt solid #808080"/>
    </style:style>
    <style:style style:name="Tabela5.A2" style:family="table-cell">
      <style:table-cell-properties style:vertical-align="middle" fo:padding="0.132cm" fo:border-left="0.75pt solid #808080" fo:border-right="0.75pt solid #808080" fo:border-top="none" fo:border-bottom="0.05pt solid #808080"/>
    </style:style>
    <style:style style:name="Tabela5.B2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Tabela5.A7" style:family="table-cell">
      <style:table-cell-properties style:vertical-align="middle" fo:padding="0.132cm" fo:border-left="0.75pt solid #808080" fo:border-right="0.75pt solid #808080" fo:border-top="none" fo:border-bottom="0.75pt solid #808080"/>
    </style:style>
    <style:style style:name="Tabela5.B7" style:family="table-cell">
      <style:table-cell-properties style:vertical-align="middle" fo:padding="0.132cm" fo:border-left="0.05pt solid #808080" fo:border-right="0.75pt solid #808080" fo:border-top="none" fo:border-bottom="0.75pt solid #808080"/>
    </style:style>
    <style:style style:name="Tabela6" style:family="table">
      <style:table-properties style:width="18cm" table:align="left"/>
    </style:style>
    <style:style style:name="Tabela6.A" style:family="table-column">
      <style:table-column-properties style:column-width="3.29cm"/>
    </style:style>
    <style:style style:name="Tabela6.B" style:family="table-column">
      <style:table-column-properties style:column-width="14.711cm"/>
    </style:style>
    <style:style style:name="Tabela6.A1" style:family="table-cell">
      <style:table-cell-properties style:vertical-align="middle" fo:padding="0.132cm" fo:border-left="0.75pt solid #808080" fo:border-right="0.75pt solid #808080" fo:border-top="0.75pt solid #808080" fo:border-bottom="0.05pt solid #808080"/>
    </style:style>
    <style:style style:name="Tabela6.B1" style:family="table-cell">
      <style:table-cell-properties style:vertical-align="middle" fo:padding="0.132cm" fo:border-left="0.05pt solid #808080" fo:border-right="0.75pt solid #808080" fo:border-top="0.75pt solid #808080" fo:border-bottom="0.05pt solid #808080"/>
    </style:style>
    <style:style style:name="Tabela6.A2" style:family="table-cell">
      <style:table-cell-properties style:vertical-align="middle" fo:padding="0.132cm" fo:border-left="0.75pt solid #808080" fo:border-right="0.75pt solid #808080" fo:border-top="none" fo:border-bottom="0.05pt solid #808080"/>
    </style:style>
    <style:style style:name="Tabela6.B2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Tabela6.A10" style:family="table-cell">
      <style:table-cell-properties style:vertical-align="middle" fo:padding="0.132cm" fo:border-left="0.75pt solid #808080" fo:border-right="0.75pt solid #808080" fo:border-top="none" fo:border-bottom="0.75pt solid #808080"/>
    </style:style>
    <style:style style:name="Tabela6.B10" style:family="table-cell">
      <style:table-cell-properties style:vertical-align="middle" fo:padding="0.132cm" fo:border-left="0.05pt solid #808080" fo:border-right="0.75pt solid #808080" fo:border-top="none" fo:border-bottom="0.75pt solid #808080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ext_20_body" style:list-style-name="L5">
      <style:paragraph-properties fo:margin-top="0cm" fo:margin-bottom="0cm" style:contextual-spacing="false"/>
    </style:style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7">
      <style:paragraph-properties fo:margin-top="0cm" fo:margin-bottom="0cm" style:contextual-spacing="false"/>
    </style:style>
    <style:style style:name="P11" style:family="paragraph" style:parent-style-name="Text_20_body" style:list-style-name="L8"/>
    <style:style style:name="P12" style:family="paragraph" style:parent-style-name="Text_20_body" style:list-style-name="L8">
      <style:paragraph-properties fo:margin-top="0cm" fo:margin-bottom="0cm" style:contextual-spacing="false"/>
    </style:style>
    <style:style style:name="P13" style:family="paragraph" style:parent-style-name="Text_20_body" style:list-style-name="L9"/>
    <style:style style:name="P14" style:family="paragraph" style:parent-style-name="Text_20_body" style:list-style-name="L9">
      <style:paragraph-properties fo:margin-top="0cm" fo:margin-bottom="0cm" style:contextual-spacing="false"/>
    </style:style>
    <style:style style:name="P15" style:family="paragraph" style:parent-style-name="Text_20_body" style:list-style-name="L10"/>
    <style:style style:name="P16" style:family="paragraph" style:parent-style-name="Text_20_body" style:list-style-name="L10">
      <style:paragraph-properties fo:margin-top="0cm" fo:margin-bottom="0cm" style:contextual-spacing="false"/>
    </style:style>
    <style:style style:name="P17" style:family="paragraph" style:parent-style-name="Text_20_body" style:list-style-name="L11">
      <style:paragraph-properties fo:margin-top="0cm" fo:margin-bottom="0cm" style:contextual-spacing="false"/>
    </style:style>
    <style:style style:name="P18" style:family="paragraph" style:parent-style-name="Text_20_body" style:list-style-name="L12">
      <style:paragraph-properties fo:margin-top="0cm" fo:margin-bottom="0cm" style:contextual-spacing="false"/>
    </style:style>
    <style:style style:name="P19" style:family="paragraph" style:parent-style-name="Text_20_body" style:list-style-name="L13"/>
    <style:style style:name="P20" style:family="paragraph" style:parent-style-name="Text_20_body" style:list-style-name="L14">
      <style:paragraph-properties fo:margin-top="0cm" fo:margin-bottom="0cm" style:contextual-spacing="false"/>
    </style:style>
    <style:style style:name="P21" style:family="paragraph" style:parent-style-name="Text_20_body" style:list-style-name="L15">
      <style:paragraph-properties fo:margin-top="0cm" fo:margin-bottom="0cm" style:contextual-spacing="false"/>
    </style:style>
    <style:style style:name="P22" style:family="paragraph" style:parent-style-name="Text_20_body" style:list-style-name="L16">
      <style:paragraph-properties fo:margin-top="0cm" fo:margin-bottom="0cm" style:contextual-spacing="false"/>
    </style:style>
    <style:style style:name="P23" style:family="paragraph" style:parent-style-name="Text_20_body" style:list-style-name="L17">
      <style:paragraph-properties fo:margin-top="0cm" fo:margin-bottom="0cm" style:contextual-spacing="false"/>
    </style:style>
    <style:style style:name="P24" style:family="paragraph" style:parent-style-name="Text_20_body" style:list-style-name="L18">
      <style:paragraph-properties fo:margin-top="0cm" fo:margin-bottom="0cm" style:contextual-spacing="false"/>
    </style:style>
    <style:style style:name="P25" style:family="paragraph" style:parent-style-name="Text_20_body" style:list-style-name="L19"/>
    <style:style style:name="P26" style:family="paragraph" style:parent-style-name="Text_20_body" style:list-style-name="L20"/>
    <style:style style:name="P27" style:family="paragraph" style:parent-style-name="Text_20_body" style:list-style-name="L20">
      <style:paragraph-properties fo:margin-top="0cm" fo:margin-bottom="0cm" style:contextual-spacing="false"/>
    </style:style>
    <style:style style:name="P28" style:family="paragraph" style:parent-style-name="Text_20_body" style:list-style-name="L21"/>
    <style:style style:name="P29" style:family="paragraph" style:parent-style-name="Text_20_body" style:list-style-name="L21">
      <style:paragraph-properties fo:margin-top="0cm" fo:margin-bottom="0cm" style:contextual-spacing="false"/>
    </style:style>
    <style:style style:name="P30" style:family="paragraph" style:parent-style-name="Text_20_body" style:list-style-name="L22"/>
    <style:style style:name="P31" style:family="paragraph" style:parent-style-name="Text_20_body" style:list-style-name="L22">
      <style:paragraph-properties fo:margin-top="0cm" fo:margin-bottom="0cm" style:contextual-spacing="false"/>
    </style:style>
    <style:style style:name="P32" style:family="paragraph" style:parent-style-name="Text_20_body" style:list-style-name="L23"/>
    <style:style style:name="P33" style:family="paragraph" style:parent-style-name="Text_20_body" style:list-style-name="L23">
      <style:paragraph-properties fo:margin-top="0cm" fo:margin-bottom="0cm" style:contextual-spacing="false"/>
    </style:style>
    <style:style style:name="P34" style:family="paragraph" style:parent-style-name="Text_20_body" style:list-style-name="L24"/>
    <style:style style:name="P35" style:family="paragraph" style:parent-style-name="Text_20_body" style:list-style-name="L24">
      <style:paragraph-properties fo:margin-top="0cm" fo:margin-bottom="0cm" style:contextual-spacing="false"/>
    </style:style>
    <style:style style:name="P36" style:family="paragraph" style:parent-style-name="Text_20_body" style:list-style-name="L25"/>
    <style:style style:name="P37" style:family="paragraph" style:parent-style-name="Text_20_body" style:list-style-name="L25">
      <style:paragraph-properties fo:margin-top="0cm" fo:margin-bottom="0cm" style:contextual-spacing="false"/>
    </style:style>
    <style:style style:name="P38" style:family="paragraph" style:parent-style-name="Text_20_body" style:list-style-name="L26">
      <style:paragraph-properties fo:margin-top="0cm" fo:margin-bottom="0cm" style:contextual-spacing="false"/>
    </style:style>
    <style:style style:name="P39" style:family="paragraph" style:parent-style-name="Text_20_body" style:list-style-name="L27">
      <style:paragraph-properties fo:margin-top="0cm" fo:margin-bottom="0cm" style:contextual-spacing="false"/>
    </style:style>
    <style:style style:name="P40" style:family="paragraph" style:parent-style-name="Text_20_body" style:list-style-name="L28">
      <style:paragraph-properties fo:margin-top="0cm" fo:margin-bottom="0cm" style:contextual-spacing="false"/>
    </style:style>
    <style:style style:name="P41" style:family="paragraph" style:parent-style-name="Text_20_body" style:list-style-name="L29"/>
    <style:style style:name="P42" style:family="paragraph" style:parent-style-name="Text_20_body" style:list-style-name="L30"/>
    <style:style style:name="P43" style:family="paragraph" style:parent-style-name="Text_20_body" style:list-style-name="L30">
      <style:paragraph-properties fo:margin-top="0cm" fo:margin-bottom="0cm" style:contextual-spacing="false"/>
    </style:style>
    <style:style style:name="P44" style:family="paragraph" style:parent-style-name="Text_20_body" style:list-style-name="L31"/>
    <style:style style:name="P45" style:family="paragraph" style:parent-style-name="Text_20_body" style:list-style-name="L31">
      <style:paragraph-properties fo:margin-top="0cm" fo:margin-bottom="0cm" style:contextual-spacing="false"/>
    </style:style>
    <style:style style:name="P46" style:family="paragraph" style:parent-style-name="Text_20_body" style:list-style-name="L32"/>
    <style:style style:name="P47" style:family="paragraph" style:parent-style-name="Text_20_body" style:list-style-name="L32">
      <style:paragraph-properties fo:margin-top="0cm" fo:margin-bottom="0cm" style:contextual-spacing="false"/>
    </style:style>
    <style:style style:name="P48" style:family="paragraph" style:parent-style-name="Text_20_body" style:list-style-name="L33"/>
    <style:style style:name="P49" style:family="paragraph" style:parent-style-name="Text_20_body" style:list-style-name="L33">
      <style:paragraph-properties fo:margin-top="0cm" fo:margin-bottom="0cm" style:contextual-spacing="false"/>
    </style:style>
    <style:style style:name="P50" style:family="paragraph" style:parent-style-name="Text_20_body" style:list-style-name="L34"/>
    <style:style style:name="P51" style:family="paragraph" style:parent-style-name="Text_20_body" style:list-style-name="L34">
      <style:paragraph-properties fo:margin-top="0cm" fo:margin-bottom="0cm" style:contextual-spacing="false"/>
    </style:style>
    <style:style style:name="P52" style:family="paragraph" style:parent-style-name="Text_20_body" style:list-style-name="L35">
      <style:paragraph-properties fo:margin-top="0cm" fo:margin-bottom="0cm" style:contextual-spacing="false"/>
    </style:style>
    <style:style style:name="P53" style:family="paragraph" style:parent-style-name="Text_20_body" style:list-style-name="L36">
      <style:paragraph-properties fo:margin-top="0cm" fo:margin-bottom="0cm" style:contextual-spacing="false"/>
    </style:style>
    <style:style style:name="P54" style:family="paragraph" style:parent-style-name="Text_20_body" style:list-style-name="L37">
      <style:paragraph-properties fo:margin-top="0cm" fo:margin-bottom="0cm" style:contextual-spacing="false"/>
    </style:style>
    <style:style style:name="P55" style:family="paragraph" style:parent-style-name="Text_20_body" style:list-style-name="L38"/>
    <style:style style:name="P56" style:family="paragraph" style:parent-style-name="Text_20_body" style:list-style-name="L39"/>
    <style:style style:name="P57" style:family="paragraph" style:parent-style-name="Text_20_body" style:list-style-name="L39">
      <style:paragraph-properties fo:margin-top="0cm" fo:margin-bottom="0cm" style:contextual-spacing="false"/>
    </style:style>
    <style:style style:name="P58" style:family="paragraph" style:parent-style-name="Text_20_body" style:list-style-name="L40"/>
    <style:style style:name="P59" style:family="paragraph" style:parent-style-name="Text_20_body" style:list-style-name="L40">
      <style:paragraph-properties fo:margin-top="0cm" fo:margin-bottom="0cm" style:contextual-spacing="false"/>
    </style:style>
    <style:style style:name="P60" style:family="paragraph" style:parent-style-name="Text_20_body" style:list-style-name="L41">
      <style:paragraph-properties fo:margin-top="0cm" fo:margin-bottom="0cm" style:contextual-spacing="false"/>
    </style:style>
    <style:style style:name="P61" style:family="paragraph" style:parent-style-name="Text_20_body" style:list-style-name="L42">
      <style:paragraph-properties fo:margin-top="0cm" fo:margin-bottom="0cm" style:contextual-spacing="false"/>
    </style:style>
    <style:style style:name="P62" style:family="paragraph" style:parent-style-name="Text_20_body" style:list-style-name="L43">
      <style:paragraph-properties fo:margin-top="0cm" fo:margin-bottom="0cm" style:contextual-spacing="false"/>
    </style:style>
    <style:style style:name="P63" style:family="paragraph" style:parent-style-name="Text_20_body" style:list-style-name="L44"/>
    <style:style style:name="P64" style:family="paragraph" style:parent-style-name="Text_20_body" style:list-style-name="L45"/>
    <style:style style:name="P65" style:family="paragraph" style:parent-style-name="Text_20_body" style:list-style-name="L45">
      <style:paragraph-properties fo:margin-top="0cm" fo:margin-bottom="0cm" style:contextual-spacing="false"/>
    </style:style>
    <style:style style:name="P66" style:family="paragraph" style:parent-style-name="Text_20_body" style:list-style-name="L46"/>
    <style:style style:name="P67" style:family="paragraph" style:parent-style-name="Text_20_body" style:list-style-name="L46">
      <style:paragraph-properties fo:margin-top="0cm" fo:margin-bottom="0cm" style:contextual-spacing="false"/>
    </style:style>
    <style:style style:name="P68" style:family="paragraph" style:parent-style-name="Text_20_body" style:list-style-name="L47"/>
    <style:style style:name="P69" style:family="paragraph" style:parent-style-name="Text_20_body" style:list-style-name="L47">
      <style:paragraph-properties fo:margin-top="0cm" fo:margin-bottom="0cm" style:contextual-spacing="false"/>
    </style:style>
    <style:style style:name="P70" style:family="paragraph" style:parent-style-name="Text_20_body" style:list-style-name="L48"/>
    <style:style style:name="P71" style:family="paragraph" style:parent-style-name="Text_20_body" style:list-style-name="L48">
      <style:paragraph-properties fo:margin-top="0cm" fo:margin-bottom="0cm" style:contextual-spacing="false"/>
    </style:style>
    <style:style style:name="P72" style:family="paragraph" style:parent-style-name="Text_20_body" style:list-style-name="L49"/>
    <style:style style:name="P73" style:family="paragraph" style:parent-style-name="Text_20_body" style:list-style-name="L49">
      <style:paragraph-properties fo:margin-top="0cm" fo:margin-bottom="0cm" style:contextual-spacing="false"/>
    </style:style>
    <style:style style:name="P74" style:family="paragraph" style:parent-style-name="Text_20_body" style:list-style-name="L50"/>
    <style:style style:name="P75" style:family="paragraph" style:parent-style-name="Text_20_body" style:list-style-name="L50">
      <style:paragraph-properties fo:margin-top="0cm" fo:margin-bottom="0cm" style:contextual-spacing="false"/>
    </style:style>
    <style:style style:name="P76" style:family="paragraph" style:parent-style-name="Text_20_body" style:list-style-name="L51">
      <style:paragraph-properties fo:margin-top="0cm" fo:margin-bottom="0cm" style:contextual-spacing="false"/>
    </style:style>
    <style:style style:name="P77" style:family="paragraph" style:parent-style-name="Text_20_body" style:list-style-name="L52">
      <style:paragraph-properties fo:margin-top="0cm" fo:margin-bottom="0cm" style:contextual-spacing="false"/>
    </style:style>
    <style:style style:name="P78" style:family="paragraph" style:parent-style-name="Text_20_body" style:list-style-name="L53">
      <style:paragraph-properties fo:margin-top="0cm" fo:margin-bottom="0cm" style:contextual-spacing="false"/>
    </style:style>
    <style:style style:name="P79" style:family="paragraph" style:parent-style-name="Text_20_body" style:list-style-name="L54">
      <style:paragraph-properties fo:margin-top="0cm" fo:margin-bottom="0cm" style:contextual-spacing="false"/>
    </style:style>
    <style:style style:name="P80" style:family="paragraph" style:parent-style-name="Text_20_body" style:list-style-name="L55">
      <style:paragraph-properties fo:margin-top="0cm" fo:margin-bottom="0cm" style:contextual-spacing="false"/>
    </style:style>
    <style:style style:name="P81" style:family="paragraph" style:parent-style-name="Text_20_body" style:list-style-name="L56">
      <style:paragraph-properties fo:margin-top="0cm" fo:margin-bottom="0cm" style:contextual-spacing="false"/>
    </style:style>
    <style:style style:name="P82" style:family="paragraph" style:parent-style-name="Text_20_body" style:list-style-name="L57">
      <style:paragraph-properties fo:margin-top="0cm" fo:margin-bottom="0cm" style:contextual-spacing="false"/>
    </style:style>
    <style:style style:name="P83" style:family="paragraph" style:parent-style-name="Text_20_body" style:list-style-name="L58">
      <style:paragraph-properties fo:margin-top="0cm" fo:margin-bottom="0cm" style:contextual-spacing="false"/>
    </style:style>
    <style:style style:name="P84" style:family="paragraph" style:parent-style-name="Text_20_body" style:list-style-name="L59">
      <style:paragraph-properties fo:margin-top="0cm" fo:margin-bottom="0cm" style:contextual-spacing="false"/>
    </style:style>
    <style:style style:name="P85" style:family="paragraph" style:parent-style-name="Text_20_body" style:list-style-name="L60">
      <style:paragraph-properties fo:margin-top="0cm" fo:margin-bottom="0cm" style:contextual-spacing="false"/>
    </style:style>
    <style:style style:name="P86" style:family="paragraph" style:parent-style-name="Text_20_body" style:list-style-name="L61">
      <style:paragraph-properties fo:margin-top="0cm" fo:margin-bottom="0cm" style:contextual-spacing="false"/>
    </style:style>
    <style:style style:name="P87" style:family="paragraph" style:parent-style-name="Text_20_body" style:list-style-name="L62"/>
    <style:style style:name="P88" style:family="paragraph" style:parent-style-name="Text_20_body" style:list-style-name="L63">
      <style:paragraph-properties fo:margin-top="0cm" fo:margin-bottom="0cm" style:contextual-spacing="false"/>
    </style:style>
    <style:style style:name="P89" style:family="paragraph" style:parent-style-name="Text_20_body" style:list-style-name="L64">
      <style:paragraph-properties fo:margin-top="0cm" fo:margin-bottom="0cm" style:contextual-spacing="false"/>
    </style:style>
    <style:style style:name="P90" style:family="paragraph" style:parent-style-name="Text_20_body" style:list-style-name="L65">
      <style:paragraph-properties fo:margin-top="0cm" fo:margin-bottom="0cm" style:contextual-spacing="false"/>
    </style:style>
    <style:style style:name="P91" style:family="paragraph" style:parent-style-name="Text_20_body" style:list-style-name="L66">
      <style:paragraph-properties fo:margin-top="0cm" fo:margin-bottom="0cm" style:contextual-spacing="false"/>
    </style:style>
    <style:style style:name="P92" style:family="paragraph" style:parent-style-name="Text_20_body" style:list-style-name="L67">
      <style:paragraph-properties fo:margin-top="0cm" fo:margin-bottom="0cm" style:contextual-spacing="false"/>
    </style:style>
    <style:style style:name="P93" style:family="paragraph" style:parent-style-name="Text_20_body" style:list-style-name="L68">
      <style:paragraph-properties fo:margin-top="0cm" fo:margin-bottom="0cm" style:contextual-spacing="false"/>
    </style:style>
    <style:style style:name="P94" style:family="paragraph" style:parent-style-name="Text_20_body" style:list-style-name="L69"/>
    <style:style style:name="P95" style:family="paragraph" style:parent-style-name="Text_20_body" style:list-style-name="L70">
      <style:paragraph-properties fo:margin-top="0cm" fo:margin-bottom="0cm" style:contextual-spacing="false"/>
    </style:style>
    <style:style style:name="P96" style:family="paragraph" style:parent-style-name="Text_20_body" style:list-style-name="L71"/>
    <style:style style:name="P97" style:family="paragraph" style:parent-style-name="Text_20_body" style:list-style-name="L72">
      <style:paragraph-properties fo:margin-top="0cm" fo:margin-bottom="0cm" style:contextual-spacing="false"/>
    </style:style>
    <style:style style:name="P98" style:family="paragraph" style:parent-style-name="Text_20_body" style:list-style-name="L73">
      <style:paragraph-properties fo:margin-top="0cm" fo:margin-bottom="0cm" style:contextual-spacing="false"/>
    </style:style>
    <style:style style:name="P99" style:family="paragraph" style:parent-style-name="Text_20_body" style:list-style-name="L74">
      <style:paragraph-properties fo:margin-top="0cm" fo:margin-bottom="0cm" style:contextual-spacing="false"/>
    </style:style>
    <style:style style:name="P100" style:family="paragraph" style:parent-style-name="Text_20_body" style:list-style-name="L75"/>
    <style:style style:name="P101" style:family="paragraph" style:parent-style-name="Text_20_body" style:list-style-name="L76"/>
    <style:style style:name="P102" style:family="paragraph" style:parent-style-name="Text_20_body" style:list-style-name="L76">
      <style:paragraph-properties fo:margin-top="0cm" fo:margin-bottom="0cm" style:contextual-spacing="false"/>
    </style:style>
    <style:style style:name="P103" style:family="paragraph" style:parent-style-name="Text_20_body" style:list-style-name="L77"/>
    <style:style style:name="P104" style:family="paragraph" style:parent-style-name="Text_20_body" style:list-style-name="L77">
      <style:paragraph-properties fo:margin-top="0cm" fo:margin-bottom="0cm" style:contextual-spacing="false"/>
    </style:style>
    <style:style style:name="P105" style:family="paragraph" style:parent-style-name="Text_20_body" style:list-style-name="L78"/>
    <style:style style:name="P106" style:family="paragraph" style:parent-style-name="Text_20_body" style:list-style-name="L78">
      <style:paragraph-properties fo:margin-top="0cm" fo:margin-bottom="0cm" style:contextual-spacing="false"/>
    </style:style>
    <style:style style:name="P107" style:family="paragraph" style:parent-style-name="Text_20_body" style:list-style-name="L79"/>
    <style:style style:name="P108" style:family="paragraph" style:parent-style-name="Text_20_body" style:list-style-name="L79">
      <style:paragraph-properties fo:margin-top="0cm" fo:margin-bottom="0cm" style:contextual-spacing="false"/>
    </style:style>
    <style:style style:name="P109" style:family="paragraph" style:parent-style-name="Text_20_body" style:list-style-name="L80"/>
    <style:style style:name="P110" style:family="paragraph" style:parent-style-name="Text_20_body" style:list-style-name="L80">
      <style:paragraph-properties fo:margin-top="0cm" fo:margin-bottom="0cm" style:contextual-spacing="false"/>
    </style:style>
    <style:style style:name="P111" style:family="paragraph" style:parent-style-name="Text_20_body" style:list-style-name="L81"/>
    <style:style style:name="P112" style:family="paragraph" style:parent-style-name="Text_20_body" style:list-style-name="L81">
      <style:paragraph-properties fo:margin-top="0cm" fo:margin-bottom="0cm" style:contextual-spacing="false"/>
    </style:style>
    <style:style style:name="P113" style:family="paragraph" style:parent-style-name="Text_20_body" style:list-style-name="L82"/>
    <style:style style:name="P114" style:family="paragraph" style:parent-style-name="Text_20_body" style:list-style-name="L82">
      <style:paragraph-properties fo:margin-top="0cm" fo:margin-bottom="0cm" style:contextual-spacing="false"/>
    </style:style>
    <style:style style:name="P115" style:family="paragraph" style:parent-style-name="Text_20_body" style:list-style-name="L83"/>
    <style:style style:name="P116" style:family="paragraph" style:parent-style-name="Text_20_body" style:list-style-name="L83">
      <style:paragraph-properties fo:margin-top="0cm" fo:margin-bottom="0cm" style:contextual-spacing="false"/>
    </style:style>
    <style:style style:name="P117" style:family="paragraph" style:parent-style-name="Text_20_body" style:list-style-name="L84"/>
    <style:style style:name="P118" style:family="paragraph" style:parent-style-name="Text_20_body" style:list-style-name="L84">
      <style:paragraph-properties fo:margin-top="0cm" fo:margin-bottom="0cm" style:contextual-spacing="false"/>
    </style:style>
    <style:style style:name="P119" style:family="paragraph" style:parent-style-name="Text_20_body" style:list-style-name="L85">
      <style:paragraph-properties fo:margin-top="0cm" fo:margin-bottom="0cm" style:contextual-spacing="false"/>
    </style:style>
    <style:style style:name="P120" style:family="paragraph" style:parent-style-name="Text_20_body" style:list-style-name="L86">
      <style:paragraph-properties fo:margin-top="0cm" fo:margin-bottom="0cm" style:contextual-spacing="false"/>
    </style:style>
    <style:style style:name="P121" style:family="paragraph" style:parent-style-name="Text_20_body" style:list-style-name="L87">
      <style:paragraph-properties fo:margin-top="0cm" fo:margin-bottom="0cm" style:contextual-spacing="false"/>
    </style:style>
    <style:style style:name="P122" style:family="paragraph" style:parent-style-name="Text_20_body" style:list-style-name="L88">
      <style:paragraph-properties fo:margin-top="0cm" fo:margin-bottom="0cm" style:contextual-spacing="false"/>
    </style:style>
    <style:style style:name="P123" style:family="paragraph" style:parent-style-name="Text_20_body" style:list-style-name="L89">
      <style:paragraph-properties fo:margin-top="0cm" fo:margin-bottom="0cm" style:contextual-spacing="false"/>
    </style:style>
    <style:style style:name="P124" style:family="paragraph" style:parent-style-name="Text_20_body" style:list-style-name="L90">
      <style:paragraph-properties fo:margin-top="0cm" fo:margin-bottom="0cm" style:contextual-spacing="false"/>
    </style:style>
    <style:style style:name="P125" style:family="paragraph" style:parent-style-name="Text_20_body" style:list-style-name="L91">
      <style:paragraph-properties fo:margin-top="0cm" fo:margin-bottom="0cm" style:contextual-spacing="false"/>
    </style:style>
    <style:style style:name="P126" style:family="paragraph" style:parent-style-name="Text_20_body" style:list-style-name="L92">
      <style:paragraph-properties fo:margin-top="0cm" fo:margin-bottom="0cm" style:contextual-spacing="false"/>
    </style:style>
    <style:style style:name="P127" style:family="paragraph" style:parent-style-name="Text_20_body" style:list-style-name="L93">
      <style:paragraph-properties fo:margin-top="0cm" fo:margin-bottom="0cm" style:contextual-spacing="false"/>
    </style:style>
    <style:style style:name="P128" style:family="paragraph" style:parent-style-name="Text_20_body" style:list-style-name="L94"/>
    <style:style style:name="P129" style:family="paragraph" style:parent-style-name="Text_20_body" style:list-style-name="L95">
      <style:paragraph-properties fo:margin-top="0cm" fo:margin-bottom="0cm" style:contextual-spacing="false"/>
    </style:style>
    <style:style style:name="P130" style:family="paragraph" style:parent-style-name="Text_20_body" style:list-style-name="L96">
      <style:paragraph-properties fo:margin-top="0cm" fo:margin-bottom="0cm" style:contextual-spacing="false"/>
    </style:style>
    <style:style style:name="P131" style:family="paragraph" style:parent-style-name="Text_20_body" style:list-style-name="L97">
      <style:paragraph-properties fo:margin-top="0cm" fo:margin-bottom="0cm" style:contextual-spacing="false"/>
    </style:style>
    <style:style style:name="P132" style:family="paragraph" style:parent-style-name="Text_20_body" style:list-style-name="L98">
      <style:paragraph-properties fo:margin-top="0cm" fo:margin-bottom="0cm" style:contextual-spacing="false"/>
    </style:style>
    <style:style style:name="P133" style:family="paragraph" style:parent-style-name="Text_20_body" style:list-style-name="L99">
      <style:paragraph-properties fo:margin-top="0cm" fo:margin-bottom="0cm" style:contextual-spacing="false"/>
    </style:style>
    <style:style style:name="P134" style:family="paragraph" style:parent-style-name="Text_20_body" style:list-style-name="L100">
      <style:paragraph-properties fo:margin-top="0cm" fo:margin-bottom="0cm" style:contextual-spacing="false"/>
    </style:style>
    <style:style style:name="P135" style:family="paragraph" style:parent-style-name="Text_20_body" style:list-style-name="L101"/>
    <style:style style:name="P136" style:family="paragraph" style:parent-style-name="Text_20_body" style:list-style-name="L102"/>
    <style:style style:name="P137" style:family="paragraph" style:parent-style-name="Text_20_body" style:list-style-name="L102">
      <style:paragraph-properties fo:margin-top="0cm" fo:margin-bottom="0cm" style:contextual-spacing="false"/>
    </style:style>
    <style:style style:name="P138" style:family="paragraph" style:parent-style-name="Text_20_body" style:list-style-name="L103"/>
    <style:style style:name="P139" style:family="paragraph" style:parent-style-name="Text_20_body" style:list-style-name="L103">
      <style:paragraph-properties fo:margin-top="0cm" fo:margin-bottom="0cm" style:contextual-spacing="false"/>
    </style:style>
    <style:style style:name="P140" style:family="paragraph" style:parent-style-name="Text_20_body" style:list-style-name="L104">
      <style:paragraph-properties fo:margin-top="0cm" fo:margin-bottom="0cm" style:contextual-spacing="false"/>
    </style:style>
    <style:style style:name="P141" style:family="paragraph" style:parent-style-name="Text_20_body" style:list-style-name="L105">
      <style:paragraph-properties fo:margin-top="0cm" fo:margin-bottom="0cm" style:contextual-spacing="false"/>
    </style:style>
    <style:style style:name="P142" style:family="paragraph" style:parent-style-name="Text_20_body" style:list-style-name="L106"/>
    <style:style style:name="P143" style:family="paragraph" style:parent-style-name="Text_20_body" style:list-style-name="L107"/>
    <style:style style:name="P144" style:family="paragraph" style:parent-style-name="Text_20_body" style:list-style-name="L107">
      <style:paragraph-properties fo:margin-top="0cm" fo:margin-bottom="0cm" style:contextual-spacing="false"/>
    </style:style>
    <style:style style:name="P145" style:family="paragraph" style:parent-style-name="Text_20_body" style:list-style-name="L108">
      <style:paragraph-properties fo:margin-top="0cm" fo:margin-bottom="0cm" style:contextual-spacing="false"/>
    </style:style>
    <style:style style:name="P146" style:family="paragraph" style:parent-style-name="Text_20_body" style:list-style-name="L109">
      <style:paragraph-properties fo:margin-top="0cm" fo:margin-bottom="0cm" style:contextual-spacing="false"/>
    </style:style>
    <style:style style:name="P147" style:family="paragraph" style:parent-style-name="Text_20_body" style:list-style-name="L110">
      <style:paragraph-properties fo:margin-top="0cm" fo:margin-bottom="0cm" style:contextual-spacing="false"/>
    </style:style>
    <style:style style:name="P148" style:family="paragraph" style:parent-style-name="Text_20_body" style:list-style-name="L111"/>
    <style:style style:name="P149" style:family="paragraph" style:parent-style-name="Text_20_body" style:list-style-name="L112">
      <style:paragraph-properties fo:margin-top="0cm" fo:margin-bottom="0cm" style:contextual-spacing="false"/>
    </style:style>
    <style:style style:name="P150" style:family="paragraph" style:parent-style-name="Text_20_body" style:list-style-name="L113">
      <style:paragraph-properties fo:margin-top="0cm" fo:margin-bottom="0cm" style:contextual-spacing="false"/>
    </style:style>
    <style:style style:name="P151" style:family="paragraph" style:parent-style-name="Text_20_body" style:list-style-name="L114">
      <style:paragraph-properties fo:margin-top="0cm" fo:margin-bottom="0cm" style:contextual-spacing="false"/>
    </style:style>
    <style:style style:name="P152" style:family="paragraph" style:parent-style-name="Text_20_body" style:list-style-name="L115">
      <style:paragraph-properties fo:margin-top="0cm" fo:margin-bottom="0cm" style:contextual-spacing="false"/>
    </style:style>
    <style:style style:name="P153" style:family="paragraph" style:parent-style-name="Text_20_body" style:list-style-name="L116"/>
    <style:style style:name="P154" style:family="paragraph" style:parent-style-name="Text_20_body" style:list-style-name="L117">
      <style:paragraph-properties fo:margin-top="0cm" fo:margin-bottom="0cm" style:contextual-spacing="false"/>
    </style:style>
    <style:style style:name="P155" style:family="paragraph" style:parent-style-name="Text_20_body" style:list-style-name="L118">
      <style:paragraph-properties fo:margin-top="0cm" fo:margin-bottom="0cm" style:contextual-spacing="false"/>
    </style:style>
    <style:style style:name="P156" style:family="paragraph" style:parent-style-name="Text_20_body" style:list-style-name="L119">
      <style:paragraph-properties fo:margin-top="0cm" fo:margin-bottom="0cm" style:contextual-spacing="false"/>
    </style:style>
    <style:style style:name="P157" style:family="paragraph" style:parent-style-name="Text_20_body" style:list-style-name="L120"/>
    <style:style style:name="P158" style:family="paragraph" style:parent-style-name="Text_20_body" style:list-style-name="L121">
      <style:paragraph-properties fo:margin-top="0cm" fo:margin-bottom="0cm" style:contextual-spacing="false"/>
    </style:style>
    <style:style style:name="P159" style:family="paragraph" style:parent-style-name="Text_20_body" style:list-style-name="L122">
      <style:paragraph-properties fo:margin-top="0cm" fo:margin-bottom="0cm" style:contextual-spacing="false"/>
    </style:style>
    <style:style style:name="P160" style:family="paragraph" style:parent-style-name="Text_20_body" style:list-style-name="L123"/>
    <style:style style:name="P161" style:family="paragraph" style:parent-style-name="Text_20_body" style:list-style-name="L124">
      <style:paragraph-properties fo:margin-top="0cm" fo:margin-bottom="0cm" style:contextual-spacing="false"/>
    </style:style>
    <style:style style:name="P162" style:family="paragraph" style:parent-style-name="Text_20_body" style:list-style-name="L125">
      <style:paragraph-properties fo:margin-top="0cm" fo:margin-bottom="0cm" style:contextual-spacing="false"/>
    </style:style>
    <style:style style:name="P163" style:family="paragraph" style:parent-style-name="Text_20_body" style:list-style-name="L126">
      <style:paragraph-properties fo:margin-top="0cm" fo:margin-bottom="0cm" style:contextual-spacing="false"/>
    </style:style>
    <style:style style:name="P164" style:family="paragraph" style:parent-style-name="Text_20_body" style:list-style-name="L127"/>
    <style:style style:name="P165" style:family="paragraph" style:parent-style-name="Text_20_body" style:list-style-name="L128">
      <style:paragraph-properties fo:margin-top="0cm" fo:margin-bottom="0cm" style:contextual-spacing="false"/>
    </style:style>
    <style:style style:name="P166" style:family="paragraph" style:parent-style-name="Text_20_body" style:list-style-name="L129">
      <style:paragraph-properties fo:margin-top="0cm" fo:margin-bottom="0cm" style:contextual-spacing="false"/>
    </style:style>
    <style:style style:name="P167" style:family="paragraph" style:parent-style-name="Text_20_body" style:list-style-name="L130">
      <style:paragraph-properties fo:margin-top="0cm" fo:margin-bottom="0cm" style:contextual-spacing="false"/>
    </style:style>
    <style:style style:name="P168" style:family="paragraph" style:parent-style-name="Text_20_body" style:list-style-name="L131"/>
    <style:style style:name="P169" style:family="paragraph" style:parent-style-name="Text_20_body" style:list-style-name="L132"/>
    <style:style style:name="P170" style:family="paragraph" style:parent-style-name="Text_20_body" style:list-style-name="L132">
      <style:paragraph-properties fo:margin-top="0cm" fo:margin-bottom="0cm" style:contextual-spacing="false"/>
    </style:style>
    <style:style style:name="P171" style:family="paragraph" style:parent-style-name="Text_20_body" style:list-style-name="L133"/>
    <style:style style:name="P172" style:family="paragraph" style:parent-style-name="Text_20_body" style:list-style-name="L133">
      <style:paragraph-properties fo:margin-top="0cm" fo:margin-bottom="0cm" style:contextual-spacing="false"/>
    </style:style>
    <style:style style:name="P173" style:family="paragraph" style:parent-style-name="Text_20_body" style:list-style-name="L134"/>
    <style:style style:name="P174" style:family="paragraph" style:parent-style-name="Text_20_body" style:list-style-name="L134">
      <style:paragraph-properties fo:margin-top="0cm" fo:margin-bottom="0cm" style:contextual-spacing="false"/>
    </style:style>
    <style:style style:name="P175" style:family="paragraph" style:parent-style-name="Text_20_body" style:list-style-name="L135"/>
    <style:style style:name="P176" style:family="paragraph" style:parent-style-name="Text_20_body" style:list-style-name="L135">
      <style:paragraph-properties fo:margin-top="0cm" fo:margin-bottom="0cm" style:contextual-spacing="false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📚 Documentação do Banco de Dados - Sistema de Agendamento</text:p>
      <text:p text:style-name="Text_20_body">&gt; <text:span text:style-name="Strong_20_Emphasis">Sistema Multi-tenant de Agendamento de Serviços com Integração WhatsApp e Google Calendar</text:span> --- </text:p>
      <text:h text:style-name="Heading_20_2" text:outline-level="2">📋 Índice</text:h>
      <text:list xml:id="list1758539515" text:style-name="L1">
        <text:list-item>
          <text:p text:style-name="P2"><text:a xlink:type="simple" xlink:href="#visão-geral" text:style-name="Internet_20_link" text:visited-style-name="Visited_20_Internet_20_Link">Visão Geral</text:a> </text:p>
        </text:list-item>
      </text:list>
      <text:list xml:id="list3721810127" text:style-name="L2">
        <text:list-item>
          <text:p text:style-name="P4"><text:a xlink:type="simple" xlink:href="#arquitetura-do-sistema" text:style-name="Internet_20_link" text:visited-style-name="Visited_20_Internet_20_Link">Arquitetura do Sistema</text:a> </text:p>
        </text:list-item>
      </text:list>
      <text:list xml:id="list895201244" text:style-name="L3">
        <text:list-item>
          <text:p text:style-name="P5"><text:a xlink:type="simple" xlink:href="#modelo-de-dados" text:style-name="Internet_20_link" text:visited-style-name="Visited_20_Internet_20_Link">Modelo de Dados</text:a> </text:p>
        </text:list-item>
      </text:list>
      <text:list xml:id="list3443839777" text:style-name="L4">
        <text:list-item>
          <text:p text:style-name="P6"><text:a xlink:type="simple" xlink:href="#fluxo-de-agendamento" text:style-name="Internet_20_link" text:visited-style-name="Visited_20_Internet_20_Link">Fluxo de Agendamento</text:a> </text:p>
        </text:list-item>
      </text:list>
      <text:list xml:id="list111242941" text:style-name="L5">
        <text:list-item>
          <text:p text:style-name="P7"><text:a xlink:type="simple" xlink:href="#regras-de-negócio" text:style-name="Internet_20_link" text:visited-style-name="Visited_20_Internet_20_Link">Regras de Negócio</text:a> </text:p>
        </text:list-item>
      </text:list>
      <text:list xml:id="list3916468903" text:style-name="L6">
        <text:list-item>
          <text:p text:style-name="P8"><text:a xlink:type="simple" xlink:href="#guia-de-desenvolvimento" text:style-name="Internet_20_link" text:visited-style-name="Visited_20_Internet_20_Link">Guia de Desenvolvimento</text:a> --- </text:p>
        </text:list-item>
      </text:list>
      <text:h text:style-name="Heading_20_2" text:outline-level="2">🎯 Visão Geral</text:h>
      <text:h text:style-name="Heading_20_3" text:outline-level="3">O que é este Sistema?</text:h>
      <text:p text:style-name="Text_20_body">Este é um <text:span text:style-name="Strong_20_Emphasis">sistema de agendamento multi-tenant</text:span> desenvolvido para salões de beleza, clínicas de estética e profissionais autônomos. O sistema permite que múltiplas empresas gerenciem seus agendamentos de forma independente e isolada. </text:p>
      <text:h text:style-name="Heading_20_3" text:outline-level="3">Principais Funcionalidades</text:h>
      <text:list xml:id="list50577539" text:style-name="L7">
        <text:list-item>
          <text:p text:style-name="P10">✅ <text:span text:style-name="Strong_20_Emphasis">Agendamento via WhatsApp</text:span>: Clientes podem agendar serviços conversando pelo WhatsApp </text:p>
        </text:list-item>
        <text:list-item>
          <text:p text:style-name="P10">✅ <text:span text:style-name="Strong_20_Emphasis">Integração Google Calendar</text:span>: Sincronização automática com calendários do Google </text:p>
        </text:list-item>
        <text:list-item>
          <text:p text:style-name="P10">✅ <text:span text:style-name="Strong_20_Emphasis">IA para Processamento de Linguagem</text:span>: Entende mensagens em linguagem natural </text:p>
        </text:list-item>
        <text:list-item>
          <text:p text:style-name="P10">✅ <text:span text:style-name="Strong_20_Emphasis">Multi-tenant</text:span>: Múltiplas empresas no mesmo banco, com isolamento total </text:p>
        </text:list-item>
        <text:list-item>
          <text:p text:style-name="P10">✅ <text:span text:style-name="Strong_20_Emphasis">Sistema de Cobrança</text:span>: Controle de contratos e billing </text:p>
        </text:list-item>
        <text:list-item>
          <text:p text:style-name="P9">✅ <text:span text:style-name="Strong_20_Emphasis">Gestão de Horários</text:span>: Controle de disponibilidade de profissionais </text:p>
        </text:list-item>
      </text:list>
      <text:h text:style-name="Heading_20_3" text:outline-level="3">Tecnologia</text:h>
      <text:list xml:id="list4258274300" text:style-name="L8">
        <text:list-item>
          <text:p text:style-name="P12"><text:span text:style-name="Strong_20_Emphasis">Banco de Dados</text:span>: PostgreSQL 16.9 </text:p>
        </text:list-item>
        <text:list-item>
          <text:p text:style-name="P12"><text:span text:style-name="Strong_20_Emphasis">Tipos de Dados Especiais</text:span>: UUID, CITEXT, TSTZRANGE, INTERVAL </text:p>
        </text:list-item>
        <text:list-item>
          <text:p text:style-name="P11"><text:span text:style-name="Strong_20_Emphasis">Recursos Avançados</text:span>: Campos calculados, triggers, funções PL/pgSQL </text:p>
        </text:list-item>
      </text:list>
      <text:p text:style-name="Text_20_body">--- </text:p>
      <text:h text:style-name="Heading_20_2" text:outline-level="2">🏗️ Arquitetura do Sistema</text:h>
      <text:h text:style-name="Heading_20_3" text:outline-level="3">Conceito Multi-tenant</text:h>
      <text:p text:style-name="Text_20_body">O sistema utiliza o modelo <text:span text:style-name="Strong_20_Emphasis">multi-tenant com isolamento por empresa</text:span>. Isso significa: </text:p>
      <text:list xml:id="list2237458154" text:style-name="L9">
        <text:list-item>
          <text:p text:style-name="P14">Todas as empresas compartilham o mesmo banco de dados </text:p>
        </text:list-item>
        <text:list-item>
          <text:p text:style-name="P14">Cada empresa tem seus dados isolados através do campo <text:span text:style-name="Source_20_Text">empresa_id</text:span> </text:p>
        </text:list-item>
        <text:list-item>
          <text:p text:style-name="P14">Uma empresa <text:span text:style-name="Strong_20_Emphasis">nunca</text:span> acessa dados de outra empresa </text:p>
        </text:list-item>
        <text:list-item>
          <text:p text:style-name="P13">Cada empresa pode ter suas próprias configurações </text:p>
        </text:list-item>
      </text:list>
      <text:p text:style-name="Text_20_body">``<text:span text:style-name="Source_20_Text"> ┌─────────────────────────────────────────────────────────┐ │ BANCO DE DADOS │ │ │ │ ┌──────────────┐ ┌──────────────┐ ┌──────────────┐ │ │ │ Empresa A │ │ Empresa B │ │ Empresa C │ │ │ │ │ │ │ │ │ │ │ │ - Clientes │ │ - Clientes │ │ - Clientes │ │ │ │ - Profission.│ │ - Profission.│ │ - Profission.│ │ │ │ - Agendament.│ │ - Agendament.│ │ - Agendament.│ │ │ └──────────────┘ └──────────────┘ └──────────────┘ │ └─────────────────────────────────────────────────────────┘ </text:span>`<text:span text:style-name="Source_20_Text"> </text:span></text:p>
      <text:h text:style-name="Heading_20_3" text:outline-level="3"><text:span text:style-name="Source_20_Text">Identificação via Instância WhatsApp</text:span></text:h>
      <text:p text:style-name="Text_20_body"><text:span text:style-name="Source_20_Text"><text:span text:style-name="Strong_20_Emphasis">Como o sistema identifica qual empresa está sendo acessada?</text:span></text:span><text:span text:style-name="Source_20_Text"> Quando uma mensagem chega via WhatsApp, o sistema usa a tabela </text:span>instancia<text:span text:style-name="Source_20_Text"> para identificar a empresa: </text:span>`<text:span text:style-name="Source_20_Text"> ┌─────────────────────────────────────────────────────────────┐ │ FLUXO DE IDENTIFICAÇÃO │ └─────────────────────────────────────────────────────────────┘ Cliente envia mensagem → WhatsApp número +55 37 99949-6932 ↓ Webhook identifica instancia_id ↓ SELECT empresa_id FROM instancia WHERE instancia_id = 'xxx' ↓ Empresa identificada! ↓ Todas as operações usam esse empresa_id </text:span>`<text:span text:style-name="Source_20_Text"> </text:span><text:span text:style-name="Source_20_Text"><text:span text:style-name="Strong_20_Emphasis">Exemplo Prático</text:span></text:span><text:span text:style-name="Source_20_Text">: </text:span></text:p>
      <text:list xml:id="list1116514887" text:style-name="L10">
        <text:list-item>
          <text:p text:style-name="P16"><text:span text:style-name="Source_20_Text"><text:span text:style-name="Strong_20_Emphasis">Empresa</text:span></text:span><text:span text:style-name="Source_20_Text">: Espaço Pamela Moraes </text:span></text:p>
        </text:list-item>
        <text:list-item>
          <text:p text:style-name="P16"><text:span text:style-name="Source_20_Text"><text:span text:style-name="Strong_20_Emphasis">Número WhatsApp</text:span></text:span><text:span text:style-name="Source_20_Text">: 37999496932 </text:span></text:p>
        </text:list-item>
        <text:list-item>
          <text:p text:style-name="P16"><text:span text:style-name="Source_20_Text"><text:span text:style-name="Strong_20_Emphasis">Instância ID</text:span></text:span><text:span text:style-name="Source_20_Text">: (UUID único) </text:span></text:p>
        </text:list-item>
        <text:list-item>
          <text:p text:style-name="P15"><text:span text:style-name="Source_20_Text"><text:span text:style-name="Strong_20_Emphasis">Empresa ID</text:span></text:span><text:span text:style-name="Source_20_Text">: 9ce11fb2-4440-4586-8ec5-fef4e22321e1 </text:span></text:p>
        </text:list-item>
      </text:list>
      <text:p text:style-name="P3"><text:span text:style-name="Source_20_Text">Quando um cliente envia mensagem para o número 37999496932, o sistema: </text:span></text:p>
      <text:list xml:id="list1158717167" text:style-name="L11">
        <text:list-item>
          <text:p text:style-name="P17"><text:span text:style-name="Source_20_Text">Identifica qual instância recebeu a mensagem </text:span></text:p>
        </text:list-item>
      </text:list>
      <text:list xml:id="list3187140979" text:style-name="L12">
        <text:list-item>
          <text:p text:style-name="P18"><text:span text:style-name="Source_20_Text">Busca o </text:span>empresa_id<text:span text:style-name="Source_20_Text"> dessa instância </text:span></text:p>
        </text:list-item>
      </text:list>
      <text:list xml:id="list3299993179" text:style-name="L13">
        <text:list-item>
          <text:p text:style-name="P19"><text:span text:style-name="Source_20_Text">Todas as consultas filtram por esse </text:span>empresa_id<text:span text:style-name="Source_20_Text"> </text:span></text:p>
        </text:list-item>
      </text:list>
      <text:h text:style-name="Heading_20_3" text:outline-level="3"><text:span text:style-name="Source_20_Text">Camadas do Sistema</text:span></text:h>
      <text:list xml:id="list477196449" text:style-name="L14">
        <text:list-item>
          <text:p text:style-name="P20"><text:span text:style-name="Source_20_Text"><text:span text:style-name="Strong_20_Emphasis">Camada de Empresa</text:span></text:span><text:span text:style-name="Source_20_Text">: Configurações e dados da empresa </text:span></text:p>
        </text:list-item>
      </text:list>
      <text:list xml:id="list2069761797" text:style-name="L15">
        <text:list-item>
          <text:p text:style-name="P21"><text:span text:style-name="Source_20_Text"><text:span text:style-name="Strong_20_Emphasis">Camada de Profissionais</text:span></text:span><text:span text:style-name="Source_20_Text">: Profissionais, serviços e horários </text:span></text:p>
        </text:list-item>
      </text:list>
      <text:list xml:id="list56797540" text:style-name="L16">
        <text:list-item>
          <text:p text:style-name="P22"><text:span text:style-name="Source_20_Text"><text:span text:style-name="Strong_20_Emphasis">Camada de Clientes</text:span></text:span><text:span text:style-name="Source_20_Text">: Cadastro de clientes </text:span></text:p>
        </text:list-item>
      </text:list>
      <text:list xml:id="list2210458312" text:style-name="L17">
        <text:list-item>
          <text:p text:style-name="P23"><text:span text:style-name="Source_20_Text"><text:span text:style-name="Strong_20_Emphasis">Camada de Agendamento</text:span></text:span><text:span text:style-name="Source_20_Text">: Agendamentos e seus serviços </text:span></text:p>
        </text:list-item>
      </text:list>
      <text:list xml:id="list1351013293" text:style-name="L18">
        <text:list-item>
          <text:p text:style-name="P24"><text:span text:style-name="Source_20_Text"><text:span text:style-name="Strong_20_Emphasis">Camada de Integração</text:span></text:span><text:span text:style-name="Source_20_Text">: WhatsApp, Google Calendar e IA </text:span></text:p>
        </text:list-item>
      </text:list>
      <text:list xml:id="list503060115" text:style-name="L19">
        <text:list-item>
          <text:p text:style-name="P25"><text:span text:style-name="Source_20_Text"><text:span text:style-name="Strong_20_Emphasis">Camada de Controle</text:span></text:span><text:span text:style-name="Source_20_Text">: Autenticação, billing e auditoria --- </text:span></text:p>
        </text:list-item>
      </text:list>
      <text:h text:style-name="Heading_20_2" text:outline-level="2"><text:span text:style-name="Source_20_Text">📊 Modelo de Dados</text:span></text:h>
      <text:h text:style-name="Heading_20_3" text:outline-level="3"><text:span text:style-name="Source_20_Text">Visão Geral das Tabelas</text:span></text:h>
      <text:p text:style-name="P3"><text:span text:style-name="Source_20_Text">O banco possui </text:span><text:span text:style-name="Source_20_Text"><text:span text:style-name="Strong_20_Emphasis">20 tabelas</text:span></text:span><text:span text:style-name="Source_20_Text"> organizadas em grupos funcionais: 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Table_20_Contents">Grupo</text:p>
          </table:table-cell>
          <table:table-cell table:style-name="Tabela1.B1" office:value-type="string">
            <text:p text:style-name="Table_20_Contents">Tabelas</text:p>
          </table:table-cell>
          <table:table-cell table:style-name="Tabela1.B1" office:value-type="string">
            <text:p text:style-name="Table_20_Contents">Propósito</text:p>
          </table:table-cell>
        </table:table-row>
        <table:table-row>
          <table:table-cell table:style-name="Tabela1.A2" office:value-type="string">
            <text:p text:style-name="Table_20_Contents">-------</text:p>
          </table:table-cell>
          <table:table-cell table:style-name="Tabela1.B2" office:value-type="string">
            <text:p text:style-name="Table_20_Contents">---------</text:p>
          </table:table-cell>
          <table:table-cell table:style-name="Tabela1.B2" office:value-type="string">
            <text:p text:style-name="Table_20_Contents">-----------</text:p>
          </table:table-cell>
        </table:table-row>
        <table:table-row>
          <table:table-cell table:style-name="Tabela1.A2" office:value-type="string">
            <text:p text:style-name="Table_20_Contents"><text:span text:style-name="Strong_20_Emphasis">Empresa</text:span></text:p>
          </table:table-cell>
          <table:table-cell table:style-name="Tabela1.B2" office:value-type="string">
            <text:p text:style-name="Table_20_Contents">empresa<text:span text:style-name="Source_20_Text">, </text:span>empresa_cfg<text:span text:style-name="Source_20_Text">, </text:span>endereco</text:p>
          </table:table-cell>
          <table:table-cell table:style-name="Tabela1.B2" office:value-type="string">
            <text:p text:style-name="Table_20_Contents">Dados e configurações da empresa</text:p>
          </table:table-cell>
        </table:table-row>
        <table:table-row>
          <table:table-cell table:style-name="Tabela1.A2" office:value-type="string">
            <text:p text:style-name="Table_20_Contents"><text:span text:style-name="Strong_20_Emphasis">Profissionais</text:span></text:p>
          </table:table-cell>
          <table:table-cell table:style-name="Tabela1.B2" office:value-type="string">
            <text:p text:style-name="Table_20_Contents">profissional<text:span text:style-name="Source_20_Text">, </text:span>servicos<text:span text:style-name="Source_20_Text">, </text:span>profissional_servico</text:p>
          </table:table-cell>
          <table:table-cell table:style-name="Tabela1.B2" office:value-type="string">
            <text:p text:style-name="Table_20_Contents">Profissionais e serviços oferecidos</text:p>
          </table:table-cell>
        </table:table-row>
        <table:table-row>
          <table:table-cell table:style-name="Tabela1.A2" office:value-type="string">
            <text:p text:style-name="Table_20_Contents"><text:span text:style-name="Strong_20_Emphasis">Horários</text:span></text:p>
          </table:table-cell>
          <table:table-cell table:style-name="Tabela1.B2" office:value-type="string">
            <text:p text:style-name="Table_20_Contents">horario_f<text:span text:style-name="Source_20_Text">, </text:span>horario_det<text:span text:style-name="Source_20_Text">, </text:span>profissional_horario</text:p>
          </table:table-cell>
          <table:table-cell table:style-name="Tabela1.B2" office:value-type="string">
            <text:p text:style-name="Table_20_Contents">Gestão de horários de trabalho</text:p>
          </table:table-cell>
        </table:table-row>
        <table:table-row>
          <table:table-cell table:style-name="Tabela1.A2" office:value-type="string">
            <text:p text:style-name="Table_20_Contents"><text:span text:style-name="Strong_20_Emphasis">Clientes</text:span></text:p>
          </table:table-cell>
          <table:table-cell table:style-name="Tabela1.B2" office:value-type="string">
            <text:p text:style-name="Table_20_Contents">clientes</text:p>
          </table:table-cell>
          <table:table-cell table:style-name="Tabela1.B2" office:value-type="string">
            <text:p text:style-name="Table_20_Contents">Cadastro de clientes</text:p>
          </table:table-cell>
        </table:table-row>
        <table:table-row>
          <table:table-cell table:style-name="Tabela1.A2" office:value-type="string">
            <text:p text:style-name="Table_20_Contents"><text:span text:style-name="Strong_20_Emphasis">Agendamentos</text:span></text:p>
          </table:table-cell>
          <table:table-cell table:style-name="Tabela1.B2" office:value-type="string">
            <text:p text:style-name="Table_20_Contents">agendamento<text:span text:style-name="Source_20_Text">, </text:span>agendamento_servico<text:span text:style-name="Source_20_Text">, </text:span>status_agend</text:p>
          </table:table-cell>
          <table:table-cell table:style-name="Tabela1.B2" office:value-type="string">
            <text:p text:style-name="Table_20_Contents">Gestão de agendamentos</text:p>
          </table:table-cell>
        </table:table-row>
        <table:table-row>
          <table:table-cell table:style-name="Tabela1.A2" office:value-type="string">
            <text:p text:style-name="Table_20_Contents"><text:span text:style-name="Strong_20_Emphasis">Integração</text:span></text:p>
          </table:table-cell>
          <table:table-cell table:style-name="Tabela1.B2" office:value-type="string">
            <text:p text:style-name="Table_20_Contents">gcalendar<text:span text:style-name="Source_20_Text">, </text:span>contexto_sessao<text:span text:style-name="Source_20_Text">, </text:span>ai_prompt_templates</text:p>
          </table:table-cell>
          <table:table-cell table:style-name="Tabela1.B2" office:value-type="string">
            <text:p text:style-name="Table_20_Contents">Integrações externas e IA</text:p>
          </table:table-cell>
        </table:table-row>
        <table:table-row>
          <table:table-cell table:style-name="Tabela1.A2" office:value-type="string">
            <text:p text:style-name="Table_20_Contents"><text:span text:style-name="Strong_20_Emphasis">Controle</text:span></text:p>
          </table:table-cell>
          <table:table-cell table:style-name="Tabela1.B2" office:value-type="string">
            <text:p text:style-name="Table_20_Contents">login<text:span text:style-name="Source_20_Text">, </text:span>nivel_acesso<text:span text:style-name="Source_20_Text">, </text:span>instancia</text:p>
          </table:table-cell>
          <table:table-cell table:style-name="Tabela1.B2" office:value-type="string">
            <text:p text:style-name="Table_20_Contents">Autenticação e controle</text:p>
          </table:table-cell>
        </table:table-row>
        <table:table-row>
          <table:table-cell table:style-name="Tabela1.A10" office:value-type="string">
            <text:p text:style-name="Table_20_Contents"><text:span text:style-name="Strong_20_Emphasis">Billing</text:span></text:p>
          </table:table-cell>
          <table:table-cell table:style-name="Tabela1.B10" office:value-type="string">
            <text:p text:style-name="Table_20_Contents">contrato</text:p>
          </table:table-cell>
          <table:table-cell table:style-name="Tabela1.B10" office:value-type="string">
            <text:p text:style-name="Table_20_Contents">Sistema de cobrança</text:p>
          </table:table-cell>
        </table:table-row>
      </table:table>
      <text:p text:style-name="Text_20_body"><text:span text:style-name="Source_20_Text">--- </text:span></text:p>
      <text:h text:style-name="Heading_20_2" text:outline-level="2"><text:span text:style-name="Source_20_Text">📦 Detalhamento das Tabelas</text:span></text:h>
      <text:h text:style-name="Heading_20_3" text:outline-level="3"><text:span text:style-name="Source_20_Text">🏢 Grupo: Empresa</text:span></text:h>
      <text:h text:style-name="Heading_20_4" text:outline-level="4">empresa<text:span text:style-name="Source_20_Text"> - Cadastro de Empresas</text:span></text:h>
      <text:p text:style-name="Text_20_body"><text:span text:style-name="Source_20_Text"><text:span text:style-name="Strong_20_Emphasis">Descrição</text:span></text:span><text:span text:style-name="Source_20_Text">: Tabela raiz do sistema. Cada empresa representa um tenant independente. </text:span>`<text:span text:style-name="Source_20_Text">sql CREATE TABLE empresa ( empresa_id uuid PRIMARY KEY DEFAULT gen_random_uuid(), endereco_id uuid NOT NULL, empresa_cfg_id uuid NOT NULL, cep varchar(8) NOT NULL, empresa_nome varchar(100) NOT NULL, empresa_contato varchar(50) NOT NULL, empresa_dt_criacao timestamptz DEFAULT now(), empresa_dt_atualizacao timestamptz DEFAULT now(), status varchar(20) DEFAULT 'ativa', endereco text, observacoes text, empresa_contato_agente varchar(20) DEFAULT '' ); </text:span>`<text:span text:style-name="Source_20_Text"> </text:span><text:span text:style-name="Source_20_Text"><text:span text:style-name="Strong_20_Emphasis">Campos Importantes</text:span></text:span><text:span text:style-name="Source_20_Text">: </text:span></text:p>
      <text:list xml:id="list611518547" text:style-name="L20">
        <text:list-item>
          <text:p text:style-name="P27">empresa_id<text:span text:style-name="Source_20_Text">: Chave primária, usada em todo o sistema para isolamento </text:span></text:p>
        </text:list-item>
        <text:list-item>
          <text:p text:style-name="P27">status<text:span text:style-name="Source_20_Text">: Controla se a empresa está ativa ou inativa </text:span></text:p>
        </text:list-item>
        <text:list-item>
          <text:p text:style-name="P27">empresa_contato<text:span text:style-name="Source_20_Text">: Telefone de contato (geralmente WhatsApp) </text:span></text:p>
        </text:list-item>
        <text:list-item>
          <text:p text:style-name="P26">empresa_contato_agente<text:span text:style-name="Source_20_Text">: Número do agente/bot de WhatsApp </text:span></text:p>
        </text:list-item>
      </text:list>
      <text:p text:style-name="Text_20_body"><text:span text:style-name="Source_20_Text"><text:span text:style-name="Strong_20_Emphasis">Exemplo de Dados Reais</text:span></text:span><text:span text:style-name="Source_20_Text">: </text:span>`<text:span text:style-name="Source_20_Text"> Espaço Pamela Moraes </text:span></text:p>
      <text:list xml:id="list1131598544" text:style-name="L21">
        <text:list-item>
          <text:p text:style-name="P29"><text:span text:style-name="Source_20_Text">Telefone: 37999496932 </text:span></text:p>
        </text:list-item>
        <text:list-item>
          <text:p text:style-name="P29"><text:span text:style-name="Source_20_Text">Endereço: Travessa 4, 15 - Tibo pereira, Formiga/MG </text:span></text:p>
        </text:list-item>
        <text:list-item>
          <text:p text:style-name="P28"><text:span text:style-name="Source_20_Text">Status: ativa </text:span></text:p>
        </text:list-item>
      </text:list>
      <text:p text:style-name="Text_20_body">`<text:span text:style-name="Source_20_Text"> --- </text:span></text:p>
      <text:h text:style-name="Heading_20_4" text:outline-level="4">empresa_cfg<text:span text:style-name="Source_20_Text"> - Configurações da Empresa</text:span></text:h>
      <text:p text:style-name="P3"><text:span text:style-name="Source_20_Text"><text:span text:style-name="Strong_20_Emphasis">Descrição</text:span></text:span><text:span text:style-name="Source_20_Text">: Configurações específicas de cada empresa para controle de agendamentos. </text:span>`<text:span text:style-name="Source_20_Text">sql CREATE TABLE empresa_cfg ( empresa_cfg_id uuid PRIMARY KEY DEFAULT gen_random_uuid(), empresa_cfg_anteced_minutos integer NOT NULL, empresa_cfg_interv_minutos integer NOT NULL, empresa_cfg_buffer_pre_minutos integer NOT NULL, empresa_cfg_buffer_pos_minutos integer NOT NULL, empresa_cfg_timezone text DEFAULT 'America/Sao_Paulo', billing_enabled boolean DEFAULT false, empresa_cfg_billing_grace_days integer DEFAULT 3, empresa_cfg_nome varchar(100) DEFAULT 'Configuração Padrão', prompt_key text DEFAULT 'prompt_agendamento', prompt_version text DEFAULT '2025-08-26-01' ); </text:span>`<text:span text:style-name="Source_20_Text"> </text:span><text:span text:style-name="Source_20_Text"><text:span text:style-name="Strong_20_Emphasis">Configurações Explicadas</text:span></text:span><text:span text:style-name="Source_20_Text">: 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Table_20_Contents">Campo</text:p>
          </table:table-cell>
          <table:table-cell table:style-name="Tabela2.B1" office:value-type="string">
            <text:p text:style-name="Table_20_Contents">Descrição</text:p>
          </table:table-cell>
          <table:table-cell table:style-name="Tabela2.B1" office:value-type="string">
            <text:p text:style-name="Table_20_Contents">Exemplo</text:p>
          </table:table-cell>
        </table:table-row>
        <table:table-row>
          <table:table-cell table:style-name="Tabela2.A2" office:value-type="string">
            <text:p text:style-name="Table_20_Contents">-------</text:p>
          </table:table-cell>
          <table:table-cell table:style-name="Tabela2.B2" office:value-type="string">
            <text:p text:style-name="Table_20_Contents">-----------</text:p>
          </table:table-cell>
          <table:table-cell table:style-name="Tabela2.B2" office:value-type="string">
            <text:p text:style-name="Table_20_Contents">---------</text:p>
          </table:table-cell>
        </table:table-row>
        <table:table-row>
          <table:table-cell table:style-name="Tabela2.A2" office:value-type="string">
            <text:p text:style-name="Table_20_Contents">empresa_cfg_anteced_minutos</text:p>
          </table:table-cell>
          <table:table-cell table:style-name="Tabela2.B2" office:value-type="string">
            <text:p text:style-name="Table_20_Contents">Tempo mínimo de antecedência para agendar</text:p>
          </table:table-cell>
          <table:table-cell table:style-name="Tabela2.B2" office:value-type="string">
            <text:p text:style-name="Table_20_Contents">30 minutos</text:p>
          </table:table-cell>
        </table:table-row>
        <table:table-row>
          <table:table-cell table:style-name="Tabela2.A2" office:value-type="string">
            <text:p text:style-name="Table_20_Contents">empresa_cfg_interv_minutos</text:p>
          </table:table-cell>
          <table:table-cell table:style-name="Tabela2.B2" office:value-type="string">
            <text:p text:style-name="Table_20_Contents">Intervalo mínimo entre agendamentos</text:p>
          </table:table-cell>
          <table:table-cell table:style-name="Tabela2.B2" office:value-type="string">
            <text:p text:style-name="Table_20_Contents">15 minutos</text:p>
          </table:table-cell>
        </table:table-row>
        <table:table-row>
          <table:table-cell table:style-name="Tabela2.A2" office:value-type="string">
            <text:p text:style-name="Table_20_Contents">empresa_cfg_buffer_pre_minutos</text:p>
          </table:table-cell>
          <table:table-cell table:style-name="Tabela2.B2" office:value-type="string">
            <text:p text:style-name="Table_20_Contents">Tempo de preparação antes do atendimento</text:p>
          </table:table-cell>
          <table:table-cell table:style-name="Tabela2.B2" office:value-type="string">
            <text:p text:style-name="Table_20_Contents">5 minutos</text:p>
          </table:table-cell>
        </table:table-row>
        <table:table-row>
          <table:table-cell table:style-name="Tabela2.A2" office:value-type="string">
            <text:p text:style-name="Table_20_Contents">empresa_cfg_buffer_pos_minutos</text:p>
          </table:table-cell>
          <table:table-cell table:style-name="Tabela2.B2" office:value-type="string">
            <text:p text:style-name="Table_20_Contents">Tempo de limpeza após o atendimento</text:p>
          </table:table-cell>
          <table:table-cell table:style-name="Tabela2.B2" office:value-type="string">
            <text:p text:style-name="Table_20_Contents">5 minutos</text:p>
          </table:table-cell>
        </table:table-row>
        <table:table-row>
          <table:table-cell table:style-name="Tabela2.A2" office:value-type="string">
            <text:p text:style-name="Table_20_Contents">empresa_cfg_timezone</text:p>
          </table:table-cell>
          <table:table-cell table:style-name="Tabela2.B2" office:value-type="string">
            <text:p text:style-name="Table_20_Contents">Fuso horário da empresa</text:p>
          </table:table-cell>
          <table:table-cell table:style-name="Tabela2.B2" office:value-type="string">
            <text:p text:style-name="Table_20_Contents">America/Sao_Paulo</text:p>
          </table:table-cell>
        </table:table-row>
        <table:table-row>
          <table:table-cell table:style-name="Tabela2.A2" office:value-type="string">
            <text:p text:style-name="Table_20_Contents">billing_enabled</text:p>
          </table:table-cell>
          <table:table-cell table:style-name="Tabela2.B2" office:value-type="string">
            <text:p text:style-name="Table_20_Contents">Se o sistema de cobrança está ativo</text:p>
          </table:table-cell>
          <table:table-cell table:style-name="Tabela2.B2" office:value-type="string">
            <text:p text:style-name="Table_20_Contents">true/false</text:p>
          </table:table-cell>
        </table:table-row>
        <table:table-row>
          <table:table-cell table:style-name="Tabela2.A2" office:value-type="string">
            <text:p text:style-name="Table_20_Contents">prompt_key</text:p>
          </table:table-cell>
          <table:table-cell table:style-name="Tabela2.B2" office:value-type="string">
            <text:p text:style-name="Table_20_Contents">Chave do template de IA a usar</text:p>
          </table:table-cell>
          <table:table-cell table:style-name="Tabela2.B2" office:value-type="string">
            <text:p text:style-name="Table_20_Contents">prompt_julia_fane</text:p>
          </table:table-cell>
        </table:table-row>
        <table:table-row>
          <table:table-cell table:style-name="Tabela2.A10" office:value-type="string">
            <text:p text:style-name="Table_20_Contents">prompt_version</text:p>
          </table:table-cell>
          <table:table-cell table:style-name="Tabela2.B10" office:value-type="string">
            <text:p text:style-name="Table_20_Contents">Versão do template de IA</text:p>
          </table:table-cell>
          <table:table-cell table:style-name="Tabela2.B10" office:value-type="string">
            <text:p text:style-name="Table_20_Contents">2025-10-08-02</text:p>
          </table:table-cell>
        </table:table-row>
      </table:table>
      <text:p text:style-name="Text_20_body"><text:span text:style-name="Source_20_Text"><text:span text:style-name="Strong_20_Emphasis">Exemplo Prático</text:span></text:span><text:span text:style-name="Source_20_Text">: </text:span>`<text:span text:style-name="Source_20_Text"> Configuração Julia Fane: </text:span></text:p>
      <text:list xml:id="list2107198532" text:style-name="L22">
        <text:list-item>
          <text:p text:style-name="P31"><text:span text:style-name="Source_20_Text">Antecedência: 30 minutos </text:span></text:p>
        </text:list-item>
        <text:list-item>
          <text:p text:style-name="P31"><text:span text:style-name="Source_20_Text">Intervalo: 15 minutos </text:span></text:p>
        </text:list-item>
        <text:list-item>
          <text:p text:style-name="P31"><text:span text:style-name="Source_20_Text">Buffer pré: 0 minutos </text:span></text:p>
        </text:list-item>
        <text:list-item>
          <text:p text:style-name="P31"><text:span text:style-name="Source_20_Text">Buffer pós: 0 minutos </text:span></text:p>
        </text:list-item>
        <text:list-item>
          <text:p text:style-name="P30"><text:span text:style-name="Source_20_Text">Prompt personalizado: prompt_julia_fane v2025-10-08-02 </text:span></text:p>
        </text:list-item>
      </text:list>
      <text:p text:style-name="Text_20_body">`<text:span text:style-name="Source_20_Text"> --- </text:span></text:p>
      <text:h text:style-name="Heading_20_4" text:outline-level="4">endereco<text:span text:style-name="Source_20_Text"> - Endereços</text:span></text:h>
      <text:p text:style-name="Text_20_body"><text:span text:style-name="Source_20_Text"><text:span text:style-name="Strong_20_Emphasis">Descrição</text:span></text:span><text:span text:style-name="Source_20_Text">: Armazena endereços de empresas e profissionais. </text:span>`<text:span text:style-name="Source_20_Text">sql CREATE TABLE endereco ( endereco_id uuid PRIMARY KEY DEFAULT gen_random_uuid(), cep varchar(8) NOT NULL, logradouro varchar(200) NOT NULL, numero varchar(20), complemento varchar(100), bairro varchar(100) NOT NULL, cidade varchar(100) NOT NULL, uf varchar(2) NOT NULL, created_at timestamptz DEFAULT now(), updated_at timestamptz DEFAULT now() ); </text:span>`<text:span text:style-name="Source_20_Text"> </text:span><text:span text:style-name="Source_20_Text"><text:span text:style-name="Strong_20_Emphasis">Observações</text:span></text:span><text:span text:style-name="Source_20_Text">: </text:span></text:p>
      <text:list xml:id="list2236312785" text:style-name="L23">
        <text:list-item>
          <text:p text:style-name="P33"><text:span text:style-name="Source_20_Text">CEP sem hífen (apenas números) </text:span></text:p>
        </text:list-item>
        <text:list-item>
          <text:p text:style-name="P33"><text:span text:style-name="Source_20_Text">UF com 2 caracteres </text:span></text:p>
        </text:list-item>
        <text:list-item>
          <text:p text:style-name="P32"><text:span text:style-name="Source_20_Text">Timestamps automáticos de criação e atualização </text:span></text:p>
        </text:list-item>
      </text:list>
      <text:p text:style-name="Text_20_body"><text:span text:style-name="Source_20_Text">--- </text:span></text:p>
      <text:h text:style-name="Heading_20_3" text:outline-level="3"><text:span text:style-name="Source_20_Text">👥 Grupo: Profissionais e Serviços</text:span></text:h>
      <text:h text:style-name="Heading_20_4" text:outline-level="4">profissional<text:span text:style-name="Source_20_Text"> - Cadastro de Profissionais</text:span></text:h>
      <text:p text:style-name="Text_20_body"><text:span text:style-name="Source_20_Text"><text:span text:style-name="Strong_20_Emphasis">Descrição</text:span></text:span><text:span text:style-name="Source_20_Text">: Profissionais que prestam serviços nas empresas. </text:span>`<text:span text:style-name="Source_20_Text">sql CREATE TABLE profissional ( profissional_id uuid PRIMARY KEY DEFAULT gen_random_uuid(), empresa_id uuid NOT NULL, endereco_id uuid NOT NULL, cep varchar(8) NOT NULL, profissional_nome varchar(50) NOT NULL, profissional_contato varchar(20) NOT NULL, profissional_dt_criacao timestamptz DEFAULT now(), profissional_dt_atualizacao timestamptz DEFAULT now(), status varchar(20) DEFAULT 'ativo', especialidade varchar(100), email varchar(100), observacoes text ); </text:span>`<text:span text:style-name="Source_20_Text"> </text:span><text:span text:style-name="Source_20_Text"><text:span text:style-name="Strong_20_Emphasis">Características</text:span></text:span><text:span text:style-name="Source_20_Text">: </text:span></text:p>
      <text:list xml:id="list2401398441" text:style-name="L24">
        <text:list-item>
          <text:p text:style-name="P35"><text:span text:style-name="Source_20_Text">Cada profissional pertence a uma empresa (</text:span>empresa_id<text:span text:style-name="Source_20_Text">) </text:span></text:p>
        </text:list-item>
        <text:list-item>
          <text:p text:style-name="P35"><text:span text:style-name="Source_20_Text">Pode ter especialidade definida </text:span></text:p>
        </text:list-item>
        <text:list-item>
          <text:p text:style-name="P35"><text:span text:style-name="Source_20_Text">Status controla se está ativo ou inativo </text:span></text:p>
        </text:list-item>
        <text:list-item>
          <text:p text:style-name="P34"><text:span text:style-name="Source_20_Text">Possui endereço próprio </text:span></text:p>
        </text:list-item>
      </text:list>
      <text:p text:style-name="Text_20_body"><text:span text:style-name="Source_20_Text">--- </text:span></text:p>
      <text:h text:style-name="Heading_20_4" text:outline-level="4">servicos<text:span text:style-name="Source_20_Text"> - Catálogo de Serviços</text:span></text:h>
      <text:p text:style-name="P3"><text:span text:style-name="Source_20_Text"><text:span text:style-name="Strong_20_Emphasis">Descrição</text:span></text:span><text:span text:style-name="Source_20_Text">: Serviços oferecidos pelas empresas. </text:span>`<text:span text:style-name="Source_20_Text">sql CREATE TABLE servicos ( servicos_id uuid PRIMARY KEY DEFAULT gen_random_uuid(), servicos_nome varchar(255) NOT NULL, servicos_duracao interval NOT NULL, servicos_valor numeric(10,2) NOT NULL, servicos_descricao varchar(255) NOT NULL, status varchar(20) DEFAULT 'ativo' ); </text:span>`<text:span text:style-name="Source_20_Text"> </text:span><text:span text:style-name="Source_20_Text"><text:span text:style-name="Strong_20_Emphasis">Exemplos de Serviços Reais</text:span></text:span><text:span text:style-name="Source_20_Text">: 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Table_20_Contents">Serviço</text:p>
          </table:table-cell>
          <table:table-cell table:style-name="Tabela3.B1" office:value-type="string">
            <text:p text:style-name="Table_20_Contents">Duração</text:p>
          </table:table-cell>
          <table:table-cell table:style-name="Tabela3.B1" office:value-type="string">
            <text:p text:style-name="Table_20_Contents">Valor</text:p>
          </table:table-cell>
          <table:table-cell table:style-name="Tabela3.B1" office:value-type="string">
            <text:p text:style-name="Table_20_Contents">Descrição</text:p>
          </table:table-cell>
        </table:table-row>
        <table:table-row>
          <table:table-cell table:style-name="Tabela3.A2" office:value-type="string">
            <text:p text:style-name="Table_20_Contents">---------</text:p>
          </table:table-cell>
          <table:table-cell table:style-name="Tabela3.B2" office:value-type="string">
            <text:p text:style-name="Table_20_Contents">---------</text:p>
          </table:table-cell>
          <table:table-cell table:style-name="Tabela3.B2" office:value-type="string">
            <text:p text:style-name="Table_20_Contents">-------</text:p>
          </table:table-cell>
          <table:table-cell table:style-name="Tabela3.B2" office:value-type="string">
            <text:p text:style-name="Table_20_Contents">-----------</text:p>
          </table:table-cell>
        </table:table-row>
        <table:table-row>
          <table:table-cell table:style-name="Tabela3.A2" office:value-type="string">
            <text:p text:style-name="Table_20_Contents">Limpeza de pele</text:p>
          </table:table-cell>
          <table:table-cell table:style-name="Tabela3.B2" office:value-type="string">
            <text:p text:style-name="Table_20_Contents">1h30</text:p>
          </table:table-cell>
          <table:table-cell table:style-name="Tabela3.B2" office:value-type="string">
            <text:p text:style-name="Table_20_Contents">R$ 150,00</text:p>
          </table:table-cell>
          <table:table-cell table:style-name="Tabela3.B2" office:value-type="string">
            <text:p text:style-name="Table_20_Contents">Limpeza de pele</text:p>
          </table:table-cell>
        </table:table-row>
        <table:table-row>
          <table:table-cell table:style-name="Tabela3.A2" office:value-type="string">
            <text:p text:style-name="Table_20_Contents">Design na pinça</text:p>
          </table:table-cell>
          <table:table-cell table:style-name="Tabela3.B2" office:value-type="string">
            <text:p text:style-name="Table_20_Contents">20min</text:p>
          </table:table-cell>
          <table:table-cell table:style-name="Tabela3.B2" office:value-type="string">
            <text:p text:style-name="Table_20_Contents">R$ 40,00</text:p>
          </table:table-cell>
          <table:table-cell table:style-name="Tabela3.B2" office:value-type="string">
            <text:p text:style-name="Table_20_Contents">Design na pinça</text:p>
          </table:table-cell>
        </table:table-row>
        <table:table-row>
          <table:table-cell table:style-name="Tabela3.A2" office:value-type="string">
            <text:p text:style-name="Table_20_Contents">Escova</text:p>
          </table:table-cell>
          <table:table-cell table:style-name="Tabela3.B2" office:value-type="string">
            <text:p text:style-name="Table_20_Contents">30min</text:p>
          </table:table-cell>
          <table:table-cell table:style-name="Tabela3.B2" office:value-type="string">
            <text:p text:style-name="Table_20_Contents">R$ 60,00</text:p>
          </table:table-cell>
          <table:table-cell table:style-name="Tabela3.B2" office:value-type="string">
            <text:p text:style-name="Table_20_Contents">Escova modeladora</text:p>
          </table:table-cell>
        </table:table-row>
        <table:table-row>
          <table:table-cell table:style-name="Tabela3.A2" office:value-type="string">
            <text:p text:style-name="Table_20_Contents">Baby Liss</text:p>
          </table:table-cell>
          <table:table-cell table:style-name="Tabela3.B2" office:value-type="string">
            <text:p text:style-name="Table_20_Contents">1h</text:p>
          </table:table-cell>
          <table:table-cell table:style-name="Tabela3.B2" office:value-type="string">
            <text:p text:style-name="Table_20_Contents">R$ 70,00</text:p>
          </table:table-cell>
          <table:table-cell table:style-name="Tabela3.B2" office:value-type="string">
            <text:p text:style-name="Table_20_Contents">Cachos com babyliss</text:p>
          </table:table-cell>
        </table:table-row>
        <table:table-row>
          <table:table-cell table:style-name="Tabela3.A7" office:value-type="string">
            <text:p text:style-name="Table_20_Contents">Alongamento gel</text:p>
          </table:table-cell>
          <table:table-cell table:style-name="Tabela3.B7" office:value-type="string">
            <text:p text:style-name="Table_20_Contents">4h</text:p>
          </table:table-cell>
          <table:table-cell table:style-name="Tabela3.B7" office:value-type="string">
            <text:p text:style-name="Table_20_Contents">R$ 150,00</text:p>
          </table:table-cell>
          <table:table-cell table:style-name="Tabela3.B7" office:value-type="string">
            <text:p text:style-name="Table_20_Contents">Alongamento em gel</text:p>
          </table:table-cell>
        </table:table-row>
      </table:table>
      <text:p text:style-name="Text_20_body"><text:span text:style-name="Source_20_Text"><text:span text:style-name="Strong_20_Emphasis">Observações</text:span></text:span><text:span text:style-name="Source_20_Text">: </text:span></text:p>
      <text:list xml:id="list1723061351" text:style-name="L25">
        <text:list-item>
          <text:p text:style-name="P37"><text:span text:style-name="Source_20_Text">Duração usa tipo </text:span>interval<text:span text:style-name="Source_20_Text"> do PostgreSQL </text:span></text:p>
        </text:list-item>
        <text:list-item>
          <text:p text:style-name="P37"><text:soft-page-break/><text:span text:style-name="Source_20_Text">Valores em formato decimal (10,2) </text:span></text:p>
        </text:list-item>
        <text:list-item>
          <text:p text:style-name="P36"><text:span text:style-name="Source_20_Text">Serviços podem ser ativados/desativados </text:span></text:p>
        </text:list-item>
      </text:list>
      <text:p text:style-name="Text_20_body"><text:span text:style-name="Source_20_Text">--- </text:span></text:p>
      <text:h text:style-name="Heading_20_4" text:outline-level="4">profissional_servico<text:span text:style-name="Source_20_Text"> - Serviços por Profissional</text:span></text:h>
      <text:p text:style-name="P3"><text:span text:style-name="Source_20_Text"><text:span text:style-name="Strong_20_Emphasis">Descrição</text:span></text:span><text:span text:style-name="Source_20_Text">: Define quais serviços cada profissional pode realizar, com possibilidade de personalização. </text:span>`<text:span text:style-name="Source_20_Text">sql CREATE TABLE profissional_servico ( servicos_id uuid NOT NULL, profissional_id uuid NOT NULL, valor_personalizado numeric(10,2), duracao_personalizada interval, observacoes varchar(255) NOT NULL, PRIMARY KEY (servicos_id, profissional_id) ); </text:span>`<text:span text:style-name="Source_20_Text"> </text:span><text:span text:style-name="Source_20_Text"><text:span text:style-name="Strong_20_Emphasis">Como Funciona</text:span></text:span><text:span text:style-name="Source_20_Text">: </text:span></text:p>
      <text:list xml:id="list556412930" text:style-name="L26">
        <text:list-item>
          <text:p text:style-name="P38"><text:span text:style-name="Source_20_Text">Um serviço tem valor e duração padrão na tabela </text:span>servicos<text:span text:style-name="Source_20_Text"> </text:span></text:p>
        </text:list-item>
      </text:list>
      <text:list xml:id="list3893064371" text:style-name="L27">
        <text:list-item>
          <text:p text:style-name="P39"><text:span text:style-name="Source_20_Text">Se o profissional cobrar diferente, usa </text:span>valor_personalizado<text:span text:style-name="Source_20_Text"> </text:span></text:p>
        </text:list-item>
      </text:list>
      <text:list xml:id="list1062793851" text:style-name="L28">
        <text:list-item>
          <text:p text:style-name="P40"><text:span text:style-name="Source_20_Text">Se o profissional demorar mais/menos, usa </text:span>duracao_personalizada<text:span text:style-name="Source_20_Text"> </text:span></text:p>
        </text:list-item>
      </text:list>
      <text:list xml:id="list3454985162" text:style-name="L29">
        <text:list-item>
          <text:p text:style-name="P41"><text:span text:style-name="Source_20_Text">Se não houver personalização, usa os valores padrão </text:span><text:span text:style-name="Source_20_Text"><text:span text:style-name="Strong_20_Emphasis">Exemplo</text:span></text:span><text:span text:style-name="Source_20_Text">: </text:span>`<text:span text:style-name="Source_20_Text"> Serviço: Limpeza de pele (padrão R$ 150,00 - 1h30) </text:span></text:p>
        </text:list-item>
      </text:list>
      <text:list xml:id="list3298944842" text:style-name="L30">
        <text:list-item>
          <text:p text:style-name="P43"><text:span text:style-name="Source_20_Text">Profissional A: R$ 150,00 - 1h30 (usa padrão) </text:span></text:p>
        </text:list-item>
        <text:list-item>
          <text:p text:style-name="P42"><text:span text:style-name="Source_20_Text">Profissional B: R$ 180,00 - 2h (personalizado) </text:span></text:p>
        </text:list-item>
      </text:list>
      <text:p text:style-name="Text_20_body">`<text:span text:style-name="Source_20_Text"> --- </text:span></text:p>
      <text:h text:style-name="Heading_20_3" text:outline-level="3"><text:span text:style-name="Source_20_Text">⏰ Grupo: Horários</text:span></text:h>
      <text:h text:style-name="Heading_20_4" text:outline-level="4">horario_f<text:span text:style-name="Source_20_Text"> - Turnos de Trabalho</text:span></text:h>
      <text:p text:style-name="Text_20_body"><text:span text:style-name="Source_20_Text"><text:span text:style-name="Strong_20_Emphasis">Descrição</text:span></text:span><text:span text:style-name="Source_20_Text">: Define turnos de trabalho (manhã, tarde, noite, etc.). </text:span>`<text:span text:style-name="Source_20_Text">sql CREATE TABLE horario_f ( horario_f_id uuid PRIMARY KEY DEFAULT gen_random_uuid(), horario_f_turno varchar(100) NOT NULL ); </text:span>`<text:span text:style-name="Source_20_Text"> </text:span><text:span text:style-name="Source_20_Text"><text:span text:style-name="Strong_20_Emphasis">Exemplos</text:span></text:span><text:span text:style-name="Source_20_Text">: </text:span></text:p>
      <text:list xml:id="list589523888" text:style-name="L31">
        <text:list-item>
          <text:p text:style-name="P45"><text:span text:style-name="Source_20_Text">Manhã (8h às 12h) </text:span></text:p>
        </text:list-item>
        <text:list-item>
          <text:p text:style-name="P45"><text:span text:style-name="Source_20_Text">Tarde (13h às 18h) </text:span></text:p>
        </text:list-item>
        <text:list-item>
          <text:p text:style-name="P44"><text:span text:style-name="Source_20_Text">Noite (18h às 22h) </text:span></text:p>
        </text:list-item>
      </text:list>
      <text:p text:style-name="Text_20_body"><text:span text:style-name="Source_20_Text">--- </text:span></text:p>
      <text:h text:style-name="Heading_20_4" text:outline-level="4">horario_det<text:span text:style-name="Source_20_Text"> - Detalhamento dos Horários</text:span></text:h>
      <text:p text:style-name="Text_20_body"><text:span text:style-name="Source_20_Text"><text:span text:style-name="Strong_20_Emphasis">Descrição</text:span></text:span><text:span text:style-name="Source_20_Text">: Define os horários específicos dentro de cada turno. </text:span>`<text:span text:style-name="Source_20_Text">sql CREATE TABLE horario_det ( horario_det_id uuid PRIMARY KEY DEFAULT gen_random_uuid(), horario_f_id uuid NOT NULL, horario_def smallint NOT NULL, horario_def_nome varchar(20) NOT NULL, horario_det_inicio time(0) NOT NULL, horario_det_fim time(0) NOT NULL, UNIQUE (horario_f_id, horario_def, horario_det_inicio, horario_det_fim) ); </text:span>`<text:span text:style-name="Source_20_Text"> </text:span><text:span text:style-name="Source_20_Text"><text:span text:style-name="Strong_20_Emphasis">Exemplo de Estrutura</text:span></text:span><text:span text:style-name="Source_20_Text">: </text:span>`<text:span text:style-name="Source_20_Text"> Turno: Manhã - Segunda-feira: 08:00 - 12:00 - Terça-feira: 08:00 - 12:00 - Quarta-feira: 08:00 - 12:00 </text:span>`<text:span text:style-name="Source_20_Text"> --- </text:span></text:p>
      <text:h text:style-name="Heading_20_4" text:outline-level="4">profissional_horario<text:span text:style-name="Source_20_Text"> - Horários do Profissional</text:span></text:h>
      <text:p text:style-name="Text_20_body"><text:span text:style-name="Source_20_Text"><text:span text:style-name="Strong_20_Emphasis">Descrição</text:span></text:span><text:span text:style-name="Source_20_Text">: Relaciona profissionais com seus turnos de trabalho. </text:span>`<text:span text:style-name="Source_20_Text">sql CREATE TABLE profissional_horario ( profissional_id uuid NOT NULL, horario_f_id uuid NOT NULL, PRIMARY KEY (profissional_id, horario_f_id) ); </text:span>`<text:span text:style-name="Source_20_Text"> </text:span><text:span text:style-name="Source_20_Text"><text:span text:style-name="Strong_20_Emphasis">Como Funciona</text:span></text:span><text:span text:style-name="Source_20_Text">: </text:span></text:p>
      <text:list xml:id="list702073142" text:style-name="L32">
        <text:list-item>
          <text:p text:style-name="P47"><text:span text:style-name="Source_20_Text">Um profissional pode ter múltiplos turnos </text:span></text:p>
        </text:list-item>
        <text:list-item>
          <text:p text:style-name="P46"><text:span text:style-name="Source_20_Text">Exemplo: Profissional trabalha manhã e tarde </text:span></text:p>
        </text:list-item>
      </text:list>
      <text:p text:style-name="Text_20_body"><text:span text:style-name="Source_20_Text">--- </text:span></text:p>
      <text:h text:style-name="Heading_20_3" text:outline-level="3"><text:span text:style-name="Source_20_Text">👤 Grupo: Clientes</text:span></text:h>
      <text:h text:style-name="Heading_20_4" text:outline-level="4">clientes<text:span text:style-name="Source_20_Text"> - Cadastro de Clientes</text:span></text:h>
      <text:p text:style-name="Text_20_body"><text:span text:style-name="Source_20_Text"><text:span text:style-name="Strong_20_Emphasis">Descrição</text:span></text:span><text:span text:style-name="Source_20_Text">: Clientes que agendam serviços nas empresas. </text:span>`<text:span text:style-name="Source_20_Text">sql CREATE TABLE clientes ( clientes_id uuid PRIMARY KEY DEFAULT gen_random_uuid(), clientes_nome varchar(50) NOT NULL, clientes_telefone varchar(50) NOT NULL, clientes_dt_criacao timestamptz DEFAULT now(), empresa_id uuid ); </text:span>`<text:span text:style-name="Source_20_Text"> </text:span><text:span text:style-name="Source_20_Text"><text:span text:style-name="Strong_20_Emphasis">Características</text:span></text:span><text:span text:style-name="Source_20_Text">: </text:span></text:p>
      <text:list xml:id="list131218879" text:style-name="L33">
        <text:list-item>
          <text:p text:style-name="P49"><text:span text:style-name="Source_20_Text">Isolamento por empresa </text:span></text:p>
        </text:list-item>
        <text:list-item>
          <text:p text:style-name="P49"><text:span text:style-name="Source_20_Text">Telefone pode ser identificador do WhatsApp (ex: </text:span>553799846648@s.whatsapp.net<text:span text:style-name="Source_20_Text">) </text:span></text:p>
        </text:list-item>
        <text:list-item>
          <text:p text:style-name="P48"><text:span text:style-name="Source_20_Text">Cadastro automático no primeiro agendamento </text:span></text:p>
        </text:list-item>
      </text:list>
      <text:p text:style-name="Text_20_body"><text:span text:style-name="Source_20_Text"><text:span text:style-name="Strong_20_Emphasis">Exemplo de Dados Reais</text:span></text:span><text:span text:style-name="Source_20_Text">: </text:span>`<text:span text:style-name="Source_20_Text"> Nome: Alex Lima Telefone: 553791426388@s.whatsapp.net Empresa: Deisa Evelyn Estética </text:span>`<text:span text:style-name="Source_20_Text"> --- </text:span></text:p>
      <text:h text:style-name="Heading_20_3" text:outline-level="3"><text:span text:style-name="Source_20_Text">📅 Grupo: Agendamentos</text:span></text:h>
      <text:h text:style-name="Heading_20_4" text:outline-level="4">agendamento<text:span text:style-name="Source_20_Text"> - Agendamentos</text:span></text:h>
      <text:p text:style-name="P3"><text:span text:style-name="Source_20_Text"><text:span text:style-name="Strong_20_Emphasis">Descrição</text:span></text:span><text:span text:style-name="Source_20_Text">: Tabela principal que armazena todos os agendamentos do sistema. </text:span>`<text:span text:style-name="Source_20_Text">sql CREATE TABLE agendamento ( agend_id uuid PRIMARY KEY DEFAULT gen_random_uuid(), status_agend_id uuid NOT NULL, agend_id_calendar text NOT NULL, profissional_id uuid NOT NULL, clientes_id uuid NOT NULL, empresa_id uuid NOT NULL, agend_data date NOT NULL, agend_origem varchar(20) NOT NULL, agend_created_at timestamptz DEFAULT now(), agend_inicio timestamptz NOT NULL, agend_fim timestamptz NOT NULL, agend_valor numeric(8,2) NOT NULL, periodo tstzrange GENERATED ALWAYS AS (tstzrange(agend_inicio, agend_fim, '[)')) STORED, agend_protocolo varchar(50) UNIQUE ); </text:span>`<text:span text:style-name="Source_20_Text"> </text:span><text:span text:style-name="Source_20_Text"><text:span text:style-name="Strong_20_Emphasis">Campos Importantes</text:span></text:span><text:span text:style-name="Source_20_Text">: 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Table_20_Contents">Campo</text:p>
          </table:table-cell>
          <table:table-cell table:style-name="Tabela4.B1" office:value-type="string">
            <text:p text:style-name="Table_20_Contents">Descrição</text:p>
          </table:table-cell>
          <table:table-cell table:style-name="Tabela4.B1" office:value-type="string">
            <text:p text:style-name="Table_20_Contents">Exemplo</text:p>
          </table:table-cell>
        </table:table-row>
        <table:table-row>
          <table:table-cell table:style-name="Tabela4.A2" office:value-type="string">
            <text:p text:style-name="Table_20_Contents">-------</text:p>
          </table:table-cell>
          <table:table-cell table:style-name="Tabela4.B2" office:value-type="string">
            <text:p text:style-name="Table_20_Contents">-----------</text:p>
          </table:table-cell>
          <table:table-cell table:style-name="Tabela4.B2" office:value-type="string">
            <text:p text:style-name="Table_20_Contents">---------</text:p>
          </table:table-cell>
        </table:table-row>
        <table:table-row>
          <table:table-cell table:style-name="Tabela4.A2" office:value-type="string">
            <text:p text:style-name="Table_20_Contents">agend_id</text:p>
          </table:table-cell>
          <table:table-cell table:style-name="Tabela4.B2" office:value-type="string">
            <text:p text:style-name="Table_20_Contents">ID único do agendamento</text:p>
          </table:table-cell>
          <table:table-cell table:style-name="Tabela4.B2" office:value-type="string">
            <text:p text:style-name="Table_20_Contents">uuid</text:p>
          </table:table-cell>
        </table:table-row>
        <table:table-row>
          <table:table-cell table:style-name="Tabela4.A2" office:value-type="string">
            <text:p text:style-name="Table_20_Contents">agend_id_calendar</text:p>
          </table:table-cell>
          <table:table-cell table:style-name="Tabela4.B2" office:value-type="string">
            <text:p text:style-name="Table_20_Contents">ID do evento no Google Calendar</text:p>
          </table:table-cell>
          <table:table-cell table:style-name="Tabela4.B2" office:value-type="string">
            <text:p text:style-name="Table_20_Contents">kv4ar3u8dd64o6kqaq42n47jhs</text:p>
          </table:table-cell>
        </table:table-row>
        <table:table-row>
          <table:table-cell table:style-name="Tabela4.A2" office:value-type="string">
            <text:p text:style-name="Table_20_Contents">agend_origem</text:p>
          </table:table-cell>
          <table:table-cell table:style-name="Tabela4.B2" office:value-type="string">
            <text:p text:style-name="Table_20_Contents">Origem do agendamento</text:p>
          </table:table-cell>
          <table:table-cell table:style-name="Tabela4.B2" office:value-type="string">
            <text:p text:style-name="Table_20_Contents">whatsapp, web, app</text:p>
          </table:table-cell>
        </table:table-row>
        <table:table-row>
          <table:table-cell table:style-name="Tabela4.A2" office:value-type="string">
            <text:p text:style-name="Table_20_Contents">agend_data</text:p>
          </table:table-cell>
          <table:table-cell table:style-name="Tabela4.B2" office:value-type="string">
            <text:p text:style-name="Table_20_Contents">Data do agendamento</text:p>
          </table:table-cell>
          <table:table-cell table:style-name="Tabela4.B2" office:value-type="string">
            <text:p text:style-name="Table_20_Contents">2025-10-11</text:p>
          </table:table-cell>
        </table:table-row>
        <table:table-row>
          <table:table-cell table:style-name="Tabela4.A2" office:value-type="string">
            <text:p text:style-name="Table_20_Contents">agend_inicio</text:p>
          </table:table-cell>
          <table:table-cell table:style-name="Tabela4.B2" office:value-type="string">
            <text:p text:style-name="Table_20_Contents">Data/hora de início</text:p>
          </table:table-cell>
          <table:table-cell table:style-name="Tabela4.B2" office:value-type="string">
            <text:p text:style-name="Table_20_Contents">2025-10-11 16:00:00+00</text:p>
          </table:table-cell>
        </table:table-row>
        <table:table-row>
          <table:table-cell table:style-name="Tabela4.A2" office:value-type="string">
            <text:p text:style-name="Table_20_Contents">agend_fim</text:p>
          </table:table-cell>
          <table:table-cell table:style-name="Tabela4.B2" office:value-type="string">
            <text:p text:style-name="Table_20_Contents">Data/hora de término</text:p>
          </table:table-cell>
          <table:table-cell table:style-name="Tabela4.B2" office:value-type="string">
            <text:p text:style-name="Table_20_Contents">2025-10-11 16:40:00+00</text:p>
          </table:table-cell>
        </table:table-row>
        <table:table-row>
          <table:table-cell table:style-name="Tabela4.A2" office:value-type="string">
            <text:p text:style-name="Table_20_Contents">agend_valor</text:p>
          </table:table-cell>
          <table:table-cell table:style-name="Tabela4.B2" office:value-type="string">
            <text:p text:style-name="Table_20_Contents">Valor total do agendamento</text:p>
          </table:table-cell>
          <table:table-cell table:style-name="Tabela4.B2" office:value-type="string">
            <text:p text:style-name="Table_20_Contents">R$ 30,00</text:p>
          </table:table-cell>
        </table:table-row>
        <table:table-row>
          <table:table-cell table:style-name="Tabela4.A2" office:value-type="string">
            <text:p text:style-name="Table_20_Contents">periodo</text:p>
          </table:table-cell>
          <table:table-cell table:style-name="Tabela4.B2" office:value-type="string">
            <text:p text:style-name="Table_20_Contents"><text:span text:style-name="Strong_20_Emphasis">Campo calculado</text:span> para consultas</text:p>
          </table:table-cell>
          <table:table-cell table:style-name="Tabela4.B2" office:value-type="string">
            <text:p text:style-name="Table_20_Contents">[2025-10-11 16:00, 2025-10-11 16:40)</text:p>
          </table:table-cell>
        </table:table-row>
        <table:table-row>
          <table:table-cell table:style-name="Tabela4.A11" office:value-type="string">
            <text:p text:style-name="Table_20_Contents">agend_protocolo</text:p>
          </table:table-cell>
          <table:table-cell table:style-name="Tabela4.B11" office:value-type="string">
            <text:p text:style-name="Table_20_Contents">Protocolo único para o cliente</text:p>
          </table:table-cell>
          <table:table-cell table:style-name="Tabela4.B11" office:value-type="string">
            <text:p text:style-name="Table_20_Contents">THD-8360</text:p>
          </table:table-cell>
        </table:table-row>
      </table:table>
      <text:p text:style-name="Text_20_body"><text:span text:style-name="Source_20_Text"><text:span text:style-name="Strong_20_Emphasis">Campo Especial: </text:span></text:span><text:span text:style-name="Strong_20_Emphasis">periodo</text:span><text:span text:style-name="Source_20_Text"> Este é um campo </text:span><text:span text:style-name="Source_20_Text"><text:span text:style-name="Strong_20_Emphasis">calculado automaticamente</text:span></text:span><text:span text:style-name="Source_20_Text"> usando o tipo </text:span>tstzrange<text:span text:style-name="Source_20_Text"> do PostgreSQL: </text:span></text:p>
      <text:list xml:id="list378361927" text:style-name="L34">
        <text:list-item>
          <text:p text:style-name="P51"><text:span text:style-name="Source_20_Text">Facilita consultas de conflito de horários </text:span></text:p>
        </text:list-item>
        <text:list-item>
          <text:p text:style-name="P51"><text:span text:style-name="Source_20_Text">Permite verificar se um horário está ocupado </text:span></text:p>
        </text:list-item>
        <text:list-item>
          <text:p text:style-name="P50"><text:span text:style-name="Source_20_Text">Usa notação matemática: </text:span>[<text:span text:style-name="Source_20_Text"> inclui, </text:span>)<text:span text:style-name="Source_20_Text"> exclui </text:span></text:p>
        </text:list-item>
      </text:list>
      <text:p text:style-name="Text_20_body"><text:span text:style-name="Source_20_Text"><text:span text:style-name="Strong_20_Emphasis">Exemplo de Consulta de Conflito</text:span></text:span><text:span text:style-name="Source_20_Text">: </text:span>`<text:span text:style-name="Source_20_Text">sql -- Verifica se há conflito de horário SELECT * FROM agendamento WHERE profissional_id = 'xxx' AND periodo &amp;&amp; tstzrange('2025-10-11 16:00', '2025-10-11 17:00'); </text:span>`<text:span text:style-name="Source_20_Text"> --- </text:span></text:p>
      <text:h text:style-name="Heading_20_4" text:outline-level="4">agendamento_servico<text:span text:style-name="Source_20_Text"> - Serviços do Agendamento</text:span></text:h>
      <text:p text:style-name="P3"><text:span text:style-name="Source_20_Text"><text:span text:style-name="Strong_20_Emphasis">Descrição</text:span></text:span><text:span text:style-name="Source_20_Text">: Relaciona agendamentos com os serviços solicitados. Um agendamento pode ter múltiplos serviços. </text:span>`<text:span text:style-name="Source_20_Text">sql CREATE TABLE agendamento_servico ( agend_id uuid NOT NULL, servicos_id uuid NOT NULL, ordem smallint DEFAULT 1, valor_aplicado numeric(10,2) NOT NULL, duracao_aplicada interval NOT NULL, observacao text, profissional_id uuid NOT NULL, PRIMARY KEY (agend_id, servicos_id, ordem) ); </text:span>`<text:span text:style-name="Source_20_Text"> </text:span><text:span text:style-name="Source_20_Text"><text:span text:style-name="Strong_20_Emphasis">Como Funciona</text:span></text:span><text:span text:style-name="Source_20_Text">: </text:span></text:p>
      <text:list xml:id="list2334009267" text:style-name="L35">
        <text:list-item>
          <text:p text:style-name="P52"><text:span text:style-name="Source_20_Text">Um agendamento pode ter vários serviços </text:span></text:p>
        </text:list-item>
      </text:list>
      <text:list xml:id="list3091123314" text:style-name="L36">
        <text:list-item>
          <text:p text:style-name="P53"><text:span text:style-name="Source_20_Text">Cada serviço tem uma ordem de execução </text:span></text:p>
        </text:list-item>
      </text:list>
      <text:list xml:id="list4262078169" text:style-name="L37">
        <text:list-item>
          <text:p text:style-name="P54"><text:span text:style-name="Source_20_Text">Valores e durações são "congelados" no momento do agendamento </text:span></text:p>
        </text:list-item>
      </text:list>
      <text:list xml:id="list72508576" text:style-name="L38">
        <text:list-item>
          <text:p text:style-name="P55"><text:span text:style-name="Source_20_Text">Permite observações específicas por serviço </text:span><text:span text:style-name="Source_20_Text"><text:span text:style-name="Strong_20_Emphasis">Exemplo</text:span></text:span><text:span text:style-name="Source_20_Text">: </text:span>`<text:span text:style-name="Source_20_Text"> Agendamento #123: 1. Limpeza de pele - R$ 150,00 - 1h30 2. Design na pinça - R$ 40,00 - 20min Total: R$ 190,00 - 1h50 </text:span>`<text:span text:style-name="Source_20_Text"> --- </text:span></text:p>
        </text:list-item>
      </text:list>
      <text:h text:style-name="Heading_20_4" text:outline-level="4">status_agend<text:span text:style-name="Source_20_Text"> - Status dos Agendamentos</text:span></text:h>
      <text:p text:style-name="Text_20_body"><text:span text:style-name="Source_20_Text"><text:span text:style-name="Strong_20_Emphasis">Descrição</text:span></text:span><text:span text:style-name="Source_20_Text">: Define os possíveis status de um agendamento. </text:span>`<text:span text:style-name="Source_20_Text">sql CREATE TABLE status_agend ( status_agend_id uuid PRIMARY KEY DEFAULT gen_random_uuid(), status_agend_nome varchar(30) NOT NULL ); </text:span>`<text:span text:style-name="Source_20_Text"> </text:span><text:span text:style-name="Source_20_Text"><text:span text:style-name="Strong_20_Emphasis">Status Identificados no Sistema</text:span></text:span><text:span text:style-name="Source_20_Text">: </text:span></text:p>
      <text:list xml:id="list3968398194" text:style-name="L39">
        <text:list-item>
          <text:p text:style-name="P57"><text:span text:style-name="Source_20_Text">✅ </text:span><text:span text:style-name="Source_20_Text"><text:span text:style-name="Strong_20_Emphasis">Agendado</text:span></text:span><text:span text:style-name="Source_20_Text">: Agendamento criado </text:span></text:p>
        </text:list-item>
        <text:list-item>
          <text:p text:style-name="P57"><text:span text:style-name="Source_20_Text">✅ </text:span><text:span text:style-name="Source_20_Text"><text:span text:style-name="Strong_20_Emphasis">Confirmado</text:span></text:span><text:span text:style-name="Source_20_Text">: Cliente confirmou presença </text:span></text:p>
        </text:list-item>
        <text:list-item>
          <text:p text:style-name="P57"><text:span text:style-name="Source_20_Text">✅ </text:span><text:span text:style-name="Source_20_Text"><text:span text:style-name="Strong_20_Emphasis">Avisado</text:span></text:span><text:span text:style-name="Source_20_Text">: Cliente foi avisado/lembrado </text:span></text:p>
        </text:list-item>
        <text:list-item>
          <text:p text:style-name="P57"><text:span text:style-name="Source_20_Text">✅ </text:span><text:span text:style-name="Source_20_Text"><text:span text:style-name="Strong_20_Emphasis">Concluído</text:span></text:span><text:span text:style-name="Source_20_Text">: Atendimento realizado </text:span></text:p>
        </text:list-item>
        <text:list-item>
          <text:p text:style-name="P56"><text:span text:style-name="Source_20_Text">❌ </text:span><text:span text:style-name="Source_20_Text"><text:span text:style-name="Strong_20_Emphasis">Cancelado</text:span></text:span><text:span text:style-name="Source_20_Text">: Agendamento cancelado </text:span></text:p>
        </text:list-item>
      </text:list>
      <text:p text:style-name="Text_20_body"><text:span text:style-name="Source_20_Text">--- </text:span></text:p>
      <text:h text:style-name="Heading_20_3" text:outline-level="3"><text:span text:style-name="Source_20_Text">🔗 Grupo: Integração</text:span></text:h>
      <text:h text:style-name="Heading_20_4" text:outline-level="4">gcalendar<text:span text:style-name="Source_20_Text"> - Integração Google Calendar</text:span></text:h>
      <text:p text:style-name="Text_20_body"><text:span text:style-name="Source_20_Text"><text:span text:style-name="Strong_20_Emphasis">Descrição</text:span></text:span><text:span text:style-name="Source_20_Text">: Armazena informações de integração com Google Calendar. </text:span>`<text:span text:style-name="Source_20_Text">sql CREATE TABLE gcalendar ( profissional_id uuid NOT NULL, gcalendar_id text PRIMARY KEY, gcalendar_email citext, UNIQUE (gcalendar_id) ); </text:span>`<text:span text:style-name="Source_20_Text"> </text:span><text:span text:style-name="Source_20_Text"><text:span text:style-name="Strong_20_Emphasis">Como Funciona</text:span></text:span><text:span text:style-name="Source_20_Text">: </text:span></text:p>
      <text:list xml:id="list3636738686" text:style-name="L40">
        <text:list-item>
          <text:p text:style-name="P59"><text:span text:style-name="Source_20_Text">Cada profissional pode ter um calendário do Google vinculado </text:span></text:p>
        </text:list-item>
        <text:list-item>
          <text:p text:style-name="P59">gcalendar_id<text:span text:style-name="Source_20_Text">: ID do calendário no Google </text:span></text:p>
        </text:list-item>
        <text:list-item>
          <text:p text:style-name="P59">gcalendar_email<text:span text:style-name="Source_20_Text">: Email associado ao calendário </text:span></text:p>
        </text:list-item>
        <text:list-item>
          <text:p text:style-name="P58"><text:span text:style-name="Source_20_Text">Tipo </text:span>citext<text:span text:style-name="Source_20_Text">: Case-insensitive text (email não diferencia maiúsculas) </text:span></text:p>
        </text:list-item>
      </text:list>
      <text:p text:style-name="Text_20_body"><text:span text:style-name="Source_20_Text">--- </text:span></text:p>
      <text:h text:style-name="Heading_20_4" text:outline-level="4">contexto_sessao<text:span text:style-name="Source_20_Text"> - Contexto de Conversas</text:span></text:h>
      <text:p text:style-name="P3"><text:span text:style-name="Source_20_Text"><text:span text:style-name="Strong_20_Emphasis">Descrição</text:span></text:span><text:span text:style-name="Source_20_Text">: Mantém o contexto das conversas do WhatsApp para processamento de IA. </text:span>`<text:span text:style-name="Source_20_Text">sql CREATE TABLE contexto_sessao ( session_id text PRIMARY KEY, empresa_id uuid NOT NULL, ultimo_intent text, ultimo_action text, ultimo_service_id uuid, ultimo_service_name text, ultimo_profissional text, ultimo_date date, ultimo_start text, status text, updated_at timestamp DEFAULT now() ); </text:span>`<text:span text:style-name="Source_20_Text"> </text:span><text:span text:style-name="Source_20_Text"><text:span text:style-name="Strong_20_Emphasis">Como Funciona</text:span></text:span><text:span text:style-name="Source_20_Text">: </text:span></text:p>
      <text:list xml:id="list526224276" text:style-name="L41">
        <text:list-item>
          <text:p text:style-name="P60"><text:span text:style-name="Source_20_Text">Cada sessão do WhatsApp tem um ID único </text:span></text:p>
        </text:list-item>
      </text:list>
      <text:list xml:id="list3816899357" text:style-name="L42">
        <text:list-item>
          <text:p text:style-name="P61"><text:span text:style-name="Source_20_Text">Sistema armazena o último contexto da conversa </text:span></text:p>
        </text:list-item>
      </text:list>
      <text:list xml:id="list3507362073" text:style-name="L43">
        <text:list-item>
          <text:p text:style-name="P62"><text:span text:style-name="Source_20_Text">IA usa esse contexto para entender a continuação da conversa </text:span></text:p>
        </text:list-item>
      </text:list>
      <text:list xml:id="list723485909" text:style-name="L44">
        <text:list-item>
          <text:p text:style-name="P63"><text:span text:style-name="Source_20_Text">Exemplo: Se cliente disse "quero agendar limpeza de pele", próxima mensagem já sabe o serviço </text:span><text:span text:style-name="Source_20_Text"><text:span text:style-name="Strong_20_Emphasis">Campos de Contexto</text:span></text:span><text:span text:style-name="Source_20_Text">: </text:span></text:p>
        </text:list-item>
      </text:list>
      <text:list xml:id="list4050452684" text:style-name="L45">
        <text:list-item>
          <text:p text:style-name="P65">ultimo_intent<text:span text:style-name="Source_20_Text">: Última intenção (schedule, cancel, reschedule) </text:span></text:p>
        </text:list-item>
        <text:list-item>
          <text:p text:style-name="P65">ultimo_action<text:span text:style-name="Source_20_Text">: Última ação (ask_missing_info, create_event) </text:span></text:p>
        </text:list-item>
        <text:list-item>
          <text:p text:style-name="P65">ultimo_service_id<text:span text:style-name="Source_20_Text">: ID do último serviço mencionado </text:span></text:p>
        </text:list-item>
        <text:list-item>
          <text:p text:style-name="P65">ultimo_profissional<text:span text:style-name="Source_20_Text">: Último profissional mencionado </text:span></text:p>
        </text:list-item>
        <text:list-item>
          <text:p text:style-name="P64">ultimo_date<text:span text:style-name="Source_20_Text">: Última data mencionada </text:span></text:p>
        </text:list-item>
      </text:list>
      <text:p text:style-name="Text_20_body"><text:span text:style-name="Source_20_Text">--- </text:span></text:p>
      <text:h text:style-name="Heading_20_4" text:outline-level="4">ai_prompt_templates<text:span text:style-name="Source_20_Text"> - Templates de IA</text:span></text:h>
      <text:p text:style-name="Text_20_body"><text:span text:style-name="Source_20_Text"><text:span text:style-name="Strong_20_Emphasis">Descrição</text:span></text:span><text:span text:style-name="Source_20_Text">: Armazena templates de prompts para o sistema de IA processar linguagem natural. </text:span>`<text:span text:style-name="Source_20_Text">sql CREATE TABLE ai_prompt_templates ( key text NOT NULL, version text NOT NULL, template_text text NOT NULL, PRIMARY KEY (key, version) ); </text:span>`<text:span text:style-name="Source_20_Text"> </text:span><text:span text:style-name="Source_20_Text"><text:span text:style-name="Strong_20_Emphasis">Templates Identificados</text:span></text:span><text:span text:style-name="Source_20_Text">: </text:span></text:p>
      <text:list xml:id="list4039666029" text:style-name="L46">
        <text:list-item>
          <text:p text:style-name="P67">prompt_agendamento<text:span text:style-name="Source_20_Text"> (v2025-08-26-01, v2025-08-26-02) </text:span></text:p>
        </text:list-item>
        <text:list-item>
          <text:p text:style-name="P66">prompt_julia_fane<text:span text:style-name="Source_20_Text"> (v2025-10-08-01, v2025-10-08-02) </text:span></text:p>
        </text:list-item>
      </text:list>
      <text:p text:style-name="Text_20_body"><text:span text:style-name="Source_20_Text"><text:span text:style-name="Strong_20_Emphasis">Observações</text:span></text:span><text:span text:style-name="Source_20_Text">: </text:span></text:p>
      <text:list xml:id="list4219494386" text:style-name="L47">
        <text:list-item>
          <text:p text:style-name="P69"><text:span text:style-name="Source_20_Text">Permite versionamento de prompts </text:span></text:p>
        </text:list-item>
        <text:list-item>
          <text:p text:style-name="P69"><text:span text:style-name="Source_20_Text">Cada empresa pode usar um prompt diferente </text:span></text:p>
        </text:list-item>
        <text:list-item>
          <text:p text:style-name="P68"><text:span text:style-name="Source_20_Text">Templates são longos (contêm instruções completas para a IA) </text:span></text:p>
        </text:list-item>
      </text:list>
      <text:p text:style-name="Text_20_body"><text:span text:style-name="Source_20_Text">--- </text:span></text:p>
      <text:h text:style-name="Heading_20_3" text:outline-level="3"><text:span text:style-name="Source_20_Text">🔐 Grupo: Autenticação e Controle</text:span></text:h>
      <text:h text:style-name="Heading_20_4" text:outline-level="4">login<text:span text:style-name="Source_20_Text"> - Usuários do Sistema</text:span></text:h>
      <text:p text:style-name="Text_20_body"><text:span text:style-name="Source_20_Text"><text:span text:style-name="Strong_20_Emphasis">Descrição</text:span></text:span><text:span text:style-name="Source_20_Text">: Sistema de autenticação para acesso ao sistema. </text:span>`<text:span text:style-name="Source_20_Text">sql CREATE TABLE login ( login_id uuid PRIMARY KEY, nivel_acesso_id uuid NOT NULL, empresa_id uuid NOT NULL, login citext NOT NULL, email citext NOT NULL, senha text NOT NULL, created timestamptz DEFAULT now(), nome varchar(120) NOT NULL ); </text:span>`<text:span text:style-name="Source_20_Text"> </text:span><text:span text:style-name="Source_20_Text"><text:span text:style-name="Strong_20_Emphasis">Características</text:span></text:span><text:span text:style-name="Source_20_Text">: </text:span></text:p>
      <text:list xml:id="list339095521" text:style-name="L48">
        <text:list-item>
          <text:p text:style-name="P71"><text:span text:style-name="Source_20_Text">Isolamento por empresa </text:span></text:p>
        </text:list-item>
        <text:list-item>
          <text:p text:style-name="P71"><text:span text:style-name="Source_20_Text">Login e email case-insensitive (citext) </text:span></text:p>
        </text:list-item>
        <text:list-item>
          <text:p text:style-name="P71"><text:span text:style-name="Source_20_Text">Senha deve ser armazenada criptografada (hash) </text:span></text:p>
        </text:list-item>
        <text:list-item>
          <text:p text:style-name="P70"><text:span text:style-name="Source_20_Text">Níveis de acesso configuráveis </text:span></text:p>
        </text:list-item>
      </text:list>
      <text:p text:style-name="Text_20_body"><text:span text:style-name="Source_20_Text">--- </text:span></text:p>
      <text:h text:style-name="Heading_20_4" text:outline-level="4">nivel_acesso<text:span text:style-name="Source_20_Text"> - Níveis de Permissão</text:span></text:h>
      <text:p text:style-name="Text_20_body"><text:span text:style-name="Source_20_Text"><text:span text:style-name="Strong_20_Emphasis">Descrição</text:span></text:span><text:span text:style-name="Source_20_Text">: Define níveis de acesso ao sistema. </text:span>`<text:span text:style-name="Source_20_Text">sql CREATE TABLE nivel_acesso ( nivel_acesso_id uuid PRIMARY KEY, nivel_acesso_ varchar(20) NOT NULL ); </text:span>`<text:span text:style-name="Source_20_Text"> </text:span><text:span text:style-name="Source_20_Text"><text:span text:style-name="Strong_20_Emphasis">Possíveis Níveis</text:span></text:span><text:span text:style-name="Source_20_Text">: </text:span></text:p>
      <text:list xml:id="list2403988801" text:style-name="L49">
        <text:list-item>
          <text:p text:style-name="P73"><text:span text:style-name="Source_20_Text">Administrador </text:span></text:p>
        </text:list-item>
        <text:list-item>
          <text:p text:style-name="P73"><text:span text:style-name="Source_20_Text">Gerente </text:span></text:p>
        </text:list-item>
        <text:list-item>
          <text:p text:style-name="P73"><text:span text:style-name="Source_20_Text">Profissional </text:span></text:p>
        </text:list-item>
        <text:list-item>
          <text:p text:style-name="P72"><text:span text:style-name="Source_20_Text">Recepcionista </text:span></text:p>
        </text:list-item>
      </text:list>
      <text:p text:style-name="Text_20_body"><text:span text:style-name="Source_20_Text">--- </text:span></text:p>
      <text:h text:style-name="Heading_20_4" text:outline-level="4">instancia<text:span text:style-name="Source_20_Text"> - Instâncias WhatsApp</text:span></text:h>
      <text:p text:style-name="Text_20_body"><text:span text:style-name="Source_20_Text"><text:span text:style-name="Strong_20_Emphasis">Descrição</text:span></text:span><text:span text:style-name="Source_20_Text">: Instâncias de WhatsApp para multi-tenancy. </text:span><text:span text:style-name="Source_20_Text"><text:span text:style-name="Strong_20_Emphasis">Esta é a chave para identificação da empresa no fluxo de mensagens</text:span></text:span><text:span text:style-name="Source_20_Text">. </text:span>`<text:span text:style-name="Source_20_Text">sql CREATE TABLE instancia ( instancia_id uuid PRIMARY KEY, empresa_id uuid NOT NULL, instancia_nome varchar(30) NOT NULL, instancia_observacao varchar(255) NOT NULL, instancia_dt_criacao timestamptz DEFAULT now(), instancia_dt_atualizacao timestamptz DEFAULT now() ); </text:span>`<text:span text:style-name="Source_20_Text"> </text:span><text:span text:style-name="Source_20_Text"><text:span text:style-name="Strong_20_Emphasis">Como Funciona</text:span></text:span><text:span text:style-name="Source_20_Text">: </text:span></text:p>
      <text:list xml:id="list3583454764" text:style-name="L50">
        <text:list-item>
          <text:p text:style-name="P75"><text:span text:style-name="Source_20_Text">Cada empresa pode ter uma ou mais instâncias de WhatsApp </text:span></text:p>
        </text:list-item>
        <text:list-item>
          <text:p text:style-name="P75"><text:span text:style-name="Source_20_Text">Permite múltiplos números de atendimento por empresa </text:span></text:p>
        </text:list-item>
        <text:list-item>
          <text:p text:style-name="P75"><text:span text:style-name="Source_20_Text"><text:span text:style-name="Strong_20_Emphasis">IMPORTANTE</text:span></text:span><text:span text:style-name="Source_20_Text">: Quando uma mensagem chega via WhatsApp, o sistema identifica a empresa através do </text:span>instancia_id<text:span text:style-name="Source_20_Text"> </text:span></text:p>
        </text:list-item>
        <text:list-item>
          <text:p text:style-name="P75"><text:span text:style-name="Source_20_Text">O </text:span>instancia_id<text:span text:style-name="Source_20_Text"> é vinculado ao número/bot de WhatsApp que recebeu a mensagem </text:span></text:p>
        </text:list-item>
        <text:list-item>
          <text:p text:style-name="P74"><text:span text:style-name="Source_20_Text">A partir do </text:span>instancia_id<text:span text:style-name="Source_20_Text">, o sistema busca o </text:span>empresa_id<text:span text:style-name="Source_20_Text"> correspondente </text:span></text:p>
        </text:list-item>
      </text:list>
      <text:p text:style-name="Text_20_body"><text:span text:style-name="Source_20_Text"><text:span text:style-name="Strong_20_Emphasis">Fluxo de Identificação</text:span></text:span><text:span text:style-name="Source_20_Text">: </text:span>`<text:span text:style-name="Source_20_Text"> Mensagem WhatsApp recebida no número +55 37 99949-6932 ↓ Sistema identifica instancia_id (ID da instância vinculada a este número) ↓ Consulta: SELECT empresa_id FROM instancia WHERE instancia_id = 'xxx' ↓ Retorna: empresa_id = '9ce11fb2-4440-4586-8ec5-fef4e22321e1' ↓ Empresa identificada: "Espaço Pamela Moraes" ↓ Todas as operações são feitas no contexto dessa empresa </text:span>`<text:span text:style-name="Source_20_Text"> </text:span><text:span text:style-name="Source_20_Text"><text:span text:style-name="Strong_20_Emphasis">Exemplo Real do Banco</text:span></text:span><text:span text:style-name="Source_20_Text">: </text:span>`<text:span text:style-name="Source_20_Text"> Instância: uuid-da-instancia-pamela Empresa: Espaço Pamela Moraes (9ce11fb2-4440-4586-8ec5-fef4e22321e1) Número WhatsApp: 37999496932 Agente: 3798704311 </text:span>`<text:span text:style-name="Source_20_Text"> --- </text:span></text:p>
      <text:h text:style-name="Heading_20_3" text:outline-level="3"><text:span text:style-name="Source_20_Text">💰 Grupo: Billing</text:span></text:h>
      <text:h text:style-name="Heading_20_4" text:outline-level="4">contrato<text:span text:style-name="Source_20_Text"> - Contratos de Cobrança</text:span></text:h>
      <text:p text:style-name="Text_20_body"><text:span text:style-name="Source_20_Text"><text:span text:style-name="Strong_20_Emphasis">Descrição</text:span></text:span><text:span text:style-name="Source_20_Text">: Contratos de cobrança com as empresas. </text:span>`<text:span text:style-name="Source_20_Text">sql CREATE TABLE contrato ( contrato_id uuid PRIMARY KEY DEFAULT gen_random_uuid(), empresa_id uuid NOT NULL, contrato_status varchar(20) NOT NULL, contrato_valor numeric(8,2) NOT NULL, contrato_nome text NOT NULL, created_at timestamptz NOT NULL, contrato_periodicidade varchar(20) DEFAULT 'Mensal', contrato_vigencia_inicio date, contrato_proxima_cobranca date ); </text:span>`<text:span text:style-name="Source_20_Text"> </text:span><text:span text:style-name="Source_20_Text"><text:span text:style-name="Strong_20_Emphasis">Exemplo de Contrato</text:span></text:span><text:span text:style-name="Source_20_Text">: </text:span>`<text:span text:style-name="Source_20_Text"> Plano: Básico Valor: R$ 59,90 Periodicidade: Mensal Status: Ativo Próxima cobrança: 2025-09-23 </text:span>`<text:span text:style-name="Source_20_Text"> --- </text:span></text:p>
      <text:h text:style-name="Heading_20_2" text:outline-level="2"><text:soft-page-break/><text:span text:style-name="Source_20_Text">🔄 Fluxo de Agendamento</text:span></text:h>
      <text:h text:style-name="Heading_20_3" text:outline-level="3"><text:span text:style-name="Source_20_Text">Passo a Passo de um Agendamento via WhatsApp</text:span></text:h>
      <text:p text:style-name="P3">`<text:span text:style-name="Source_20_Text"> </text:span></text:p>
      <text:list xml:id="list4148390591" text:style-name="L51">
        <text:list-item>
          <text:p text:style-name="P76"><text:span text:style-name="Source_20_Text">Cliente envia mensagem para o WhatsApp ↓ </text:span></text:p>
        </text:list-item>
      </text:list>
      <text:list xml:id="list1165737767" text:style-name="L52">
        <text:list-item>
          <text:p text:style-name="P77"><text:span text:style-name="Source_20_Text">Sistema identifica a instância que recebeu a mensagem (instancia_id) ↓ </text:span></text:p>
        </text:list-item>
      </text:list>
      <text:list xml:id="list3468731335" text:style-name="L53">
        <text:list-item>
          <text:p text:style-name="P78"><text:span text:style-name="Source_20_Text">Sistema busca a empresa através da tabela 'instancia' (empresa_id) ↓ </text:span></text:p>
        </text:list-item>
      </text:list>
      <text:list xml:id="list1939119819" text:style-name="L54">
        <text:list-item>
          <text:p text:style-name="P79"><text:span text:style-name="Source_20_Text">Sistema consulta 'contexto_sessao' para entender continuação da conversa ↓ </text:span></text:p>
        </text:list-item>
      </text:list>
      <text:list xml:id="list1330247039" text:style-name="L55">
        <text:list-item>
          <text:p text:style-name="P80"><text:span text:style-name="Source_20_Text">IA processa a mensagem usando o template configurado (prompt_key/prompt_version) ↓ </text:span></text:p>
        </text:list-item>
      </text:list>
      <text:list xml:id="list3265296954" text:style-name="L56">
        <text:list-item>
          <text:p text:style-name="P81"><text:span text:style-name="Source_20_Text">Sistema valida disponibilidade do profissional (consulta horários e agendamentos) ↓ </text:span></text:p>
        </text:list-item>
      </text:list>
      <text:list xml:id="list2585687431" text:style-name="L57">
        <text:list-item>
          <text:p text:style-name="P82"><text:span text:style-name="Source_20_Text">Sistema cria registro em 'agendamento' (com todos os dados do agendamento) ↓ </text:span></text:p>
        </text:list-item>
      </text:list>
      <text:list xml:id="list1156807969" text:style-name="L58">
        <text:list-item>
          <text:p text:style-name="P83"><text:span text:style-name="Source_20_Text">Sistema cria registros em 'agendamento_servico' (serviços solicitados) ↓ </text:span></text:p>
        </text:list-item>
      </text:list>
      <text:list xml:id="list1360827120" text:style-name="L59">
        <text:list-item>
          <text:p text:style-name="P84"><text:span text:style-name="Source_20_Text">Sistema cria evento no Google Calendar (integração gcalendar) ↓ </text:span></text:p>
        </text:list-item>
      </text:list>
      <text:list xml:id="list2616374157" text:style-name="L60">
        <text:list-item>
          <text:p text:style-name="P85"><text:span text:style-name="Source_20_Text">Sistema gera protocolo único (agend_protocolo) ↓ </text:span></text:p>
        </text:list-item>
      </text:list>
      <text:list xml:id="list592196321" text:style-name="L61">
        <text:list-item>
          <text:p text:style-name="P86"><text:span text:style-name="Source_20_Text">Sistema atualiza 'contexto_sessao' (para próximas interações) ↓ </text:span></text:p>
        </text:list-item>
      </text:list>
      <text:list xml:id="list2338507445" text:style-name="L62">
        <text:list-item>
          <text:p text:style-name="P87"><text:span text:style-name="Source_20_Text">Sistema envia confirmação ao cliente via WhatsApp </text:span>`<text:span text:style-name="Source_20_Text"> </text:span><text:span text:style-name="Source_20_Text"><text:span text:style-name="Strong_20_Emphasis">Detalhamento Técnico</text:span></text:span><text:span text:style-name="Source_20_Text">: </text:span><text:span text:style-name="Source_20_Text"><text:span text:style-name="Strong_20_Emphasis">Passo 2-3</text:span></text:span><text:span text:style-name="Source_20_Text">: Identificação da Empresa </text:span>`<text:span text:style-name="Source_20_Text">sql -- Quando mensagem chega, sistema faz: SELECT i.empresa_id, e.empresa_nome, e.empresa_cfg_id FROM instancia i JOIN empresa e ON e.empresa_id = i.empresa_id WHERE i.instancia_id = ''; </text:span>`<text:span text:style-name="Source_20_Text"> </text:span><text:span text:style-name="Source_20_Text"><text:span text:style-name="Strong_20_Emphasis">Passo 4</text:span></text:span><text:span text:style-name="Source_20_Text">: Buscar Contexto da Sessão </text:span>`<text:span text:style-name="Source_20_Text">sql -- Busca contexto anterior da conversa SELECT * FROM contexto_sessao WHERE session_id = '' AND empresa_id = ''; </text:span>`<text:span text:style-name="Source_20_Text"> </text:span><text:span text:style-name="Source_20_Text"><text:span text:style-name="Strong_20_Emphasis">Passo 5</text:span></text:span><text:span text:style-name="Source_20_Text">: Buscar Configuração de IA </text:span>`<text:span text:style-name="Source_20_Text">sql -- Busca template de prompt configurado para a empresa SELECT apt.template_text FROM empresa e JOIN empresa_cfg ec ON ec.empresa_cfg_id = e.empresa_cfg_id JOIN ai_prompt_templates apt ON apt.key = ec.prompt_key AND apt.version = ec.prompt_version WHERE e.empresa_id = ''; </text:span>`<text:span text:style-name="Source_20_Text"> </text:span><text:span text:style-name="Source_20_Text"><text:span text:style-name="Strong_20_Emphasis">Passo 6</text:span></text:span><text:span text:style-name="Source_20_Text">: Validar Disponibilidade </text:span>`<text:span text:style-name="Source_20_Text">sql -- Verifica se profissional está disponível no horário SELECT COUNT(*) FROM agendamento WHERE profissional_id = '' AND status_agend_id NOT IN ( SELECT status_agend_id FROM status_agend WHERE status_agend_nome = 'Cancelado' ) AND periodo &amp;&amp; tstzrange( ''::timestamptz, ''::timestamptz ); -- Se COUNT = 0, horário está disponível </text:span>`<text:span text:style-name="Source_20_Text"> </text:span></text:p>
        </text:list-item>
      </text:list>
      <text:h text:style-name="Heading_20_3" text:outline-level="3"><text:span text:style-name="Source_20_Text">Exemplo Prático</text:span></text:h>
      <text:p text:style-name="Text_20_body"><text:span text:style-name="Source_20_Text"><text:span text:style-name="Strong_20_Emphasis">Conversa</text:span></text:span><text:span text:style-name="Source_20_Text">: </text:span>`<text:span text:style-name="Source_20_Text"> Cliente: "Oi, quero agendar limpeza de pele" Bot: "Ótimo! Para qual dia você gostaria?" Cliente: "Amanhã às 14h" Bot: "Perfeito! Confirmando agendamento para dia 11/10 às 14h00 com a profissional Pamela Moraes. Limpeza de pele - R$ 150,00. Protocolo: AGD-1757374532047-8338" </text:span>`<text:span text:style-name="Source_20_Text"> </text:span><text:span text:style-name="Source_20_Text"><text:span text:style-name="Strong_20_Emphasis">Dados Criados</text:span></text:span><text:span text:style-name="Source_20_Text">: </text:span>`<text:span text:style-name="Source_20_Text">sql -- Tabela: agendamento agend_id: c335d819-e0aa-48f1-a116-a94be23c74b5 status: Agendado profissional: Pamela Moraes cliente: Alex Lima data: 2025-10-11 inicio: 2025-10-11 14:00:00 fim: 2025-10-11 15:30:00 valor: 150.00 protocolo: AGD-1757374532047-8338 -- Tabela: agendamento_servico servico: Limpeza de pele valor_aplicado: 150.00 duracao_aplicada: 01:30:00 </text:span>`<text:span text:style-name="Source_20_Text"> --- </text:span></text:p>
      <text:h text:style-name="Heading_20_2" text:outline-level="2"><text:span text:style-name="Source_20_Text">📐 Relacionamentos e Integridade</text:span></text:h>
      <text:h text:style-name="Heading_20_3" text:outline-level="3"><text:span text:style-name="Source_20_Text">Diagrama de Relacionamentos Principais</text:span></text:h>
      <text:p text:style-name="P3">`<text:span text:style-name="Source_20_Text"> instancia (Ponto de entrada via WhatsApp) ↓ └── empresa_id (Identifica a empresa) ↓ empresa (Entidade raiz multi-tenant) ├── empresa_cfg (1:1) → Configurações │ └── ai_prompt_templates (N:1) → Templates de IA ├── endereco (N:1) → Endereço da empresa ├── instancia (1:N) → Instâncias WhatsApp ├── clientes (1:N) → Clientes da empresa ├── profissional (1:N) → Profissionais │ ├── endereco (N:1) │ ├── profissional_horario (N:N) ← horario_f │ │ └── horario_det (1:N) │ ├── profissional_servico (N:N) ← servicos │ └── gcalendar (1:1) → Integração Google Calendar ├── agendamento (1:N) → Agendamentos │ ├── clientes (N:1) │ ├── profissional (N:1) │ ├── status_agend (N:1) │ └── agendamento_servico (1:N) │ ├── servicos (N:1) │ └── profissional_servico (N:1) ├── contexto_sessao (1:N) → Contexto das conversas ├── contrato (1:N) → Contratos de cobrança └── login (1:N) → Usuários do sistema └── nivel_acesso (N:1) </text:span>`<text:span text:style-name="Source_20_Text"> </text:span><text:span text:style-name="Source_20_Text"><text:span text:style-name="Strong_20_Emphasis">Fluxo de Dados no Agendamento</text:span></text:span><text:span text:style-name="Source_20_Text">: </text:span>`<text:span text:style-name="Source_20_Text"> </text:span></text:p>
      <text:list xml:id="list3099398991" text:style-name="L63">
        <text:list-item>
          <text:p text:style-name="P88"><text:span text:style-name="Source_20_Text">Mensagem WhatsApp → instancia → empresa </text:span></text:p>
        </text:list-item>
      </text:list>
      <text:list xml:id="list1442011296" text:style-name="L64">
        <text:list-item>
          <text:p text:style-name="P89"><text:span text:style-name="Source_20_Text">empresa → empresa_cfg → ai_prompt_templates </text:span></text:p>
        </text:list-item>
      </text:list>
      <text:list xml:id="list2656666002" text:style-name="L65">
        <text:list-item>
          <text:p text:style-name="P90"><text:span text:style-name="Source_20_Text">empresa → contexto_sessao (busca contexto) </text:span></text:p>
        </text:list-item>
      </text:list>
      <text:list xml:id="list3420358243" text:style-name="L66">
        <text:list-item>
          <text:p text:style-name="P91"><text:span text:style-name="Source_20_Text">empresa → profissional → profissional_servico </text:span></text:p>
        </text:list-item>
      </text:list>
      <text:list xml:id="list266733552" text:style-name="L67">
        <text:list-item>
          <text:p text:style-name="P92"><text:span text:style-name="Source_20_Text">empresa → agendamento (cria) </text:span></text:p>
        </text:list-item>
      </text:list>
      <text:list xml:id="list3113341883" text:style-name="L68">
        <text:list-item>
          <text:p text:style-name="P93"><text:span text:style-name="Source_20_Text">agendamento → agendamento_servico (cria) </text:span></text:p>
        </text:list-item>
      </text:list>
      <text:list xml:id="list2857767073" text:style-name="L69">
        <text:list-item>
          <text:p text:style-name="P94"><text:span text:style-name="Source_20_Text">profissional → gcalendar (sincroniza) </text:span>`<text:span text:style-name="Source_20_Text"> </text:span></text:p>
        </text:list-item>
      </text:list>
      <text:h text:style-name="Heading_20_3" text:outline-level="3"><text:span text:style-name="Source_20_Text">Regras de Integridade</text:span></text:h>
      <text:list xml:id="list1497885339" text:style-name="L70">
        <text:list-item>
          <text:p text:style-name="P95"><text:span text:style-name="Source_20_Text"><text:span text:style-name="Strong_20_Emphasis">Cascata em Deleção</text:span></text:span><text:span text:style-name="Source_20_Text">: - Deletar empresa → deleta clientes - Deletar profissional → deleta horários e serviços vinculados - Deletar agendamento → deleta serviços do agendamento </text:span></text:p>
        </text:list-item>
      </text:list>
      <text:list xml:id="list1593876069" text:style-name="L71">
        <text:list-item>
          <text:p text:style-name="P96"><text:span text:style-name="Source_20_Text"><text:span text:style-name="Strong_20_Emphasis">Restrições</text:span></text:span><text:span text:style-name="Source_20_Text">: - Não pode deletar serviço se houver agendamento - Não pode deletar status se houver agendamento usando --- </text:span></text:p>
        </text:list-item>
      </text:list>
      <text:h text:style-name="Heading_20_2" text:outline-level="2"><text:span text:style-name="Source_20_Text">⚙️ Funções e Triggers</text:span></text:h>
      <text:h text:style-name="Heading_20_3" text:outline-level="3"><text:span text:style-name="Source_20_Text">Funções do Banco</text:span></text:h>
      <text:h text:style-name="Heading_20_4" text:outline-level="4"><text:span text:style-name="Source_20_Text">1. </text:span>ags_set_prof()</text:h>
      <text:p text:style-name="Text_20_body"><text:span text:style-name="Source_20_Text"><text:span text:style-name="Strong_20_Emphasis">Propósito</text:span></text:span><text:span text:style-name="Source_20_Text">: Define automaticamente o profissional em </text:span>agendamento_servico<text:span text:style-name="Source_20_Text">. </text:span>`<text:span text:style-name="Source_20_Text">sql CREATE FUNCTION ags_set_prof() RETURNS trigger AS $$ BEGIN IF NEW.profissional_id IS NULL THEN SELECT a.profissional_id INTO NEW.profissional_id FROM agendamento a WHERE a.agend_id = NEW.agend_id; END IF; RETURN NEW; END; $$ LANGUAGE plpgsql; </text:span>`<text:span text:style-name="Source_20_Text"> </text:span><text:span text:style-name="Source_20_Text"><text:span text:style-name="Strong_20_Emphasis">Como Funciona</text:span></text:span><text:span text:style-name="Source_20_Text">: Se não informar o profissional ao criar um serviço do agendamento, busca automaticamente do agendamento principal. --- </text:span></text:p>
      <text:h text:style-name="Heading_20_4" text:outline-level="4"><text:span text:style-name="Source_20_Text">2. </text:span>is_empresa_adimplente(uuid)</text:h>
      <text:p text:style-name="Text_20_body"><text:span text:style-name="Source_20_Text"><text:span text:style-name="Strong_20_Emphasis">Propósito</text:span></text:span><text:span text:style-name="Source_20_Text">: Verifica se empresa está em dia com pagamentos. </text:span>`<text:span text:style-name="Source_20_Text">sql CREATE FUNCTION is_empresa_adimplente(p_empresa uuid) RETURNS boolean AS $$ SELECT true; -- stub temporário $$ LANGUAGE sql STABLE; </text:span>`<text:span text:style-name="Source_20_Text"> </text:span><text:span text:style-name="Source_20_Text"><text:span text:style-name="Strong_20_Emphasis">Uso</text:span></text:span><text:span text:style-name="Source_20_Text">: Pode ser usado para bloquear agendamentos de empresas inadimplentes. --- </text:span></text:p>
      <text:h text:style-name="Heading_20_4" text:outline-level="4"><text:span text:style-name="Source_20_Text">3. </text:span>set_updated_at()<text:span text:style-name="Source_20_Text"> e </text:span>update_updated_at_column()</text:h>
      <text:p text:style-name="Text_20_body"><text:span text:style-name="Source_20_Text"><text:span text:style-name="Strong_20_Emphasis">Propósito</text:span></text:span><text:span text:style-name="Source_20_Text">: Atualiza automaticamente timestamps de modificação. </text:span><text:span text:style-name="Source_20_Text"><text:span text:style-name="Strong_20_Emphasis">Como Funciona</text:span></text:span><text:span text:style-name="Source_20_Text">: Triggers que atualizam campos </text:span>*_dt_atualizacao<text:span text:style-name="Source_20_Text"> ou </text:span>updated_at<text:span text:style-name="Source_20_Text"> automaticamente. --- </text:span></text:p>
      <text:h text:style-name="Heading_20_2" text:outline-level="2"><text:span text:style-name="Source_20_Text">📊 Índices para Performance</text:span></text:h>
      <text:h text:style-name="Heading_20_3" text:outline-level="3"><text:span text:style-name="Source_20_Text">Índices Críticos</text:span></text:h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Table_20_Contents">Índice</text:p>
          </table:table-cell>
          <table:table-cell table:style-name="Tabela5.B1" office:value-type="string">
            <text:p text:style-name="Table_20_Contents">Tabela</text:p>
          </table:table-cell>
          <table:table-cell table:style-name="Tabela5.B1" office:value-type="string">
            <text:p text:style-name="Table_20_Contents">Campos</text:p>
          </table:table-cell>
          <table:table-cell table:style-name="Tabela5.B1" office:value-type="string">
            <text:p text:style-name="Table_20_Contents">Propósito</text:p>
          </table:table-cell>
        </table:table-row>
        <table:table-row>
          <table:table-cell table:style-name="Tabela5.A2" office:value-type="string">
            <text:p text:style-name="Table_20_Contents">--------</text:p>
          </table:table-cell>
          <table:table-cell table:style-name="Tabela5.B2" office:value-type="string">
            <text:p text:style-name="Table_20_Contents">--------</text:p>
          </table:table-cell>
          <table:table-cell table:style-name="Tabela5.B2" office:value-type="string">
            <text:p text:style-name="Table_20_Contents">--------</text:p>
          </table:table-cell>
          <table:table-cell table:style-name="Tabela5.B2" office:value-type="string">
            <text:p text:style-name="Table_20_Contents">-----------</text:p>
          </table:table-cell>
        </table:table-row>
        <table:table-row>
          <table:table-cell table:style-name="Tabela5.A2" office:value-type="string">
            <text:p text:style-name="Table_20_Contents">ix_agendamento_empresa</text:p>
          </table:table-cell>
          <table:table-cell table:style-name="Tabela5.B2" office:value-type="string">
            <text:p text:style-name="Table_20_Contents">agendamento</text:p>
          </table:table-cell>
          <table:table-cell table:style-name="Tabela5.B2" office:value-type="string">
            <text:p text:style-name="Table_20_Contents">empresa_id</text:p>
          </table:table-cell>
          <table:table-cell table:style-name="Tabela5.B2" office:value-type="string">
            <text:p text:style-name="Table_20_Contents">Buscar agendamentos por empresa</text:p>
          </table:table-cell>
        </table:table-row>
        <table:table-row>
          <table:table-cell table:style-name="Tabela5.A2" office:value-type="string">
            <text:p text:style-name="Table_20_Contents">ix_agendamento_cliente</text:p>
          </table:table-cell>
          <table:table-cell table:style-name="Tabela5.B2" office:value-type="string">
            <text:p text:style-name="Table_20_Contents">agendamento</text:p>
          </table:table-cell>
          <table:table-cell table:style-name="Tabela5.B2" office:value-type="string">
            <text:p text:style-name="Table_20_Contents">clientes_id</text:p>
          </table:table-cell>
          <table:table-cell table:style-name="Tabela5.B2" office:value-type="string">
            <text:p text:style-name="Table_20_Contents">Buscar agendamentos por cliente</text:p>
          </table:table-cell>
        </table:table-row>
        <table:table-row>
          <table:table-cell table:style-name="Tabela5.A2" office:value-type="string">
            <text:p text:style-name="Table_20_Contents">ix_agendamento_status</text:p>
          </table:table-cell>
          <table:table-cell table:style-name="Tabela5.B2" office:value-type="string">
            <text:p text:style-name="Table_20_Contents">agendamento</text:p>
          </table:table-cell>
          <table:table-cell table:style-name="Tabela5.B2" office:value-type="string">
            <text:p text:style-name="Table_20_Contents">status_agend_id</text:p>
          </table:table-cell>
          <table:table-cell table:style-name="Tabela5.B2" office:value-type="string">
            <text:p text:style-name="Table_20_Contents">Filtrar por status</text:p>
          </table:table-cell>
        </table:table-row>
        <table:table-row>
          <table:table-cell table:style-name="Tabela5.A2" office:value-type="string">
            <text:p text:style-name="Table_20_Contents">prof_idx_empresa</text:p>
          </table:table-cell>
          <table:table-cell table:style-name="Tabela5.B2" office:value-type="string">
            <text:p text:style-name="Table_20_Contents">profissional</text:p>
          </table:table-cell>
          <table:table-cell table:style-name="Tabela5.B2" office:value-type="string">
            <text:p text:style-name="Table_20_Contents">empresa_id</text:p>
          </table:table-cell>
          <table:table-cell table:style-name="Tabela5.B2" office:value-type="string">
            <text:p text:style-name="Table_20_Contents">Buscar profissionais por empresa</text:p>
          </table:table-cell>
        </table:table-row>
        <table:table-row>
          <table:table-cell table:style-name="Tabela5.A7" office:value-type="string">
            <text:p text:style-name="Table_20_Contents">ps_idx_prof</text:p>
          </table:table-cell>
          <table:table-cell table:style-name="Tabela5.B7" office:value-type="string">
            <text:p text:style-name="Table_20_Contents">profissional_servico</text:p>
          </table:table-cell>
          <table:table-cell table:style-name="Tabela5.B7" office:value-type="string">
            <text:p text:style-name="Table_20_Contents">profissional_id</text:p>
          </table:table-cell>
          <table:table-cell table:style-name="Tabela5.B7" office:value-type="string">
            <text:p text:style-name="Table_20_Contents">Buscar serviços do profissional</text:p>
          </table:table-cell>
        </table:table-row>
      </table:table>
      <text:h text:style-name="Heading_20_3" text:outline-level="3"><text:span text:style-name="Source_20_Text">Consultas Otimizadas</text:span></text:h>
      <text:p text:style-name="Text_20_body"><text:span text:style-name="Source_20_Text"><text:span text:style-name="Strong_20_Emphasis">Buscar agendamentos de uma empresa</text:span></text:span><text:span text:style-name="Source_20_Text">: </text:span>`<text:span text:style-name="Source_20_Text">sql SELECT * FROM agendamento WHERE empresa_id = 'xxx' ORDER BY agend_data DESC; -- Usa: ix_agendamento_empresa </text:span>`<text:span text:style-name="Source_20_Text"> </text:span><text:span text:style-name="Source_20_Text"><text:span text:style-name="Strong_20_Emphasis">Verificar disponibilidade de profissional</text:span></text:span><text:span text:style-name="Source_20_Text">: </text:span>`<text:span text:style-name="Source_20_Text">sql SELECT * FROM agendamento WHERE profissional_id = 'xxx' AND periodo &amp;&amp; tstzrange('2025-10-11 14:00', '2025-10-11 15:30'); -- Usa: campo calculado periodo </text:span>`<text:span text:style-name="Source_20_Text"> --- </text:span></text:p>
      <text:h text:style-name="Heading_20_2" text:outline-level="2"><text:span text:style-name="Source_20_Text">🎯 Regras de Negócio</text:span></text:h>
      <text:h text:style-name="Heading_20_3" text:outline-level="3"><text:span text:style-name="Source_20_Text">1. Isolamento Multi-tenant</text:span></text:h>
      <text:p text:style-name="Text_20_body"><text:span text:style-name="Source_20_Text"><text:span text:style-name="Strong_20_Emphasis">Regra</text:span></text:span><text:span text:style-name="Source_20_Text">: Todas as consultas devem filtrar por </text:span>empresa_id<text:span text:style-name="Source_20_Text">. </text:span><text:span text:style-name="Source_20_Text"><text:span text:style-name="Strong_20_Emphasis">Implementação</text:span></text:span><text:span text:style-name="Source_20_Text">: </text:span>`<text:span text:style-name="Source_20_Text">sql -- ✅ CORRETO SELECT * FROM clientes WHERE empresa_id = 'xxx'; -- ❌ ERRADO (acessa dados de todas as empresas) SELECT * FROM clientes; </text:span>`<text:span text:style-name="Source_20_Text"> --- </text:span></text:p>
      <text:h text:style-name="Heading_20_3" text:outline-level="3"><text:span text:style-name="Source_20_Text">2. Validação de Horários</text:span></text:h>
      <text:p text:style-name="P3"><text:span text:style-name="Source_20_Text"><text:span text:style-name="Strong_20_Emphasis">Regras</text:span></text:span><text:span text:style-name="Source_20_Text">: </text:span></text:p>
      <text:list xml:id="list2157572385" text:style-name="L72">
        <text:list-item>
          <text:p text:style-name="P97"><text:span text:style-name="Source_20_Text">Verificar antecedência mínima (</text:span>empresa_cfg_anteced_minutos<text:span text:style-name="Source_20_Text">) </text:span></text:p>
        </text:list-item>
      </text:list>
      <text:list xml:id="list2302215874" text:style-name="L73">
        <text:list-item>
          <text:p text:style-name="P98"><text:span text:style-name="Source_20_Text">Verificar intervalo entre agendamentos (</text:span>empresa_cfg_interv_minutos<text:span text:style-name="Source_20_Text">) </text:span></text:p>
        </text:list-item>
      </text:list>
      <text:list xml:id="list1891008722" text:style-name="L74">
        <text:list-item>
          <text:p text:style-name="P99"><text:span text:style-name="Source_20_Text">Considerar buffers pré e pós atendimento </text:span></text:p>
        </text:list-item>
      </text:list>
      <text:list xml:id="list2632899585" text:style-name="L75">
        <text:list-item>
          <text:p text:style-name="P100"><text:span text:style-name="Source_20_Text">Verificar conflito de horários do profissional </text:span><text:span text:style-name="Source_20_Text"><text:span text:style-name="Strong_20_Emphasis">Exemplo de Validação</text:span></text:span><text:span text:style-name="Source_20_Text">: </text:span>`<text:span text:style-name="Source_20_Text">sql -- Verificar se horário está disponível SELECT COUNT(*) FROM agendamento WHERE profissional_id = 'xxx' AND status_agend_id NOT IN (SELECT status_agend_id FROM status_agend WHERE status_agend_nome = 'Cancelado') AND periodo &amp;&amp; tstzrange('2025-10-11 14:00', '2025-10-11 15:30'); -- Se COUNT = 0, horário está livre </text:span>`<text:span text:style-name="Source_20_Text"> --- </text:span></text:p>
        </text:list-item>
      </text:list>
      <text:h text:style-name="Heading_20_3" text:outline-level="3"><text:span text:style-name="Source_20_Text">3. Cálculo de Valor Total</text:span></text:h>
      <text:p text:style-name="Text_20_body"><text:span text:style-name="Source_20_Text"><text:span text:style-name="Strong_20_Emphasis">Regra</text:span></text:span><text:span text:style-name="Source_20_Text">: Valor do agendamento = soma dos valores dos serviços. </text:span><text:span text:style-name="Source_20_Text"><text:span text:style-name="Strong_20_Emphasis">Implementação</text:span></text:span><text:span text:style-name="Source_20_Text">: </text:span>`<text:span text:style-name="Source_20_Text">sql -- Calcular valor total SELECT SUM(valor_aplicado) FROM agendamento_servico WHERE agend_id = 'xxx'; </text:span>`<text:span text:style-name="Source_20_Text"> --- </text:span></text:p>
      <text:h text:style-name="Heading_20_3" text:outline-level="3"><text:span text:style-name="Source_20_Text">4. Cálculo de Duração Total</text:span></text:h>
      <text:p text:style-name="Text_20_body"><text:span text:style-name="Source_20_Text"><text:span text:style-name="Strong_20_Emphasis">Regra</text:span></text:span><text:span text:style-name="Source_20_Text">: Duração = soma das durações dos serviços + intervalos + buffers. </text:span><text:span text:style-name="Source_20_Text"><text:span text:style-name="Strong_20_Emphasis">Exemplo</text:span></text:span><text:span text:style-name="Source_20_Text">: </text:span>`<text:span text:style-name="Source_20_Text"> Serviço 1: 1h30 Serviço 2: 20min Intervalo: 15min Buffer pré: 5min Buffer pós: 5min Total: 2h15min </text:span>`<text:span text:style-name="Source_20_Text"> --- </text:span></text:p>
      <text:h text:style-name="Heading_20_3" text:outline-level="3"><text:span text:style-name="Source_20_Text">5. Protocolo Único</text:span></text:h>
      <text:p text:style-name="Text_20_body"><text:span text:style-name="Source_20_Text"><text:span text:style-name="Strong_20_Emphasis">Regra</text:span></text:span><text:span text:style-name="Source_20_Text">: Cada agendamento deve ter protocolo único para o cliente. </text:span><text:span text:style-name="Source_20_Text"><text:span text:style-name="Strong_20_Emphasis">Formato Identificado</text:span></text:span><text:span text:style-name="Source_20_Text">: </text:span></text:p>
      <text:list xml:id="list3359496728" text:style-name="L76">
        <text:list-item>
          <text:p text:style-name="P102">THD-8360<text:span text:style-name="Source_20_Text"> </text:span></text:p>
        </text:list-item>
        <text:list-item>
          <text:p text:style-name="P101">AGD-1757374532047-8338<text:span text:style-name="Source_20_Text"> </text:span></text:p>
        </text:list-item>
      </text:list>
      <text:p text:style-name="Text_20_body"><text:span text:style-name="Source_20_Text"><text:span text:style-name="Strong_20_Emphasis">Geração</text:span></text:span><text:span text:style-name="Source_20_Text">: Pode usar timestamp + random ou sequencial. --- </text:span></text:p>
      <text:h text:style-name="Heading_20_3" text:outline-level="3"><text:span text:style-name="Source_20_Text">6. Status do Agendamento</text:span></text:h>
      <text:p text:style-name="Text_20_body"><text:span text:style-name="Source_20_Text"><text:span text:style-name="Strong_20_Emphasis">Fluxo de Status</text:span></text:span><text:span text:style-name="Source_20_Text">: </text:span>`<text:span text:style-name="Source_20_Text"> Agendado → Confirmado → Avisado → Concluído ↓ Cancelado (pode cancelar em qualquer etapa) </text:span>`<text:span text:style-name="Source_20_Text"> --- </text:span></text:p>
      <text:h text:style-name="Heading_20_2" text:outline-level="2"><text:span text:style-name="Source_20_Text">🛠️ Guia de Desenvolvimento</text:span></text:h>
      <text:h text:style-name="Heading_20_3" text:outline-level="3"><text:span text:style-name="Source_20_Text">Arquitetura Recomendada</text:span></text:h>
      <text:p text:style-name="Text_20_body">`<text:span text:style-name="Source_20_Text"> ┌─────────────────────────────────────────┐ │ Frontend (Web/Mobile) │ │ - Interface de agendamento │ │ - Gestão de profissionais │ │ - Relatórios │ └─────────────────┬───────────────────────┘ │ ┌─────────────────▼───────────────────────┐ │ API REST │ │ - Autenticação JWT │ │ - Validação de permissões │ │ - Lógica de negócio │ └─────────────────┬───────────────────────┘ │ ┌─────────────────▼───────────────────────┐ │ Camada de Serviços │ │ - Serviço de Agendamento │ │ - Serviço de WhatsApp │ │ - Serviço de Google Calendar │ │ - Serviço de IA │ └─────────────────┬───────────────────────┘ │ ┌─────────────────▼───────────────────────┐ │ PostgreSQL 16.9 │ └─────────────────────────────────────────┘ </text:span>`<text:span text:style-name="Source_20_Text"> --- </text:span></text:p>
      <text:h text:style-name="Heading_20_3" text:outline-level="3"><text:span text:style-name="Source_20_Text">Endpoints Sugeridos</text:span></text:h>
      <text:h text:style-name="Heading_20_4" text:outline-level="4"><text:span text:style-name="Source_20_Text">Empresas</text:span></text:h>
      <text:list xml:id="list1344570141" text:style-name="L77">
        <text:list-item>
          <text:p text:style-name="P104">GET /api/empresas<text:span text:style-name="Source_20_Text"> - Listar empresas </text:span></text:p>
        </text:list-item>
        <text:list-item>
          <text:p text:style-name="P104">GET /api/empresas/:id<text:span text:style-name="Source_20_Text"> - Detalhes da empresa </text:span></text:p>
        </text:list-item>
        <text:list-item>
          <text:p text:style-name="P104">POST /api/empresas<text:span text:style-name="Source_20_Text"> - Criar empresa </text:span></text:p>
        </text:list-item>
        <text:list-item>
          <text:p text:style-name="P104">PUT /api/empresas/:id<text:span text:style-name="Source_20_Text"> - Atualizar empresa </text:span></text:p>
        </text:list-item>
        <text:list-item>
          <text:p text:style-name="P103">DELETE /api/empresas/:id<text:span text:style-name="Source_20_Text"> - Deletar empresa </text:span></text:p>
        </text:list-item>
      </text:list>
      <text:h text:style-name="Heading_20_4" text:outline-level="4"><text:span text:style-name="Source_20_Text">Profissionais</text:span></text:h>
      <text:list xml:id="list139252474" text:style-name="L78">
        <text:list-item>
          <text:p text:style-name="P106">GET /api/empresas/:empresaId/profissionais<text:span text:style-name="Source_20_Text"> - Listar profissionais </text:span></text:p>
        </text:list-item>
        <text:list-item>
          <text:p text:style-name="P106">GET /api/profissionais/:id<text:span text:style-name="Source_20_Text"> - Detalhes do profissional </text:span></text:p>
        </text:list-item>
        <text:list-item>
          <text:p text:style-name="P106">POST /api/profissionais<text:span text:style-name="Source_20_Text"> - Criar profissional </text:span></text:p>
        </text:list-item>
        <text:list-item>
          <text:p text:style-name="P106">PUT /api/profissionais/:id<text:span text:style-name="Source_20_Text"> - Atualizar profissional </text:span></text:p>
        </text:list-item>
        <text:list-item>
          <text:p text:style-name="P106">GET /api/profissionais/:id/horarios<text:span text:style-name="Source_20_Text"> - Horários do profissional </text:span></text:p>
        </text:list-item>
        <text:list-item>
          <text:p text:style-name="P105">GET /api/profissionais/:id/servicos<text:span text:style-name="Source_20_Text"> - Serviços do profissional </text:span></text:p>
        </text:list-item>
      </text:list>
      <text:h text:style-name="Heading_20_4" text:outline-level="4"><text:span text:style-name="Source_20_Text">Agendamentos</text:span></text:h>
      <text:list xml:id="list2061194166" text:style-name="L79">
        <text:list-item>
          <text:p text:style-name="P108">GET /api/empresas/:empresaId/agendamentos<text:span text:style-name="Source_20_Text"> - Listar agendamentos </text:span></text:p>
        </text:list-item>
        <text:list-item>
          <text:p text:style-name="P108">GET /api/agendamentos/:id<text:span text:style-name="Source_20_Text"> - Detalhes do agendamento </text:span></text:p>
        </text:list-item>
        <text:list-item>
          <text:p text:style-name="P108">POST /api/agendamentos<text:span text:style-name="Source_20_Text"> - Criar agendamento </text:span></text:p>
        </text:list-item>
        <text:list-item>
          <text:p text:style-name="P108">PUT /api/agendamentos/:id<text:span text:style-name="Source_20_Text"> - Atualizar agendamento </text:span></text:p>
        </text:list-item>
        <text:list-item>
          <text:p text:style-name="P108">DELETE /api/agendamentos/:id<text:span text:style-name="Source_20_Text"> - Cancelar agendamento </text:span></text:p>
        </text:list-item>
        <text:list-item>
          <text:p text:style-name="P108">GET /api/agendamentos/:id/protocolo/:protocolo<text:span text:style-name="Source_20_Text"> - Buscar por protocolo </text:span></text:p>
        </text:list-item>
        <text:list-item>
          <text:p text:style-name="P107">POST /api/agendamentos/disponibilidade<text:span text:style-name="Source_20_Text"> - Verificar disponibilidade </text:span></text:p>
        </text:list-item>
      </text:list>
      <text:h text:style-name="Heading_20_4" text:outline-level="4"><text:span text:style-name="Source_20_Text">Clientes</text:span></text:h>
      <text:list xml:id="list621076914" text:style-name="L80">
        <text:list-item>
          <text:p text:style-name="P110">GET /api/empresas/:empresaId/clientes<text:span text:style-name="Source_20_Text"> - Listar clientes </text:span></text:p>
        </text:list-item>
        <text:list-item>
          <text:p text:style-name="P110">GET /api/clientes/:id<text:span text:style-name="Source_20_Text"> - Detalhes do cliente </text:span></text:p>
        </text:list-item>
        <text:list-item>
          <text:p text:style-name="P109">GET /api/clientes/:id/agendamentos<text:span text:style-name="Source_20_Text"> - Agendamentos do cliente </text:span></text:p>
        </text:list-item>
      </text:list>
      <text:h text:style-name="Heading_20_4" text:outline-level="4"><text:span text:style-name="Source_20_Text">Serviços</text:span></text:h>
      <text:list xml:id="list2490115498" text:style-name="L81">
        <text:list-item>
          <text:p text:style-name="P112">GET /api/servicos<text:span text:style-name="Source_20_Text"> - Listar serviços </text:span></text:p>
        </text:list-item>
        <text:list-item>
          <text:p text:style-name="P112">GET /api/servicos/:id<text:span text:style-name="Source_20_Text"> - Detalhes do serviço </text:span></text:p>
        </text:list-item>
        <text:list-item>
          <text:p text:style-name="P112">POST /api/servicos<text:span text:style-name="Source_20_Text"> - Criar serviço </text:span></text:p>
        </text:list-item>
        <text:list-item>
          <text:p text:style-name="P111">PUT /api/servicos/:id<text:span text:style-name="Source_20_Text"> - Atualizar serviço </text:span></text:p>
        </text:list-item>
      </text:list>
      <text:p text:style-name="Text_20_body"><text:span text:style-name="Source_20_Text">--- </text:span></text:p>
      <text:h text:style-name="Heading_20_3" text:outline-level="3"><text:span text:style-name="Source_20_Text">Segurança</text:span></text:h>
      <text:h text:style-name="Heading_20_4" text:outline-level="4"><text:span text:style-name="Source_20_Text">1. Autenticação JWT</text:span></text:h>
      <text:p text:style-name="Text_20_body"><text:span text:style-name="Source_20_Text"><text:span text:style-name="Strong_20_Emphasis">Estrutura do Token</text:span></text:span><text:span text:style-name="Source_20_Text">: </text:span>`<text:span text:style-name="Source_20_Text">json { "user_id": "uuid", "empresa_id": "uuid", "nivel_acesso": "administrador", "exp": 1234567890 } </text:span>`<text:span text:style-name="Source_20_Text"> </text:span><text:span text:style-name="Source_20_Text"><text:span text:style-name="Strong_20_Emphasis">Middleware</text:span></text:span><text:span text:style-name="Source_20_Text">: </text:span>`<text:span text:style-name="Source_20_Text">javascript // Exemplo em Node.js function verificarEmpresa(req, res, next) { const empresaToken = req.user.empresa_id; const empresaRequisicao = req.params.empresaId; if (empresaToken !== empresaRequisicao) { return res.status(403).json({ error: 'Acesso negado' }); } next(); } </text:span>`<text:span text:style-name="Source_20_Text"> --- </text:span></text:p>
      <text:h text:style-name="Heading_20_4" text:outline-level="4"><text:span text:style-name="Source_20_Text">2. Validação de Permissões</text:span></text:h>
      <text:p text:style-name="Text_20_body"><text:span text:style-name="Source_20_Text"><text:span text:style-name="Strong_20_Emphasis">Níveis de Acesso</text:span></text:span><text:span text:style-name="Source_20_Text">: </text:span></text:p>
      <text:list xml:id="list137248718" text:style-name="L82">
        <text:list-item>
          <text:p text:style-name="P114"><text:span text:style-name="Source_20_Text"><text:span text:style-name="Strong_20_Emphasis">Administrador</text:span></text:span><text:span text:style-name="Source_20_Text">: Acesso total à sua empresa </text:span></text:p>
        </text:list-item>
        <text:list-item>
          <text:p text:style-name="P114"><text:span text:style-name="Source_20_Text"><text:span text:style-name="Strong_20_Emphasis">Gerente</text:span></text:span><text:span text:style-name="Source_20_Text">: Gestão de profissionais e agendamentos </text:span></text:p>
        </text:list-item>
        <text:list-item>
          <text:p text:style-name="P114"><text:span text:style-name="Source_20_Text"><text:span text:style-name="Strong_20_Emphasis">Profissional</text:span></text:span><text:span text:style-name="Source_20_Text">: Visualizar seus próprios agendamentos </text:span></text:p>
        </text:list-item>
        <text:list-item>
          <text:p text:style-name="P113"><text:span text:style-name="Source_20_Text"><text:span text:style-name="Strong_20_Emphasis">Recepcionista</text:span></text:span><text:span text:style-name="Source_20_Text">: Criar e gerenciar agendamentos </text:span></text:p>
        </text:list-item>
      </text:list>
      <text:p text:style-name="Text_20_body"><text:span text:style-name="Source_20_Text">--- </text:span></text:p>
      <text:h text:style-name="Heading_20_4" text:outline-level="4"><text:span text:style-name="Source_20_Text">3. Sanitização de Dados</text:span></text:h>
      <text:p text:style-name="Text_20_body"><text:span text:style-name="Source_20_Text"><text:span text:style-name="Strong_20_Emphasis">Sempre validar</text:span></text:span><text:span text:style-name="Source_20_Text">: </text:span></text:p>
      <text:list xml:id="list1745475561" text:style-name="L83">
        <text:list-item>
          <text:p text:style-name="P116"><text:span text:style-name="Source_20_Text">UUIDs válidos </text:span></text:p>
        </text:list-item>
        <text:list-item>
          <text:p text:style-name="P116"><text:span text:style-name="Source_20_Text">Datas no formato correto </text:span></text:p>
        </text:list-item>
        <text:list-item>
          <text:p text:style-name="P116"><text:span text:style-name="Source_20_Text">Valores numéricos positivos </text:span></text:p>
        </text:list-item>
        <text:list-item>
          <text:p text:style-name="P116"><text:span text:style-name="Source_20_Text">Telefones no formato esperado </text:span></text:p>
        </text:list-item>
        <text:list-item>
          <text:p text:style-name="P115"><text:span text:style-name="Source_20_Text">CEPs válidos </text:span></text:p>
        </text:list-item>
      </text:list>
      <text:p text:style-name="Text_20_body"><text:soft-page-break/><text:span text:style-name="Source_20_Text">--- </text:span></text:p>
      <text:h text:style-name="Heading_20_3" text:outline-level="3"><text:span text:style-name="Source_20_Text">Performance</text:span></text:h>
      <text:h text:style-name="Heading_20_4" text:outline-level="4"><text:span text:style-name="Source_20_Text">1. Paginação</text:span></text:h>
      <text:p text:style-name="Text_20_body"><text:span text:style-name="Source_20_Text"><text:span text:style-name="Strong_20_Emphasis">Sempre paginar listagens</text:span></text:span><text:span text:style-name="Source_20_Text">: </text:span>`<text:span text:style-name="Source_20_Text">sql SELECT * FROM agendamento WHERE empresa_id = 'xxx' ORDER BY agend_data DESC LIMIT 20 OFFSET 0; </text:span>`<text:span text:style-name="Source_20_Text"> --- </text:span></text:p>
      <text:h text:style-name="Heading_20_4" text:outline-level="4"><text:span text:style-name="Source_20_Text">2. Cache</text:span></text:h>
      <text:p text:style-name="Text_20_body"><text:span text:style-name="Source_20_Text"><text:span text:style-name="Strong_20_Emphasis">Cachear</text:span></text:span><text:span text:style-name="Source_20_Text">: </text:span></text:p>
      <text:list xml:id="list3469280075" text:style-name="L84">
        <text:list-item>
          <text:p text:style-name="P118"><text:span text:style-name="Source_20_Text">Configurações da empresa </text:span></text:p>
        </text:list-item>
        <text:list-item>
          <text:p text:style-name="P118"><text:span text:style-name="Source_20_Text">Lista de serviços </text:span></text:p>
        </text:list-item>
        <text:list-item>
          <text:p text:style-name="P118"><text:span text:style-name="Source_20_Text">Lista de profissionais </text:span></text:p>
        </text:list-item>
        <text:list-item>
          <text:p text:style-name="P117"><text:span text:style-name="Source_20_Text">Templates de IA </text:span></text:p>
        </text:list-item>
      </text:list>
      <text:p text:style-name="Text_20_body"><text:span text:style-name="Source_20_Text"><text:span text:style-name="Strong_20_Emphasis">TTL Sugerido</text:span></text:span><text:span text:style-name="Source_20_Text">: 5-15 minutos --- </text:span></text:p>
      <text:h text:style-name="Heading_20_4" text:outline-level="4"><text:span text:style-name="Source_20_Text">3. Consultas Otimizadas</text:span></text:h>
      <text:p text:style-name="Text_20_body"><text:span text:style-name="Source_20_Text"><text:span text:style-name="Strong_20_Emphasis">Use índices existentes</text:span></text:span><text:span text:style-name="Source_20_Text">: </text:span>`<text:span text:style-name="Source_20_Text">sql -- ✅ BOM (usa índice) WHERE empresa_id = 'xxx' AND status_agend_id = 'yyy' -- ❌ RUIM (não usa índice) WHERE UPPER(empresa_nome) = 'XXX' </text:span>`<text:span text:style-name="Source_20_Text"> --- </text:span></text:p>
      <text:h text:style-name="Heading_20_3" text:outline-level="3"><text:span text:style-name="Source_20_Text">Integração WhatsApp</text:span></text:h>
      <text:h text:style-name="Heading_20_4" text:outline-level="4"><text:span text:style-name="Source_20_Text">Fluxo de Mensagem</text:span></text:h>
      <text:list xml:id="list759337433" text:style-name="L85">
        <text:list-item>
          <text:p text:style-name="P119"><text:span text:style-name="Source_20_Text"><text:span text:style-name="Strong_20_Emphasis">Webhook recebe mensagem</text:span></text:span><text:span text:style-name="Source_20_Text"> do WhatsApp </text:span></text:p>
        </text:list-item>
      </text:list>
      <text:list xml:id="list2164467543" text:style-name="L86">
        <text:list-item>
          <text:p text:style-name="P120"><text:span text:style-name="Source_20_Text"><text:span text:style-name="Strong_20_Emphasis">Identifica instância</text:span></text:span><text:span text:style-name="Source_20_Text"> que recebeu a mensagem (</text:span>instancia_id<text:span text:style-name="Source_20_Text">) </text:span></text:p>
        </text:list-item>
      </text:list>
      <text:list xml:id="list272492286" text:style-name="L87">
        <text:list-item>
          <text:p text:style-name="P121"><text:span text:style-name="Source_20_Text"><text:span text:style-name="Strong_20_Emphasis">Busca empresa</text:span></text:span><text:span text:style-name="Source_20_Text"> através da tabela </text:span>instancia<text:span text:style-name="Source_20_Text"> (</text:span>empresa_id<text:span text:style-name="Source_20_Text">) </text:span></text:p>
        </text:list-item>
      </text:list>
      <text:list xml:id="list3055089257" text:style-name="L88">
        <text:list-item>
          <text:p text:style-name="P122"><text:span text:style-name="Source_20_Text"><text:span text:style-name="Strong_20_Emphasis">Busca ou cria cliente</text:span></text:span><text:span text:style-name="Source_20_Text"> na tabela </text:span>clientes<text:span text:style-name="Source_20_Text"> </text:span></text:p>
        </text:list-item>
      </text:list>
      <text:list xml:id="list2394320163" text:style-name="L89">
        <text:list-item>
          <text:p text:style-name="P123"><text:span text:style-name="Source_20_Text"><text:span text:style-name="Strong_20_Emphasis">Busca contexto da sessão</text:span></text:span><text:span text:style-name="Source_20_Text"> em </text:span>contexto_sessao<text:span text:style-name="Source_20_Text"> </text:span></text:p>
        </text:list-item>
      </text:list>
      <text:list xml:id="list3423094535" text:style-name="L90">
        <text:list-item>
          <text:p text:style-name="P124"><text:span text:style-name="Source_20_Text"><text:span text:style-name="Strong_20_Emphasis">Busca configurações</text:span></text:span><text:span text:style-name="Source_20_Text"> da empresa em </text:span>empresa_cfg<text:span text:style-name="Source_20_Text"> </text:span></text:p>
        </text:list-item>
      </text:list>
      <text:list xml:id="list284204145" text:style-name="L91">
        <text:list-item>
          <text:p text:style-name="P125"><text:span text:style-name="Source_20_Text"><text:span text:style-name="Strong_20_Emphasis">Envia para IA processar</text:span></text:span><text:span text:style-name="Source_20_Text"> usando o template configurado </text:span></text:p>
        </text:list-item>
      </text:list>
      <text:list xml:id="list699200734" text:style-name="L92">
        <text:list-item>
          <text:p text:style-name="P126"><text:span text:style-name="Source_20_Text"><text:span text:style-name="Strong_20_Emphasis">Executa ação</text:span></text:span><text:span text:style-name="Source_20_Text"> (criar agendamento, buscar horários, etc.) </text:span></text:p>
        </text:list-item>
      </text:list>
      <text:list xml:id="list1081171089" text:style-name="L93">
        <text:list-item>
          <text:p text:style-name="P127"><text:span text:style-name="Source_20_Text"><text:span text:style-name="Strong_20_Emphasis">Atualiza contexto</text:span></text:span><text:span text:style-name="Source_20_Text"> em </text:span>contexto_sessao<text:span text:style-name="Source_20_Text"> </text:span></text:p>
        </text:list-item>
      </text:list>
      <text:list xml:id="list4270242895" text:style-name="L94">
        <text:list-item>
          <text:p text:style-name="P128"><text:span text:style-name="Source_20_Text"><text:span text:style-name="Strong_20_Emphasis">Envia resposta</text:span></text:span><text:span text:style-name="Source_20_Text"> via WhatsApp </text:span></text:p>
        </text:list-item>
      </text:list>
      <text:h text:style-name="Heading_20_4" text:outline-level="4"><text:span text:style-name="Source_20_Text">Estrutura de Dados do Webhook</text:span></text:h>
      <text:p text:style-name="Text_20_body"><text:span text:style-name="Source_20_Text">Quando uma mensagem chega, o webhook recebe algo como: </text:span>`<text:span text:style-name="Source_20_Text">json { "instanceId": "uuid-da-instancia", "from": "553799846648@s.whatsapp.net", "message": "Quero agendar limpeza de pele", "timestamp": 1234567890 } </text:span>`<text:span text:style-name="Source_20_Text"> </text:span></text:p>
      <text:h text:style-name="Heading_20_4" text:outline-level="4"><text:span text:style-name="Source_20_Text">Processamento</text:span></text:h>
      <text:p text:style-name="Text_20_body">`<text:span text:style-name="Source_20_Text">sql -- 1. Identificar empresa pela instância SELECT e.</text:span><text:span text:style-name="Source_20_Text"><text:span text:style-name="Emphasis">, ec.</text:span></text:span><text:span text:style-name="Source_20_Text">, i.instancia_nome FROM instancia i JOIN empresa e ON e.empresa_id = i.empresa_id JOIN empresa_cfg ec ON ec.empresa_cfg_id = e.empresa_cfg_id WHERE i.instancia_id = ''; -- 2. Buscar ou criar cliente INSERT INTO clientes (clientes_nome, clientes_telefone, empresa_id) VALUES ('Nome do Cliente', '553799846648@s.whatsapp.net', '') ON CONFLICT DO NOTHING; -- 3. Buscar/criar contexto da sessão INSERT INTO contexto_sessao (session_id, empresa_id, status) VALUES ('553799846648@s.whatsapp.net', '', 'aguardando') ON CONFLICT (session_id) DO UPDATE SET updated_at = now(); </text:span>`<text:span text:style-name="Source_20_Text"> --- </text:span></text:p>
      <text:h text:style-name="Heading_20_3" text:outline-level="3"><text:span text:style-name="Source_20_Text">Integração Google Calendar</text:span></text:h>
      <text:h text:style-name="Heading_20_4" text:outline-level="4"><text:span text:style-name="Source_20_Text">Sincronização</text:span></text:h>
      <text:p text:style-name="P3"><text:span text:style-name="Source_20_Text"><text:span text:style-name="Strong_20_Emphasis">Ao criar agendamento</text:span></text:span><text:span text:style-name="Source_20_Text">: </text:span></text:p>
      <text:list xml:id="list1328469225" text:style-name="L95">
        <text:list-item>
          <text:p text:style-name="P129"><text:span text:style-name="Source_20_Text">Criar evento no Google Calendar </text:span></text:p>
        </text:list-item>
      </text:list>
      <text:list xml:id="list3666692374" text:style-name="L96">
        <text:list-item>
          <text:p text:style-name="P130"><text:span text:style-name="Source_20_Text">Salvar </text:span>gcalendar_id<text:span text:style-name="Source_20_Text"> no agendamento </text:span></text:p>
        </text:list-item>
      </text:list>
      <text:list xml:id="list1085929278" text:style-name="L97">
        <text:list-item>
          <text:p text:style-name="P131"><text:span text:style-name="Source_20_Text">Adicionar link do evento na confirmação </text:span><text:span text:style-name="Source_20_Text"><text:span text:style-name="Strong_20_Emphasis">Ao atualizar agendamento</text:span></text:span><text:span text:style-name="Source_20_Text">: </text:span></text:p>
        </text:list-item>
      </text:list>
      <text:list xml:id="list2296309646" text:style-name="L98">
        <text:list-item>
          <text:p text:style-name="P132"><text:span text:style-name="Source_20_Text">Atualizar evento no Google Calendar </text:span></text:p>
        </text:list-item>
      </text:list>
      <text:list xml:id="list75842643" text:style-name="L99">
        <text:list-item>
          <text:p text:style-name="P133"><text:span text:style-name="Source_20_Text">Notificar cliente </text:span><text:span text:style-name="Source_20_Text"><text:span text:style-name="Strong_20_Emphasis">Ao cancelar agendamento</text:span></text:span><text:span text:style-name="Source_20_Text">: </text:span></text:p>
        </text:list-item>
      </text:list>
      <text:list xml:id="list4004008097" text:style-name="L100">
        <text:list-item>
          <text:p text:style-name="P134"><text:span text:style-name="Source_20_Text">Deletar evento do Google Calendar </text:span></text:p>
        </text:list-item>
      </text:list>
      <text:list xml:id="list3582913383" text:style-name="L101">
        <text:list-item>
          <text:p text:style-name="P135"><text:span text:style-name="Source_20_Text">Atualizar status para "Cancelado" --- </text:span></text:p>
        </text:list-item>
      </text:list>
      <text:h text:style-name="Heading_20_3" text:outline-level="3"><text:span text:style-name="Source_20_Text">Processamento de IA</text:span></text:h>
      <text:h text:style-name="Heading_20_4" text:outline-level="4"><text:span text:style-name="Source_20_Text">Templates de Prompt</text:span></text:h>
      <text:p text:style-name="Text_20_body"><text:span text:style-name="Source_20_Text"><text:span text:style-name="Strong_20_Emphasis">Estrutura</text:span></text:span><text:span text:style-name="Source_20_Text">: </text:span></text:p>
      <text:list xml:id="list1489701238" text:style-name="L102">
        <text:list-item>
          <text:p text:style-name="P137"><text:span text:style-name="Source_20_Text">Instruções de formato de saída </text:span></text:p>
        </text:list-item>
        <text:list-item>
          <text:p text:style-name="P137"><text:span text:style-name="Source_20_Text">Contexto da empresa </text:span></text:p>
        </text:list-item>
        <text:list-item>
          <text:p text:style-name="P137"><text:span text:style-name="Source_20_Text">Serviços disponíveis </text:span></text:p>
        </text:list-item>
        <text:list-item>
          <text:p text:style-name="P137"><text:span text:style-name="Source_20_Text">Profissionais disponíveis </text:span></text:p>
        </text:list-item>
        <text:list-item>
          <text:p text:style-name="P137"><text:span text:style-name="Source_20_Text">Horários disponíveis </text:span></text:p>
        </text:list-item>
        <text:list-item>
          <text:p text:style-name="P136"><text:span text:style-name="Source_20_Text">Exemplos de conversação </text:span></text:p>
        </text:list-item>
      </text:list>
      <text:p text:style-name="Text_20_body"><text:span text:style-name="Source_20_Text"><text:span text:style-name="Strong_20_Emphasis">Versionamento</text:span></text:span><text:span text:style-name="Source_20_Text">: </text:span></text:p>
      <text:list xml:id="list2868521524" text:style-name="L103">
        <text:list-item>
          <text:p text:style-name="P139"><text:span text:style-name="Source_20_Text">Manter histórico de versões </text:span></text:p>
        </text:list-item>
        <text:list-item>
          <text:p text:style-name="P139"><text:span text:style-name="Source_20_Text">Permitir rollback </text:span></text:p>
        </text:list-item>
        <text:list-item>
          <text:p text:style-name="P138"><text:span text:style-name="Source_20_Text">Testar novas versões em ambiente de staging </text:span></text:p>
        </text:list-item>
      </text:list>
      <text:p text:style-name="Text_20_body"><text:span text:style-name="Source_20_Text">--- </text:span></text:p>
      <text:h text:style-name="Heading_20_2" text:outline-level="2"><text:span text:style-name="Source_20_Text">📈 Monitoramento e Logs</text:span></text:h>
      <text:h text:style-name="Heading_20_3" text:outline-level="3"><text:span text:style-name="Source_20_Text">Métricas Importantes</text:span></text:h>
      <text:list xml:id="list1689037798" text:style-name="L104">
        <text:list-item>
          <text:p text:style-name="P140"><text:span text:style-name="Source_20_Text"><text:span text:style-name="Strong_20_Emphasis">Agendamentos</text:span></text:span><text:span text:style-name="Source_20_Text">: - Total de agendamentos por dia/semana/mês - Taxa de cancelamento - Taxa de confirmação - Tempo médio de resposta </text:span></text:p>
        </text:list-item>
      </text:list>
      <text:list xml:id="list760778451" text:style-name="L105">
        <text:list-item>
          <text:p text:style-name="P141"><text:span text:style-name="Source_20_Text"><text:span text:style-name="Strong_20_Emphasis">Profissionais</text:span></text:span><text:span text:style-name="Source_20_Text">: - Taxa de ocupação - Serviços mais realizados - Avaliações (se implementado) </text:span></text:p>
        </text:list-item>
      </text:list>
      <text:list xml:id="list1032120713" text:style-name="L106">
        <text:list-item>
          <text:p text:style-name="P142"><text:span text:style-name="Source_20_Text"><text:span text:style-name="Strong_20_Emphasis">Sistema</text:span></text:span><text:span text:style-name="Source_20_Text">: - Tempo de resposta da API - Erros de integração - Uso de cache --- </text:span></text:p>
        </text:list-item>
      </text:list>
      <text:h text:style-name="Heading_20_3" text:outline-level="3"><text:span text:style-name="Source_20_Text">Logs Recomendados</text:span></text:h>
      <text:p text:style-name="Text_20_body"><text:span text:style-name="Source_20_Text"><text:span text:style-name="Strong_20_Emphasis">Registrar</text:span></text:span><text:span text:style-name="Source_20_Text">: </text:span></text:p>
      <text:list xml:id="list1602205850" text:style-name="L107">
        <text:list-item>
          <text:p text:style-name="P144"><text:span text:style-name="Source_20_Text">Criação/atualização/cancelamento de agendamentos </text:span></text:p>
        </text:list-item>
        <text:list-item>
          <text:p text:style-name="P144"><text:span text:style-name="Source_20_Text">Tentativas de acesso não autorizado </text:span></text:p>
        </text:list-item>
        <text:list-item>
          <text:p text:style-name="P144"><text:span text:style-name="Source_20_Text">Erros de integração (WhatsApp, Google Calendar) </text:span></text:p>
        </text:list-item>
        <text:list-item>
          <text:p text:style-name="P143"><text:span text:style-name="Source_20_Text">Falhas de processamento de IA </text:span></text:p>
        </text:list-item>
      </text:list>
      <text:p text:style-name="Text_20_body"><text:span text:style-name="Source_20_Text">--- </text:span></text:p>
      <text:h text:style-name="Heading_20_2" text:outline-level="2"><text:span text:style-name="Source_20_Text">🚀 Próximos Passos</text:span></text:h>
      <text:h text:style-name="Heading_20_3" text:outline-level="3"><text:span text:style-name="Source_20_Text">Fase 1: Setup Inicial</text:span></text:h>
      <text:list xml:id="list557426526" text:style-name="L108">
        <text:list-item>
          <text:p text:style-name="P145"><text:span text:style-name="Source_20_Text">✅ Escolher stack tecnológico (Node.js, Python, Java, etc.) </text:span></text:p>
        </text:list-item>
      </text:list>
      <text:list xml:id="list3513634215" text:style-name="L109">
        <text:list-item>
          <text:p text:style-name="P146"><text:span text:style-name="Source_20_Text">✅ Configurar ambiente de desenvolvimento </text:span></text:p>
        </text:list-item>
      </text:list>
      <text:list xml:id="list1320983371" text:style-name="L110">
        <text:list-item>
          <text:p text:style-name="P147"><text:span text:style-name="Source_20_Text">✅ Criar estrutura do projeto </text:span></text:p>
        </text:list-item>
      </text:list>
      <text:list xml:id="list3140818509" text:style-name="L111">
        <text:list-item>
          <text:p text:style-name="P148"><text:span text:style-name="Source_20_Text">✅ Configurar conexão com banco de dados </text:span></text:p>
        </text:list-item>
      </text:list>
      <text:h text:style-name="Heading_20_3" text:outline-level="3"><text:span text:style-name="Source_20_Text">Fase 2: API Base</text:span></text:h>
      <text:list xml:id="list154465752" text:style-name="L112">
        <text:list-item>
          <text:p text:style-name="P149"><text:span text:style-name="Source_20_Text">✅ Implementar autenticação JWT </text:span></text:p>
        </text:list-item>
      </text:list>
      <text:list xml:id="list3976944690" text:style-name="L113">
        <text:list-item>
          <text:p text:style-name="P150"><text:span text:style-name="Source_20_Text">✅ Criar endpoints de empresas </text:span></text:p>
        </text:list-item>
      </text:list>
      <text:list xml:id="list28451473" text:style-name="L114">
        <text:list-item>
          <text:p text:style-name="P151"><text:span text:style-name="Source_20_Text">✅ Criar endpoints de profissionais </text:span></text:p>
        </text:list-item>
      </text:list>
      <text:list xml:id="list2436499049" text:style-name="L115">
        <text:list-item>
          <text:p text:style-name="P152"><text:span text:style-name="Source_20_Text">✅ Criar endpoints de serviços </text:span></text:p>
        </text:list-item>
      </text:list>
      <text:list xml:id="list2899429187" text:style-name="L116">
        <text:list-item>
          <text:p text:style-name="P153"><text:span text:style-name="Source_20_Text">✅ Criar endpoints de clientes </text:span></text:p>
        </text:list-item>
      </text:list>
      <text:h text:style-name="Heading_20_3" text:outline-level="3"><text:span text:style-name="Source_20_Text">Fase 3: Agendamentos</text:span></text:h>
      <text:list xml:id="list1690855434" text:style-name="L117">
        <text:list-item>
          <text:p text:style-name="P154"><text:span text:style-name="Source_20_Text">✅ Implementar lógica de validação de horários </text:span></text:p>
        </text:list-item>
      </text:list>
      <text:list xml:id="list1470120411" text:style-name="L118">
        <text:list-item>
          <text:p text:style-name="P155"><text:span text:style-name="Source_20_Text">✅ Criar endpoints de agendamentos </text:span></text:p>
        </text:list-item>
      </text:list>
      <text:list xml:id="list1661449848" text:style-name="L119">
        <text:list-item>
          <text:p text:style-name="P156"><text:span text:style-name="Source_20_Text">✅ Implementar cálculo de valores e durações </text:span></text:p>
        </text:list-item>
      </text:list>
      <text:list xml:id="list2001538107" text:style-name="L120">
        <text:list-item>
          <text:p text:style-name="P157"><text:span text:style-name="Source_20_Text">✅ Implementar geração de protocolos </text:span></text:p>
        </text:list-item>
      </text:list>
      <text:h text:style-name="Heading_20_3" text:outline-level="3"><text:span text:style-name="Source_20_Text">Fase 4: Integrações</text:span></text:h>
      <text:list xml:id="list132614419" text:style-name="L121">
        <text:list-item>
          <text:p text:style-name="P158"><text:span text:style-name="Source_20_Text">✅ Integração WhatsApp </text:span></text:p>
        </text:list-item>
      </text:list>
      <text:list xml:id="list127811902" text:style-name="L122">
        <text:list-item>
          <text:p text:style-name="P159"><text:span text:style-name="Source_20_Text">✅ Integração Google Calendar </text:span></text:p>
        </text:list-item>
      </text:list>
      <text:list xml:id="list277632468" text:style-name="L123">
        <text:list-item>
          <text:p text:style-name="P160"><text:span text:style-name="Source_20_Text">✅ Integração IA para processamento de linguagem </text:span></text:p>
        </text:list-item>
      </text:list>
      <text:h text:style-name="Heading_20_3" text:outline-level="3"><text:span text:style-name="Source_20_Text">Fase 5: Frontend</text:span></text:h>
      <text:list xml:id="list4032329103" text:style-name="L124">
        <text:list-item>
          <text:p text:style-name="P161"><text:span text:style-name="Source_20_Text">✅ Dashboard administrativo </text:span></text:p>
        </text:list-item>
      </text:list>
      <text:list xml:id="list1538926537" text:style-name="L125">
        <text:list-item>
          <text:p text:style-name="P162"><text:span text:style-name="Source_20_Text">✅ Gestão de profissionais </text:span></text:p>
        </text:list-item>
      </text:list>
      <text:list xml:id="list3467762482" text:style-name="L126">
        <text:list-item>
          <text:p text:style-name="P163"><text:span text:style-name="Source_20_Text">✅ Gestão de agendamentos </text:span></text:p>
        </text:list-item>
      </text:list>
      <text:list xml:id="list2695325320" text:style-name="L127">
        <text:list-item>
          <text:p text:style-name="P164"><text:span text:style-name="Source_20_Text">✅ Relatórios </text:span></text:p>
        </text:list-item>
      </text:list>
      <text:h text:style-name="Heading_20_3" text:outline-level="3"><text:span text:style-name="Source_20_Text">Fase 6: Testes e Deploy</text:span></text:h>
      <text:list xml:id="list962095423" text:style-name="L128">
        <text:list-item>
          <text:p text:style-name="P165"><text:span text:style-name="Source_20_Text">✅ Testes unitários </text:span></text:p>
        </text:list-item>
      </text:list>
      <text:list xml:id="list3756236582" text:style-name="L129">
        <text:list-item>
          <text:p text:style-name="P166"><text:span text:style-name="Source_20_Text">✅ Testes de integração </text:span></text:p>
        </text:list-item>
      </text:list>
      <text:list xml:id="list1103811651" text:style-name="L130">
        <text:list-item>
          <text:p text:style-name="P167"><text:span text:style-name="Source_20_Text">✅ Testes de carga </text:span></text:p>
        </text:list-item>
      </text:list>
      <text:list xml:id="list1758929135" text:style-name="L131">
        <text:list-item>
          <text:p text:style-name="P168"><text:span text:style-name="Source_20_Text">✅ Deploy em produção --- </text:span></text:p>
        </text:list-item>
      </text:list>
      <text:h text:style-name="Heading_20_2" text:outline-level="2"><text:span text:style-name="Source_20_Text">📚 Glossário</text:span>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Table_20_Contents">Termo</text:p>
          </table:table-cell>
          <table:table-cell table:style-name="Tabela6.B1" office:value-type="string">
            <text:p text:style-name="Table_20_Contents">Descrição</text:p>
          </table:table-cell>
        </table:table-row>
        <table:table-row>
          <table:table-cell table:style-name="Tabela6.A2" office:value-type="string">
            <text:p text:style-name="Table_20_Contents">-------</text:p>
          </table:table-cell>
          <table:table-cell table:style-name="Tabela6.B2" office:value-type="string">
            <text:p text:style-name="Table_20_Contents">-----------</text:p>
          </table:table-cell>
        </table:table-row>
        <table:table-row>
          <table:table-cell table:style-name="Tabela6.A2" office:value-type="string">
            <text:p text:style-name="Table_20_Contents"><text:span text:style-name="Strong_20_Emphasis">Multi-tenant</text:span></text:p>
          </table:table-cell>
          <table:table-cell table:style-name="Tabela6.B2" office:value-type="string">
            <text:p text:style-name="Table_20_Contents">Arquitetura onde múltiplos clientes (empresas) compartilham a mesma infraestrutura</text:p>
          </table:table-cell>
        </table:table-row>
        <table:table-row>
          <table:table-cell table:style-name="Tabela6.A2" office:value-type="string">
            <text:p text:style-name="Table_20_Contents"><text:span text:style-name="Strong_20_Emphasis">UUID</text:span></text:p>
          </table:table-cell>
          <table:table-cell table:style-name="Tabela6.B2" office:value-type="string">
            <text:p text:style-name="Table_20_Contents">Identificador único universal (128 bits)</text:p>
          </table:table-cell>
        </table:table-row>
        <table:table-row>
          <table:table-cell table:style-name="Tabela6.A2" office:value-type="string">
            <text:p text:style-name="Table_20_Contents"><text:span text:style-name="Strong_20_Emphasis">CITEXT</text:span></text:p>
          </table:table-cell>
          <table:table-cell table:style-name="Tabela6.B2" office:value-type="string">
            <text:p text:style-name="Table_20_Contents">Tipo de texto case-insensitive do PostgreSQL</text:p>
          </table:table-cell>
        </table:table-row>
        <table:table-row>
          <table:table-cell table:style-name="Tabela6.A2" office:value-type="string">
            <text:p text:style-name="Table_20_Contents"><text:span text:style-name="Strong_20_Emphasis">TSTZRANGE</text:span></text:p>
          </table:table-cell>
          <table:table-cell table:style-name="Tabela6.B2" office:value-type="string">
            <text:p text:style-name="Table_20_Contents">Tipo de intervalo de timestamp com timezone</text:p>
          </table:table-cell>
        </table:table-row>
        <table:table-row>
          <table:table-cell table:style-name="Tabela6.A2" office:value-type="string">
            <text:p text:style-name="Table_20_Contents"><text:span text:style-name="Strong_20_Emphasis">INTERVAL</text:span></text:p>
          </table:table-cell>
          <table:table-cell table:style-name="Tabela6.B2" office:value-type="string">
            <text:p text:style-name="Table_20_Contents">Tipo de duração de tempo do PostgreSQL</text:p>
          </table:table-cell>
        </table:table-row>
        <table:table-row>
          <table:table-cell table:style-name="Tabela6.A2" office:value-type="string">
            <text:p text:style-name="Table_20_Contents"><text:span text:style-name="Strong_20_Emphasis">Trigger</text:span></text:p>
          </table:table-cell>
          <table:table-cell table:style-name="Tabela6.B2" office:value-type="string">
            <text:p text:style-name="Table_20_Contents">Função executada automaticamente em eventos do banco</text:p>
          </table:table-cell>
        </table:table-row>
        <table:table-row>
          <table:table-cell table:style-name="Tabela6.A2" office:value-type="string">
            <text:p text:style-name="Table_20_Contents"><text:span text:style-name="Strong_20_Emphasis">Webhook</text:span></text:p>
          </table:table-cell>
          <table:table-cell table:style-name="Tabela6.B2" office:value-type="string">
            <text:p text:style-name="Table_20_Contents">Callback HTTP para notificações em tempo real</text:p>
          </table:table-cell>
        </table:table-row>
        <table:table-row>
          <table:table-cell table:style-name="Tabela6.A10" office:value-type="string">
            <text:p text:style-name="Table_20_Contents"><text:span text:style-name="Strong_20_Emphasis">JWT</text:span></text:p>
          </table:table-cell>
          <table:table-cell table:style-name="Tabela6.B10" office:value-type="string">
            <text:p text:style-name="Table_20_Contents">JSON Web Token para autenticação</text:p>
          </table:table-cell>
        </table:table-row>
      </table:table>
      <text:p text:style-name="Text_20_body"><text:span text:style-name="Source_20_Text">--- </text:span></text:p>
      <text:h text:style-name="Heading_20_2" text:outline-level="2"><text:span text:style-name="Source_20_Text">🎯 Resumo: Pontos-Chave para Desenvolvimento</text:span></text:h>
      <text:h text:style-name="Heading_20_3" text:outline-level="3"><text:span text:style-name="Source_20_Text">1. Identificação da Empresa</text:span></text:h>
      <text:p text:style-name="Text_20_body">`<text:span text:style-name="Source_20_Text"> ✅ SEMPRE use instancia_id para identificar a empresa ✅ Mensagem WhatsApp → instancia_id → empresa_id ✅ Todas as queries devem filtrar por empresa_id </text:span>`<text:span text:style-name="Source_20_Text"> </text:span></text:p>
      <text:h text:style-name="Heading_20_3" text:outline-level="3"><text:span text:style-name="Source_20_Text">2. Fluxo de Agendamento</text:span></text:h>
      <text:p text:style-name="Text_20_body">`<text:span text:style-name="Source_20_Text"> Webhook → Instância → Empresa → Contexto → IA → Validação → Criação → Google Calendar </text:span>`<text:span text:style-name="Source_20_Text"> </text:span></text:p>
      <text:h text:style-name="Heading_20_3" text:outline-level="3"><text:span text:style-name="Source_20_Text">3. Tabelas Críticas</text:span></text:h>
      <text:list xml:id="list3538422146" text:style-name="L132">
        <text:list-item>
          <text:p text:style-name="P170"><text:span text:style-name="Source_20_Text"><text:span text:style-name="Strong_20_Emphasis">instancia</text:span></text:span><text:span text:style-name="Source_20_Text">: Ponto de entrada (identifica empresa) </text:span></text:p>
        </text:list-item>
        <text:list-item>
          <text:p text:style-name="P170"><text:span text:style-name="Source_20_Text"><text:span text:style-name="Strong_20_Emphasis">empresa</text:span></text:span><text:span text:style-name="Source_20_Text">: Entidade raiz (multi-tenant) </text:span></text:p>
        </text:list-item>
        <text:list-item>
          <text:p text:style-name="P170"><text:span text:style-name="Source_20_Text"><text:span text:style-name="Strong_20_Emphasis">empresa_cfg</text:span></text:span><text:span text:style-name="Source_20_Text">: Configurações (antecedência, intervalos, prompts) </text:span></text:p>
        </text:list-item>
        <text:list-item>
          <text:p text:style-name="P170"><text:span text:style-name="Source_20_Text"><text:span text:style-name="Strong_20_Emphasis">agendamento</text:span></text:span><text:span text:style-name="Source_20_Text">: Agendamentos (com campo calculado periodo) </text:span></text:p>
        </text:list-item>
        <text:list-item>
          <text:p text:style-name="P169"><text:span text:style-name="Source_20_Text"><text:span text:style-name="Strong_20_Emphasis">contexto_sessao</text:span></text:span><text:span text:style-name="Source_20_Text">: Contexto das conversas (IA) </text:span></text:p>
        </text:list-item>
      </text:list>
      <text:h text:style-name="Heading_20_3" text:outline-level="3"><text:span text:style-name="Source_20_Text">4. Validações Obrigatórias</text:span></text:h>
      <text:list xml:id="list2231698267" text:style-name="L133">
        <text:list-item>
          <text:p text:style-name="P172"><text:span text:style-name="Source_20_Text">✅ Verificar antecedência mínima </text:span></text:p>
        </text:list-item>
        <text:list-item>
          <text:p text:style-name="P172"><text:soft-page-break/><text:span text:style-name="Source_20_Text">✅ Verificar disponibilidade do profissional (tstzrange) </text:span></text:p>
        </text:list-item>
        <text:list-item>
          <text:p text:style-name="P172"><text:span text:style-name="Source_20_Text">✅ Verificar horário de trabalho do profissional </text:span></text:p>
        </text:list-item>
        <text:list-item>
          <text:p text:style-name="P172"><text:span text:style-name="Source_20_Text">✅ Aplicar buffers pré e pós atendimento </text:span></text:p>
        </text:list-item>
        <text:list-item>
          <text:p text:style-name="P171"><text:span text:style-name="Source_20_Text">✅ Validar isolamento por empresa_id </text:span></text:p>
        </text:list-item>
      </text:list>
      <text:h text:style-name="Heading_20_3" text:outline-level="3"><text:span text:style-name="Source_20_Text">5. Integrações</text:span></text:h>
      <text:list xml:id="list3790213280" text:style-name="L134">
        <text:list-item>
          <text:p text:style-name="P174"><text:span text:style-name="Source_20_Text"><text:span text:style-name="Strong_20_Emphasis">WhatsApp</text:span></text:span><text:span text:style-name="Source_20_Text">: Webhook → instancia_id → processamento </text:span></text:p>
        </text:list-item>
        <text:list-item>
          <text:p text:style-name="P174"><text:span text:style-name="Source_20_Text"><text:span text:style-name="Strong_20_Emphasis">Google Calendar</text:span></text:span><text:span text:style-name="Source_20_Text">: Sincronização bidirecional </text:span></text:p>
        </text:list-item>
        <text:list-item>
          <text:p text:style-name="P173"><text:span text:style-name="Source_20_Text"><text:span text:style-name="Strong_20_Emphasis">IA</text:span></text:span><text:span text:style-name="Source_20_Text">: Templates versionados por empresa </text:span></text:p>
        </text:list-item>
      </text:list>
      <text:p text:style-name="Text_20_body"><text:span text:style-name="Source_20_Text">--- </text:span></text:p>
      <text:h text:style-name="Heading_20_2" text:outline-level="2"><text:span text:style-name="Source_20_Text">📞 Suporte</text:span></text:h>
      <text:p text:style-name="Text_20_body"><text:span text:style-name="Source_20_Text">Para dúvidas sobre a estrutura do banco de dados ou desenvolvimento da aplicação, consulte: </text:span></text:p>
      <text:list xml:id="list1115649912" text:style-name="L135">
        <text:list-item>
          <text:p text:style-name="P176"><text:span text:style-name="Source_20_Text">Arquivo de estrutura: </text:span>estrutura_banco.sql<text:span text:style-name="Source_20_Text"> </text:span></text:p>
        </text:list-item>
        <text:list-item>
          <text:p text:style-name="P176"><text:span text:style-name="Source_20_Text">Backup de dados: </text:span>backup_25_10_25<text:span text:style-name="Source_20_Text"> </text:span></text:p>
        </text:list-item>
        <text:list-item>
          <text:p text:style-name="P175"><text:span text:style-name="Source_20_Text">Esta documentação: </text:span>DOCUMENTACAO_BANCO_DADOS.md<text:span text:style-name="Source_20_Text"> </text:span></text:p>
        </text:list-item>
      </text:list>
      <text:p text:style-name="Text_20_body"><text:span text:style-name="Source_20_Text">--- </text:span></text:p>
      <text:h text:style-name="Heading_20_2" text:outline-level="2"><text:span text:style-name="Source_20_Text">🔑 Conceito Mais Importante</text:span></text:h>
      <text:p text:style-name="Text_20_body"><text:span text:style-name="Source_20_Text"><text:span text:style-name="Strong_20_Emphasis">A tabela </text:span></text:span><text:span text:style-name="Strong_20_Emphasis">instancia</text:span><text:span text:style-name="Strong_20_Emphasis"><text:span text:style-name="Source_20_Text"> é a chave para todo o sistema multi-tenant via WhatsApp!</text:span></text:span><text:span text:style-name="Source_20_Text"> </text:span>`<text:span text:style-name="Source_20_Text"> ┌─────────────────────────────────────────────────────────┐ │ Mensagem WhatsApp → instancia_id → empresa_id │ │ │ │ SEM instancia_id = Não sabe qual empresa é │ │ COM instancia_id = Sistema funciona perfeitamente │ └─────────────────────────────────────────────────────────┘ </text:span>`` --- <text:span text:style-name="Strong_20_Emphasis">Documentação gerada em</text:span>: 2025-01-27 <text:span text:style-name="Strong_20_Emphasis">Versão do banco</text:span>: PostgreSQL 16.9 <text:span text:style-name="Strong_20_Emphasis">Backup analisado</text:span>: 2025-10-25 <text:span text:style-name="Strong_20_Emphasis">Última atualização</text:span>: 2025-01-27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, Tahoma, Geneva, 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pt" fo:country="BR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60%"/>
      <style:text-properties fo:color="#333333" loext:opacity="100%" style:font-name="Segoe UI" fo:font-family="'Segoe UI', Tahoma, Geneva, Verdana, sans-serif" style:font-name-asian="Segoe UI" style:font-family-asian="'Segoe UI', Tahoma, Geneva, Verdana, sans-serif" style:font-name-complex="Segoe UI" style:font-family-complex="'Segoe UI', Tahoma, Geneva, Verdana, sans-serif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794cm" fo:margin-bottom="0.499cm" style:contextual-spacing="false" fo:padding-left="0cm" fo:padding-right="0cm" fo:padding-top="0cm" fo:padding-bottom="0.265cm" fo:border-left="none" fo:border-right="none" fo:border-top="none" fo:border-bottom="2.24pt solid #3498db"/>
      <style:text-properties fo:color="#2c3e50" loext:opacity="100%" style:font-name="Liberation Sans Unicode MS" fo:font-family="'Liberation Sans Unicode MS'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661cm" fo:margin-bottom="0.212cm" style:contextual-spacing="false" fo:padding-left="0cm" fo:padding-right="0cm" fo:padding-top="0cm" fo:padding-bottom="0.212cm" fo:border-left="none" fo:border-right="none" fo:border-top="none" fo:border-bottom="1.5pt solid #95a5a6"/>
      <style:text-properties fo:color="#34495e" loext:opacity="100%"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529cm" fo:margin-bottom="0.212cm" style:contextual-spacing="false"/>
      <style:text-properties fo:color="#2980b9" loext:opacity="100%"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397cm" fo:margin-bottom="0.212cm" style:contextual-spacing="false"/>
      <style:text-properties fo:color="#16a085" loext:opacity="100%"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padding-left="0.397cm" fo:padding-right="0cm" fo:padding-top="0cm" fo:padding-bottom="0cm" fo:border-left="3pt solid #3498db" fo:border-right="none" fo:border-top="none" fo:border-bottom="none"/>
      <style:text-properties fo:color="#ecf0f1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529cm" fo:margin-right="0.529cm" fo:margin-top="0.529cm" fo:margin-bottom="0.529cm" style:contextual-spacing="false" fo:text-indent="0cm" style:auto-text-indent="false" fo:padding-left="0.397cm" fo:padding-right="0cm" fo:padding-top="0cm" fo:padding-bottom="0cm" fo:border-left="3pt solid #3498db" fo:border-right="none" fo:border-top="none" fo:border-bottom="none"/>
      <style:text-properties fo:color="#7f8c8d" loext:opacity="100%" fo:font-style="italic" style:font-style-asian="italic" style:font-style-complex="italic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color="#ffffff" loext:opacity="100%"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3498db" loext:opacity="100%" style:text-line-through-style="none" style:text-line-through-type="none" style:text-underline-style="none" style:text-blinking="false" style:text-overline-style="none" style:text-overline-color="font-color"/>
    </style:style>
    <style:style style:name="Source_20_Text" style:display-name="Source Text" style:family="text">
      <style:text-properties fo:color="#e74c3c" loext:opacity="100%" style:font-name="Courier New" fo:font-family="'Courier New', monospace" fo:background-color="#f4f4f4" style:font-name-asian="Courier New" style:font-family-asian="'Courier New', monospace" style:font-name-complex="Courier New" style:font-family-complex="'Courier New', monospace"/>
    </style:style>
    <style:style style:name="Strong_20_Emphasis" style:display-name="Strong Emphasis" style:family="text">
      <style:text-properties fo:color="#2c3e50" loext:opacity="100%" fo:font-weight="bold" style:font-weight-asian="bold" style:font-weight-complex="bold"/>
    </style:style>
    <style:style style:name="Emphasis" style:family="text">
      <style:text-properties fo:color="#7f8c8d" loext:opacity="100%"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3498db" loext:opacity="100%" style:text-line-through-style="none" style:text-line-through-type="none" style:text-underline-style="none" style:text-blinking="false" style:text-overline-style="none" style:text-ov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none" fo:padding="0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ocumentação do Banco de Dados - Sistema de Agendamento</dc:title>
    <meta:document-statistic meta:table-count="6" meta:image-count="0" meta:object-count="0" meta:page-count="5" meta:paragraph-count="614" meta:word-count="4990" meta:character-count="35970" meta:non-whitespace-character-count="31503"/>
    <meta:generator>LibreOffice/7.3.7.2$Linux_X86_64 LibreOffice_project/30$Build-2</meta:generator>
    <meta:user-defined meta:name=""/>
    <meta:user-defined meta:name="viewport">width=device-width, initial-scale=1.0</meta:user-defined>
  </office:meta>
</office:document-meta>
</file>